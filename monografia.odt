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office:automatic-styles>
  <office:body>
    <office:tex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itizen-code-of-conduct"/>Citizen Code of Conduct<text:bookmark-end text:name="citizen-code-of-conduct"/></text:h>
      <text:h text:style-name="Heading_20_2" text:outline-level="2"><text:bookmark-start text:name="purpose"/>1. Purpose<text:bookmark-end text:name="purpose"/></text:h>
      <text:p text:style-name="First_20_paragraph">A primary goal of the Quartz community is to be inclusive to the largest number of contributors, with the most varied and diverse backgrounds possible. As such, we are committed to providing a friendly, safe and welcoming environment for all, regardless of gender, sexual orientation, ability, ethnicity, socioeconomic status, and religion (or lack thereof).</text:p>
      <text:p text:style-name="Text_20_body">This code of conduct outlines our expectations for all those who participate in our community, as well as the consequences for unacceptable behavior.</text:p>
      <text:p text:style-name="Text_20_body">We invite all those who participate in the Quartz community to help us create safe and positive experiences for everyone.</text:p>
      <text:h text:style-name="Heading_20_2" text:outline-level="2"><text:bookmark-start text:name="open-sourceculturetech-citizenship"/>2. Open [Source/Culture/Tech] Citizenship<text:bookmark-end text:name="open-sourceculturetech-citizenship"/></text:h>
      <text:p text:style-name="First_20_paragraph">A supplemental goal of this Code of Conduct is to increase open [source/culture/tech] citizenship by encouraging participants to recognize and strengthen the relationships between our actions and their effects on our community.</text:p>
      <text:p text:style-name="Text_20_body">Communities mirror the societies in which they exist and positive action is essential to counteract the many forms of inequality and abuses of power that exist in society.</text:p>
      <text:p text:style-name="Text_20_body">If you see someone who is making an extra effort to ensure our community is welcoming, friendly, and encourages all participants to contribute to the fullest extent, we want to know.</text:p>
      <text:h text:style-name="Heading_20_2" text:outline-level="2"><text:bookmark-start text:name="expected-behavior"/>3. Expected Behavior<text:bookmark-end text:name="expected-behavior"/></text:h>
      <text:p text:style-name="First_20_paragraph">The following behaviors are expected and requested of all community members:</text:p>
      <text:list text:style-name="L1">
        <text:list-item>
          <text:p text:style-name="P1">Participate in an authentic and active way. In doing so, you contribute to the health and longevity of this community.</text:p>
        </text:list-item>
        <text:list-item>
          <text:p text:style-name="P1">Exercise consideration and respect in your speech and actions.</text:p>
        </text:list-item>
        <text:list-item>
          <text:p text:style-name="P1">Attempt collaboration before conflict.</text:p>
        </text:list-item>
        <text:list-item>
          <text:p text:style-name="P1">Refrain from demeaning, discriminatory, or harassing behavior and speech.</text:p>
        </text:list-item>
        <text:list-item>
          <text:p text:style-name="P1">Be mindful of your surroundings and of your fellow participants. Alert community leaders if you notice a dangerous situation, someone in distress, or violations of this Code of Conduct, even if they seem inconsequential.</text:p>
        </text:list-item>
        <text:list-item>
          <text:p text:style-name="P1">Remember that community event venues may be shared with members of the public; please be respectful to all patrons of these locations.</text:p>
        </text:list-item>
      </text:list>
      <text:h text:style-name="Heading_20_2" text:outline-level="2"><text:bookmark-start text:name="unacceptable-behavior"/>4. Unacceptable Behavior<text:bookmark-end text:name="unacceptable-behavior"/></text:h>
      <text:p text:style-name="First_20_paragraph">The following behaviors are considered harassment and are unacceptable within our community:</text:p>
      <text:list text:style-name="L2">
        <text:list-item>
          <text:p text:style-name="P2">Violence, threats of violence or violent language directed against another person.</text:p>
        </text:list-item>
        <text:list-item>
          <text:p text:style-name="P2">Sexist, racist, homophobic, transphobic, ableist or otherwise discriminatory jokes and language.</text:p>
        </text:list-item>
        <text:list-item>
          <text:p text:style-name="P2">Posting or displaying sexually explicit or violent material.</text:p>
        </text:list-item>
        <text:list-item>
          <text:p text:style-name="P2">Posting or threatening to post other people’s personally identifying information (“doxing”).</text:p>
        </text:list-item>
        <text:list-item>
          <text:p text:style-name="P2">Personal insults, particularly those related to gender, sexual orientation, race, religion, or disability.</text:p>
        </text:list-item>
        <text:list-item>
          <text:p text:style-name="P2">Inappropriate photography or recording.</text:p>
        </text:list-item>
        <text:list-item>
          <text:p text:style-name="P2">Inappropriate physical contact. You should have someone’s consent before touching them.</text:p>
        </text:list-item>
        <text:list-item>
          <text:p text:style-name="P2">Unwelcome sexual attention. This includes, sexualized comments or jokes; inappropriate touching, groping, and unwelcomed sexual advances.</text:p>
        </text:list-item>
        <text:list-item>
          <text:p text:style-name="P2">Deliberate intimidation, stalking or following (online or in person).</text:p>
        </text:list-item>
        <text:list-item>
          <text:p text:style-name="P2">Advocating for, or encouraging, any of the above behavior.</text:p>
        </text:list-item>
        <text:list-item>
          <text:p text:style-name="P2">Sustained disruption of community events, including talks and presentations.</text:p>
        </text:list-item>
      </text:list>
      <text:h text:style-name="Heading_20_2" text:outline-level="2"><text:bookmark-start text:name="weapons-policy"/>5. Weapons Policy<text:bookmark-end text:name="weapons-policy"/></text:h>
      <text:p text:style-name="First_20_paragraph">No weapons will be allowed at Quartz community events, community spaces, or in other spaces covered by the scope of this Code of Conduct. Weapons include but are not limited to guns, explosives (including fireworks), and large knives such as those used for hunting or display, as well as any other item used for the purpose of causing injury or harm to others. Anyone seen in possession of one of these items will be asked to leave immediately, and will only be allowed to return without the weapon. Community members are further expected to comply with all state and local laws on this matter.</text:p>
      <text:h text:style-name="Heading_20_2" text:outline-level="2"><text:bookmark-start text:name="consequences-of-unacceptable-behavior"/>6. Consequences of Unacceptable Behavior<text:bookmark-end text:name="consequences-of-unacceptable-behavior"/></text:h>
      <text:p text:style-name="First_20_paragraph">Unacceptable behavior from any community member, including sponsors and those with decision-making authority, will not be tolerated.</text:p>
      <text:p text:style-name="Text_20_body">Anyone asked to stop unacceptable behavior is expected to comply immediately.</text:p>
      <text:p text:style-name="Text_20_body">If a community member engages in unacceptable behavior, the community organizers may take any action they deem appropriate, up to and including a temporary ban or permanent expulsion from the community without warning (and without refund in the case of a paid event).</text:p>
      <text:h text:style-name="Heading_20_2" text:outline-level="2"><text:bookmark-start text:name="reporting-guidelines"/>7. Reporting Guidelines<text:bookmark-end text:name="reporting-guidelines"/></text:h>
      <text:p text:style-name="First_20_paragraph">If you are subject to or witness unacceptable behavior, or have any other concerns, please notify a community organizer as soon as possible. j.zhao2k19@gmail.com.</text:p>
      <text:p text:style-name="Text_20_body">Additionally, community organizers are available to help community members engage with local law enforcement or to otherwise help those experiencing unacceptable behavior feel safe. In the context of in-person events, organizers will also provide escorts as desired by the person experiencing distress.</text:p>
      <text:h text:style-name="Heading_20_2" text:outline-level="2"><text:bookmark-start text:name="addressing-grievances"/>8. Addressing Grievances<text:bookmark-end text:name="addressing-grievances"/></text:h>
      <text:p text:style-name="First_20_paragraph">If you feel you have been falsely or unfairly accused of violating this Code of Conduct, you should notify @jackyzha0 with a concise description of your grievance. Your grievance will be handled in accordance with our existing governing policies.</text:p>
      <text:h text:style-name="Heading_20_2" text:outline-level="2"><text:bookmark-start text:name="scope"/>9. Scope<text:bookmark-end text:name="scope"/></text:h>
      <text:p text:style-name="First_20_paragraph">We expect all community participants (contributors, paid or otherwise; sponsors; and other guests) to abide by this Code of Conduct in all community venues–online and in-person–as well as in all one-on-one communications pertaining to community business.</text:p>
      <text:p text:style-name="Text_20_body">This code of conduct and its related procedures also applies to unacceptable behavior occurring outside the scope of community activities when such behavior has the potential to adversely affect the safety and well-being of community members.</text:p>
      <text:h text:style-name="Heading_20_2" text:outline-level="2"><text:bookmark-start text:name="contact-info"/>10. Contact info<text:bookmark-end text:name="contact-info"/></text:h>
      <text:p text:style-name="First_20_paragraph">j.zhao2k19@gmail.com</text:p>
      <text:h text:style-name="Heading_20_2" text:outline-level="2"><text:bookmark-start text:name="license-and-attribution"/>11. License and attribution<text:bookmark-end text:name="license-and-attribution"/></text:h>
      <text:p text:style-name="First_20_paragraph">The Citizen Code of Conduct is distributed by <text:a xlink:type="simple" xlink:href="http://stumptownsyndicate.org" office:name=""><text:span text:style-name="Definition">Stumptown Syndicate</text:span></text:a> under a <text:a xlink:type="simple" xlink:href="http://creativecommons.org/licenses/by-sa/3.0/" office:name=""><text:span text:style-name="Definition">Creative Commons Attribution-ShareAlike license</text:span></text:a>.</text:p>
      <text:p text:style-name="Text_20_body">Portions of text derived from the <text:a xlink:type="simple" xlink:href="https://www.djangoproject.com/conduct/" office:name=""><text:span text:style-name="Definition">Django Code of Conduct</text:span></text:a> and the <text:a xlink:type="simple" xlink:href="http://geekfeminism.wikia.com/wiki/Conference_anti-harassment/Policy" office:name=""><text:span text:style-name="Definition">Geek Feminism Anti-Harassment Policy</text:span></text:a>.</text:p>
      <text:p text:style-name="Text_20_body"><text:span text:style-name="T1">Revision 2.3. Posted 6 March 2017.</text:span></text:p>
      <text:p text:style-name="Text_20_body"><text:span text:style-name="T1">Revision 2.2. Posted 4 February 2016.</text:span></text:p>
      <text:p text:style-name="Text_20_body"><text:span text:style-name="T1">Revision 2.1. Posted 23 June 2014.</text:span></text:p>
      <text:p text:style-name="Text_20_body"><text:span text:style-name="T1">Revision 2.0, adopted by the </text:span><text:a xlink:type="simple" xlink:href="http://stumptownsyndicate.org" office:name=""><text:span text:style-name="Definition"><text:span text:style-name="T1">Stumptown Syndicate</text:span></text:span></text:a><text:span text:style-name="T1"> board on 10 January 2013. Posted 17 March 2013.</text:span></text:p>
      <text:h text:style-name="Heading_20_1" text:outline-level="1"><text:bookmark-start text:name="quartz-v4"/>Quartz v4<text:bookmark-end text:name="quartz-v4"/></text:h>
      <text:p text:style-name="P3">“[One] who works with the door open gets all kinds of interruptions, but [they] also occasionally gets clues as to what the world is and what might be important.” — Richard Hamming</text:p>
      <text:p text:style-name="First_20_paragraph">Quartz is a set of tools that helps you publish your <text:a xlink:type="simple" xlink:href="https://jzhao.xyz/posts/networked-thought" office:name=""><text:span text:style-name="Definition">digital garden</text:span></text:a> and notes as a website for free. Quartz v4 features a from-the-ground rewrite focusing on end-user extensibility and ease-of-use.</text:p>
      <text:p text:style-name="Text_20_body">🔗 Read the documentation and get started: https://quartz.jzhao.xyz/</text:p>
      <text:p text:style-name="Text_20_body"><text:a xlink:type="simple" xlink:href="https://discord.gg/cRFFHYye7t" office:name=""><text:span text:style-name="Definition">Join the Discord Community</text:span></text:a></text:p>
      <text:h text:style-name="Heading_20_2" text:outline-level="2"><text:bookmark-start text:name="sponsors"/>Sponsors<text:bookmark-end text:name="sponsors"/></text:h>
      <text:p text:style-name="First_20_paragraph">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1</meta:generator>
    <dc:title/>
    <dc:description/>
    <dc:subject/>
    <meta:keyword/>
    <meta:initial-creator/>
    <dc:creator/>
    <meta:creation-date>2025-05-05T03:25:03Z</meta:creation-date>
    <dc:date>2025-05-05T03:25:03Z</dc:date>
  </office:meta>
</office:document-meta>
</file>