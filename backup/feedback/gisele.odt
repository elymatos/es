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i Ely, demorei um pouquinho mas acabei a leitura do livro/monografia que vc me enviou.</text:p>
      <text:p text:style-name="Standard">Gostei muito.</text:p>
      <text:p text:style-name="Standard">A primeira parte foi a leitura que exigiu um pouco mais de atenção. </text:p>
      <text:p text:style-name="Standard">Apesar de estar bastante clara e didática me exigiu uma certa mudança de pensamento. </text:p>
      <text:p text:style-name="Standard">Ler os conceitos de matéria, forma, processo e significado dentro da visão sistêmica foi bem interessante. Separados, eles já são mais que conhecidos, mas quando aparecem na forma proposta, o tempo todo, eu tinha que ir e voltar para compreender como é a dinâmica da teoria. Interessante, que muito do que li já está no meu discurso cotidiano, mas na verdade sem muita reflexão de todas as implicações. </text:p>
      <text:p text:style-name="Standard">O que me facilitava um pouco era pensar na biologia e na proposta da agrofloresta, mas quando jogava para a dinâmica da vida/existência, o pensamento formado na dualidade ainda falava ou fala mais alto.</text:p>
      <text:p text:style-name="Standard">Como diz, a teoria, é uma total mudança de paradigma. Rsrss</text:p>
      <text:p text:style-name="Standard"/>
      <text:p text:style-name="Standard">A leitura da doutrina espírita com as lentes da visão sistêmica ficou muito clara, até porque essa é a tônica da sua fala e soou, para mim, muito "fácil" a compreensão. </text:p>
      <text:p text:style-name="Standard">Gostei muito da abordagem para a formação do Perispírito, ficou muito mais compreensível colocado por essa via de explicação. A abordagem da reencarnação é mais "consoladora" </text:p>
      <text:p text:style-name="Standard">(rsrs) e bonita de sentido do que a proposta pela maioria dos discursos que estamos acostumados a ouvir. </text:p>
      <text:p text:style-name="Standard"/>
      <text:p text:style-name="Standard">Quanto a construção da narrativa, no final da primeira parte eu senti um texto escrito pela IA. Nos outros dois não. </text:p>
      <text:p text:style-name="Standard"/>
      <text:p text:style-name="Standard">Bom, eu gostei muito.</text:p>
      <text:p text:style-name="Standard">Já vou buscar a leitura das obras do Fritjof Capra. Estou adiando essa leitura já faz um tempo. O seu livro me incentivou.</text:p>
      <text:p text:style-name="Standard">Vou fazer uma segunda leitura também. E nem preciso dizer que já podemos pensar em um grupo de estudos. </text:p>
      <text:p text:style-name="Standard">Rsrss</text:p>
      <text:p text:style-name="Standard">Um abraço.</text:p>
      <text:p text:style-name="Standard"/>
      <text:p text:style-name="Standard">Então, vou tentar escrever minhas impressões.</text:p>
      <text:p text:style-name="Standard"/>
      <text:p text:style-name="Standard">No texto sobre "A forma ", item "A complexidade das relações (p.25)</text:p>
      <text:p text:style-name="Standard">Senti falta de mais analogias com o cotidiano, o comum para melhor compreender a dinâmica. </text:p>
      <text:p text:style-name="Standard">Exemplo, como ocorreria uma bifurcação? Um "nó" daria origem a uma bifurcação, já que ele não interrompe uma rede? O nó poderia mudar a forma, mas não faz com que a forma perca sua identidade/essência, porém transforma?</text:p>
      <text:p text:style-name="Standard">Porque ocorre? </text:p>
      <text:p text:style-name="Standard">Um acidente? </text:p>
      <text:p text:style-name="Standard">É a propriedade emergente que surge nesse momento para "solucionar" um problema? </text:p>
      <text:p text:style-name="Standard">Aliás, há problemas para a visão sistêmica?</text:p>
      <text:p text:style-name="Standard"/>
      <text:p text:style-name="Standard">* " ... A forma não é uma moldura estática" (p.26) - haja grupo de estudo...</text:p>
      <text:p text:style-name="Standard">Tentei imaginar, mas não consegui, rsrss.</text:p>
      <text:p text:style-name="Standard"/>
      <text:p text:style-name="Standard">* Auto organização... (p.28)</text:p>
      <text:p text:style-name="Standard">Quais seriam as regras simples do comportamento dos animais?</text:p>
      <text:p text:style-name="Standard">Eu visualizo a imagem, mas como a regra é construída? Ela ocorre espontaneamente ou é aprendizado? </text:p>
      <text:p text:style-name="Standard">Está na constituição desses seres ou foi aprendizado? </text:p>
      <text:p text:style-name="Standard"><text:soft-page-break/>Seria essa regra uma propriedade emergente? </text:p>
      <text:p text:style-name="Standard">Se é emergente como e porque ela surge? </text:p>
      <text:p text:style-name="Standard">É parte de um princípio inteligente coletivo ou é o princípio inteligente constitutivo de cada um?</text:p>
      <text:p text:style-name="Standard"/>
      <text:p text:style-name="Standard">* Autopoiese (p.29) - é preciso muita leitura na fonte...</text:p>
      <text:p text:style-name="Standard">Achei difícil...</text:p>
      <text:p text:style-name="Standard"/>
      <text:p text:style-name="Standard">* Significado: mente e consciência </text:p>
      <text:p text:style-name="Standard">Essa foi a parte que achei mais "dura". Foi onde me pareceu uma "máquina" relatando, mesmo de forma relacional, os conceitos. Para mim, achei bem rígida a escrita. Foi o que mais tive dificuldade de ler. Voltava sempre, as páginas, para compreender minimamente a ideia.</text:p>
      <text:p text:style-name="Standard"/>
      <text:p text:style-name="Standard">O restante da obra achei mais tranquila, mas ainda requer muita leitura para começar a compreender e mudar o meu foco de visão. </text:p>
      <text:p text:style-name="Standard"/>
      <text:p text:style-name="Standard">Foi o que disse, muito das ideias estão presentes no meu discurso, mas percebi que tenho muito vazio de reflexã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0:59:20.410313343</meta:creation-date>
    <meta:generator>LibreOffice/25.2.4.3$Linux_X86_64 LibreOffice_project/520$Build-3</meta:generator>
    <dc:date>2025-07-27T11:00:01.118630085</dc:date>
    <meta:editing-duration>PT41S</meta:editing-duration>
    <meta:editing-cycles>1</meta:editing-cycles>
    <meta:document-statistic meta:table-count="0" meta:image-count="0" meta:object-count="0" meta:page-count="2" meta:paragraph-count="39" meta:word-count="589" meta:character-count="3478" meta:non-whitespace-character-count="2909"/>
  </office:meta>
</office:document-meta>
</file>