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fo:font-weight="normal" style:font-weight-asian="normal" style:font-weight-complex="normal"/>
    </style:style>
    <style:style style:name="P2" style:family="paragraph" style:parent-style-name="First_20_paragraph">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Heading_20_3">
      <style:text-properties fo:font-weight="normal" style:font-weight-asian="normal" style:font-weight-complex="normal"/>
    </style:style>
    <style:style style:name="P6" style:family="paragraph" style:parent-style-name="Text_20_body" style:list-style-name="L2">
      <style:text-properties fo:font-weight="normal" style:font-weight-asian="normal" style:font-weight-complex="normal"/>
    </style:style>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4">
      <style:text-properties fo:font-weight="normal" style:font-weight-asian="normal" style:font-weight-complex="normal"/>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6">
      <style:text-properties fo:font-weight="normal" style:font-weight-asian="normal" style:font-weight-complex="normal"/>
    </style:style>
    <style:style style:name="P11" style:family="paragraph" style:parent-style-name="Quotations">
      <style:paragraph-properties fo:margin-left="0.5in" fo:margin-right="0in" fo:text-indent="0in" style:auto-text-indent="false"/>
      <style:text-properties fo:font-weight="normal" style:font-weight-asian="normal" style:font-weight-complex="normal"/>
    </style:style>
    <style:style style:name="P12" style:family="paragraph" style:parent-style-name="Text_20_body" style:list-style-name="L7">
      <style:text-properties fo:font-weight="normal" style:font-weight-asian="normal" style:font-weight-complex="normal"/>
    </style:style>
    <style:style style:name="P13" style:family="paragraph" style:parent-style-name="Text_20_body" style:list-style-name="L8">
      <style:text-properties fo:font-weight="normal" style:font-weight-asian="normal" style:font-weight-complex="normal"/>
    </style:style>
    <style:style style:name="P14" style:family="paragraph" style:parent-style-name="Text_20_body" style:list-style-name="L9">
      <style:text-properties fo:font-weight="normal" style:font-weight-asian="normal" style:font-weight-complex="normal"/>
    </style:style>
    <style:style style:name="P15" style:family="paragraph" style:parent-style-name="Text_20_body" style:list-style-name="L10">
      <style:text-properties fo:font-weight="normal" style:font-weight-asian="normal" style:font-weight-complex="normal"/>
    </style:style>
    <style:style style:name="P16" style:family="paragraph" style:parent-style-name="Horizontal_20_Line">
      <style:text-properties fo:font-weight="normal" style:font-weight-asian="normal" style:font-weight-complex="normal"/>
    </style:style>
    <style:style style:name="P17" style:family="paragraph" style:parent-style-name="Text_20_body" style:list-style-name="L11">
      <style:text-properties fo:font-weight="normal" style:font-weight-asian="normal" style:font-weight-complex="normal"/>
    </style:style>
    <style:style style:name="P18" style:family="paragraph" style:parent-style-name="Text_20_body" style:list-style-name="L12">
      <style:text-properties fo:font-weight="normal" style:font-weight-asian="normal" style:font-weight-complex="normal"/>
    </style:style>
    <style:style style:name="P19" style:family="paragraph" style:parent-style-name="Text_20_body" style:list-style-name="L13">
      <style:text-properties fo:font-weight="normal" style:font-weight-asian="normal" style:font-weight-complex="normal"/>
    </style:style>
    <style:style style:name="P20" style:family="paragraph" style:parent-style-name="Text_20_body" style:list-style-name="L14">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16">
      <style:text-properties fo:font-weight="normal" style:font-weight-asian="normal" style:font-weight-complex="normal"/>
    </style:style>
    <style:style style:name="T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start text:name="prefácio"/>Prefácio<text:bookmark-end text:name="prefácio"/></text:h>
      <text:p text:style-name="P2">Esta monografia é fruto de uma experiência singular de construção de conhecimento: a colaboração entre um ser humano — idealizador das ideias e da estrutura geral da obra — e uma inteligência artificial baseada em um modelo de linguagem de larga escala (LLM, na sigla em inglês: <text:span text:style-name="T1">Large Language Model</text:span>). Ao longo do processo, o autor humano propôs os temas centrais, as divisões principais da obra, a sequência argumentativa e os objetivos conceituais. Coube à inteligência artificial a tarefa de desenvolver, redigir e organizar os textos a partir dessas diretrizes, sempre em diálogo com as referências bibliográficas fornecidas.</text:p>
      <text:p text:style-name="P3">Este trabalho não foi, portanto, escrito de forma tradicional. Ele é o resultado de uma interação dinâmica e iterativa, em que a inteligência artificial atuou como mediadora da expressão, colaboradora textual e estruturadora de raciocínios já delineados pelo autor humano. Trata-se de um exemplo prático de como essas novas ferramentas tecnológicas podem ser utilizadas para potencializar a expressão humana, não como substitutas da criatividade e da reflexão, mas como instrumentos de amplificação e organização do pensamento.</text:p>
      <text:p text:style-name="P3">A escolha de construir o texto dessa maneira foi deliberada, tanto por seu valor experimental quanto por seu caráter simbólico. A própria proposta da monografia — integrar a visão sistêmica e a Doutrina Espírita — exige abertura à inovação, ao diálogo entre paradigmas e à superação de dicotomias. Assim, a utilização de inteligência artificial na escrita é, ao mesmo tempo, uma escolha metodológica e uma metáfora viva daquilo que se deseja defender: a colaboração entre dimensões distintas do conhecimento, em favor de uma compreensão mais ampla, integrada e consciente da realidade.</text:p>
      <text:h text:style-name="P1" text:outline-level="2"><text:bookmark-start text:name="introdução"/>Introdução<text:bookmark-end text:name="introdução"/></text:h>
      <text:p text:style-name="P2">Esta monografia propõe um exercício de reflexão interdisciplinar e filosófica: explorar a possível articulação entre dois campos do conhecimento que, à primeira vista, pertencem a esferas distintas — o pensamento sistêmico, desenvolvido principalmente nas últimas décadas a partir das ciências da complexidade, e a Doutrina Espírita, codificada por Allan Kardec no século XIX. O que se busca aqui não é fundir artificialmente conceitos, mas identificar convergências estruturais, ampliar interpretações e propor um novo olhar sobre a espiritualidade à luz de paradigmas contemporâneos.</text:p>
      <text:p text:style-name="P3">O pensamento sistêmico é uma abordagem recente no panorama intelectual ocidental. Ele surgiu como uma reação crítica ao modelo mecanicista e reducionista que predominou desde o século XVII, e que influenciou profundamente não apenas a ciência, mas também a cultura, a educação, a economia e a filosofia. Em contraste com essa visão fragmentada, o paradigma sistêmico concebe a realidade como uma rede de processos interdependentes, dinâmicos e não-lineares, nos quais os fenômenos só podem ser compreendidos em relação ao todo de que fazem parte.</text:p>
      <text:p text:style-name="P3">Já a Doutrina Espírita foi elaborada em um contexto em que o racionalismo e o mecanicismo ainda dominavam o pensamento científico. Kardec buscou justamente dialogar com esse espírito da época, estruturando o Espiritismo como uma filosofia espiritualista, mas baseada na <text:soft-page-break/>observação, na lógica e na universalidade dos ensinos dos Espíritos. Embora sua proposta fosse pioneira ao integrar ciência e espiritualidade, ela inevitavelmente incorporou categorias e modelos próprios da visão cartesiana — como o dualismo substancial entre corpo e Espírito, ou a tendência à classificação linear da evolução espiritual.</text:p>
      <text:p text:style-name="P3">A proposta deste trabalho é revisitar a Doutrina Espírita à luz do pensamento sistêmico, sugerindo que seus princípios — especialmente a reencarnação, a evolução do Espírito, a comunicabilidade entre os mundos e as leis morais universais — podem ser reinterpretados e enriquecidos a partir de conceitos como emergência, auto-organização, redes de interdependência, padrões dinâmicos e coevolução. Essa leitura não tem a pretensão de esgotar os sentidos da doutrina, mas sim de ampliar sua inteligibilidade à luz dos avanços teóricos mais recentes sobre a vida, a mente e a consciência.</text:p>
      <text:p text:style-name="P3">É importante, contudo, destacar que o paradigma sistêmico ainda não é amplamente adotado nem mesmo dentro das próprias ciências. Muitos de seus fundamentos permanecem em construção, sujeitos a debates conceituais, validações experimentais e reformulações filosóficas. Trata-se, portanto, de um campo aberto, onde as fronteiras entre ciência, filosofia e espiritualidade ainda estão sendo redesenhadas. Da mesma forma, a própria proposta desta monografia deve ser entendida como um ponto de partida, não como um modelo acabado ou dogmático.</text:p>
      <text:p text:style-name="P3">O que se oferece aqui é uma contribuição exploratória, que busca pensar de maneira integrada e dinâmica duas visões que, apesar de distantes no tempo e na linguagem, compartilham um mesmo impulso: o de compreender o ser humano não como uma entidade isolada, mas como um ser espiritual em permanente relação com a totalidade da vida.</text:p>
      <text:h text:style-name="P1" text:outline-level="2"><text:bookmark-start text:name="apresentação-parte-1-pensamento-sistêmico"/>Apresentação – Parte 1: Pensamento Sistêmico<text:bookmark-end text:name="apresentação-parte-1-pensamento-sistêmico"/></text:h>
      <text:p text:style-name="P2">Esta primeira parte propõe uma inflexão epistemológica. Antes de abordar qualquer objeto de estudo específico, importa interrogar os fundamentos do próprio ato de conhecer. O modo como se constrói o saber, como se observam os fenômenos e como se estrutura a compreensão da realidade influencia decisivamente os resultados, as interpretações e as formas de agir sobre o mundo. O pensamento sistêmico, nesse contexto, emerge como uma alternativa crítica ao paradigma analítico dominante nas ciências ocidentais modernas.</text:p>
      <text:p text:style-name="P3">A tradição científica que se consolidou a partir dos séculos XVII e XVIII, ancorada na física clássica e no racionalismo cartesiano, baseia-se na decomposição dos fenômenos em partes elementares, na busca por relações causais lineares e na idealização de um observador neutro, exterior ao objeto. Esse modelo foi notavelmente eficaz em contextos estáticos ou linearmente previsíveis, mas mostra-se limitado diante dos sistemas complexos, adaptativos, auto-organizados e historicamente contingentes que caracterizam os fenômenos vivos, sociais e cognitivos.</text:p>
      <text:p text:style-name="P3">O pensamento sistêmico se estrutura como uma crítica a essas limitações e como uma proposta de reconstrução epistemológica. Em vez de partir da análise isolada das partes, ele privilegia o estudo das relações entre os elementos, dos padrões de organização, das propriedades emergentes e dos contextos dinâmicos em que os sistemas se constituem. Conhecer, nesse novo enquadre, é <text:soft-page-break/>mapear conexões, identificar estruturas de interação, perceber circularidades causais e acompanhar transformações ao longo do tempo.</text:p>
      <text:p text:style-name="P3">Essa reformulação afeta também a posição do sujeito cognoscente. O observador não é mais concebido como uma instância isolada e objetiva, mas como um participante do sistema observado. O conhecimento, assim, deixa de ser representação neutra de um mundo independente, para se tornar uma construção situada, relacional e provisória. Isso implica reconhecer os limites da linguagem, o papel da experiência e a inevitável mediação entre quem observa e o que é observado.</text:p>
      <text:p text:style-name="P3">Nos capítulos que seguem, são abordados os fundamentos e implicações dessa abordagem sistêmica: a crítica à linearidade e ao reducionismo, a noção de causalidade circular, os conceitos de rede, adaptação e autopoiese, o papel do observador nos sistemas complexos e a emergência como categoria fundamental. Tais conceitos não constituem apenas um novo vocabulário, mas expressam uma mudança profunda na maneira de pensar e interagir com o real.</text:p>
      <text:p text:style-name="P3">Adotar o pensamento sistêmico significa, portanto, deslocar o centro da epistemologia: de um saber centrado em entidades fixas e leis universais para uma compreensão que privilegia a dinâmica, a interdependência e a coemergência. Esse deslocamento não é apenas teórico; ele implica uma nova postura diante da complexidade do mundo, exigindo flexibilidade conceitual, abertura à incerteza e sensibilidade às inter-relações que sustentam a vida.</text:p>
      <text:h text:style-name="P1" text:outline-level="2"><text:bookmark-start text:name="o-que-são-sistemas"/>O que são sistemas?<text:bookmark-end text:name="o-que-são-sistemas"/></text:h>
      <text:p text:style-name="P2">A noção de “sistema” ocupa um papel central nas ciências contemporâneas e, especialmente, no chamado pensamento sistêmico. O termo, embora amplamente utilizado, exige precisão conceitual para que se possa distinguir a abordagem sistêmica de outras formas de raciocínio analítico. Em termos gerais, um sistema pode ser definido como um conjunto de elementos interconectados, organizados de maneira a formar um todo coerente, cuja estrutura e comportamento não podem ser plenamente compreendidos a partir da análise isolada de suas partes.</text:p>
      <text:p text:style-name="P3">Essa definição contrapõe-se à tradição do pensamento reducionista, que predominou nas ciências desde o século XVII com René Descartes, e que buscava compreender os fenômenos complexos decompondo-os em partes cada vez menores. O paradigma sistêmico, ao contrário, enfatiza a interdependência, a organização e os padrões de relacionamento entre os componentes, reconhecendo que o comportamento do sistema como um todo emerge dessas interações e não pode ser explicado apenas pela soma das propriedades individuais.</text:p>
      <text:p text:style-name="P3">Na formulação moderna do pensamento sistêmico, especialmente a partir da Teoria Geral dos Sistemas proposta por Ludwig von Bertalanffy, os sistemas são entendidos como estruturas abertas, que interagem com o ambiente por meio de fluxos de energia, matéria e informação. Esses sistemas mantêm-se organizados não pela rigidez, mas pela dinâmica autorregulada, que os mantém em equilíbrio através de mecanismos de retroalimentação (feedback).</text:p>
      <text:p text:style-name="P3">Os sistemas podem ser encontrados em múltiplas escalas e contextos: desde o nível biológico (uma célula, um organismo), até o ecológico (um ecossistema), social (uma comunidade ou <text:soft-page-break/>sociedade), tecnológico (uma rede de computadores), ou mesmo cognitivo (a mente humana). Todos esses sistemas compartilham propriedades comuns, como:</text:p>
      <text:list text:style-name="L1">
        <text:list-item>
          <text:p text:style-name="P4">Totalidade ou globalidade: o sistema deve ser compreendido como um todo integrado;</text:p>
        </text:list-item>
        <text:list-item>
          <text:p text:style-name="P4">Organização interna: a estrutura interna é o que determina a função e a identidade do sistema;</text:p>
        </text:list-item>
        <text:list-item>
          <text:p text:style-name="P4">Interdependência: nenhuma parte existe isoladamente; todas estão em relação mútua;</text:p>
        </text:list-item>
        <text:list-item>
          <text:p text:style-name="P4">Finalidade ou propósito: muitos sistemas exibem comportamentos orientados a metas;</text:p>
        </text:list-item>
        <text:list-item>
          <text:p text:style-name="P4">Capacidade adaptativa: especialmente nos sistemas vivos, há uma resposta ativa às mudanças ambientais.</text:p>
        </text:list-item>
      </text:list>
      <text:p text:style-name="P2">Fritjof Capra, um dos principais expoentes do pensamento sistêmico atual, enfatiza que a compreensão dos sistemas não se dá pela análise estática de suas partes, mas pela observação de seus padrões dinâmicos de organização. Em sua obra <text:span text:style-name="T1">A Teia da Vida</text:span>, Capra argumenta que os sistemas vivos são melhor compreendidos como redes de processos interligados, que mantêm a vida através de ciclos de retroalimentação, fluxos de energia e trocas simbióticas com o ambiente.</text:p>
      <text:p text:style-name="P3">A compreensão sistêmica, portanto, exige uma mudança epistemológica: trata-se de ver o mundo em termos de relações, processos e padrões organizacionais, em lugar de entidades isoladas e linearidade causal. Ao adotar essa abordagem, somos capazes de lidar melhor com a complexidade da realidade, especialmente em domínios onde múltiplas variáveis interagem de modo dinâmico e não previsível.</text:p>
      <text:p text:style-name="P3">Assim, iniciar o estudo da visão sistêmica exige reconhecer o conceito de sistema como unidade básica de organização e compreensão da realidade, fundamento indispensável para os capítulos seguintes desta monografia.</text:p>
      <text:h text:style-name="P5" text:outline-level="3"><text:bookmark-start text:name="a-estrutura-e-o-comportamento-dos-sistemas"/>A estrutura e o comportamento dos sistemas<text:bookmark-end text:name="a-estrutura-e-o-comportamento-dos-sistemas"/></text:h>
      <text:p text:style-name="P2">De forma mais técnica, um sistema pode ser descrito por três elementos centrais: elementos, relações e organização. Os elementos constituem os componentes físicos ou lógicos do sistema (órgãos, células, pessoas, máquinas, ideias). As relações são as conexões entre esses elementos, que podem ser estruturais, funcionais, simbólicas ou energéticas. A organização é o padrão dessas relações — aquilo que confere identidade, coesão e propósito ao conjunto.</text:p>
      <text:p text:style-name="P3">Como explicam Capra e Luisi, “os sistemas vivos são redes auto-organizadas de componentes interconectados”, cujo comportamento é regido não apenas pela presença dos elementos, mas pela configuração relacional que os une. Em outras palavras, o sistema é definido mais pela qualidade das interações do que pela natureza de seus componentes isolados.</text:p>
      <text:p text:style-name="P3">Essa ênfase na organização é o que permite compreender fenômenos como a emergência (abordada em capítulo posterior), onde propriedades novas e inesperadas surgem do todo sem estarem presentes nas partes. Por exemplo, nenhuma molécula isolada do cérebro tem a <text:soft-page-break/>propriedade da consciência, mas o sistema neural como um todo pode manifestá-la.</text:p>
      <text:h text:style-name="P5" text:outline-level="3"><text:bookmark-start text:name="sistemas-vivos-e-sistemas-mecânicos"/>Sistemas vivos e sistemas mecânicos<text:bookmark-end text:name="sistemas-vivos-e-sistemas-mecânicos"/></text:h>
      <text:p text:style-name="P2">É importante distinguir entre sistemas vivos e sistemas não vivos ou mecânicos. Enquanto os sistemas mecânicos (como um relógio ou um motor) operam segundo regras fixas e previsíveis, os sistemas vivos são complexos, adaptativos e historicamente determinados. Eles têm capacidade de autopoiese (autoprodução), mantêm fronteiras por meio da interação com o ambiente, e desenvolvem trajetórias evolutivas únicas.</text:p>
      <text:p text:style-name="P3">A vida, nessa perspectiva, não é uma substância, mas um processo de organização sistêmica: uma rede de relações em constante fluxo. Essa compreensão é central para o paradigma sistêmico e tem profundas implicações não apenas na biologia, mas também na psicologia, na sociologia e na espiritualidade.</text:p>
      <text:h text:style-name="P5" text:outline-level="3"><text:bookmark-start text:name="a-importância-da-perspectiva-sistêmica"/>A importância da perspectiva sistêmica<text:bookmark-end text:name="a-importância-da-perspectiva-sistêmica"/></text:h>
      <text:p text:style-name="P2">A adoção de uma perspectiva sistêmica não é apenas uma questão metodológica, mas também ética e cultural. Ao reconhecer que tudo está interligado — que nossas ações afetam o ambiente, que nossas decisões reverberam em redes sociais, que o corpo, a mente e o mundo formam um único campo de relações — tornamo-nos mais conscientes da responsabilidade compartilhada pela manutenção da vida.</text:p>
      <text:p text:style-name="P3">Como afirma Capra, “compreender a vida significa reconhecer que a sustentabilidade dos sistemas humanos está condicionada à nossa capacidade de atuar de forma integrada com os sistemas naturais dos quais fazemos parte”.</text:p>
      <text:h text:style-name="P1" text:outline-level="2"><text:bookmark-start text:name="o-pensamento-sistêmico"/>O Pensamento Sistêmico<text:bookmark-end text:name="o-pensamento-sistêmico"/></text:h>
      <text:p text:style-name="P2">O pensamento sistêmico, também denominado pensamento holístico, constitui uma mudança paradigmática no modo como o ser humano interpreta a realidade. Em contraste com o paradigma mecanicista – que dominou a ciência ocidental desde o século XVII –, essa nova abordagem propõe uma compreensão baseada na totalidade, na interdependência e nos padrões organizacionais dos fenômenos vivos. Trata-se não apenas de um avanço metodológico, mas de uma profunda virada epistemológica, cujos efeitos se estendem da ciência à ética, da filosofia à espiritualidade.</text:p>
      <text:p text:style-name="P3">A palavra “holístico”, oriunda do grego <text:span text:style-name="T1">holos</text:span>, que significa “inteiro”, expressa bem essa transformação: conhecer não é mais decompor e isolar, mas sim compreender o todo em sua dinâmica relacional. Assim, o pensamento sistêmico não rejeita a análise, mas recusa a crença de que o conhecimento se esgota na dissecação dos elementos. O foco desloca-se das entidades isoladas para os padrões de organização e de relação, abrindo espaço para uma ciência que reconhece a complexidade, a subjetividade e a interconexão como elementos constitutivos da realidade.</text:p>
      <text:h text:style-name="P5" text:outline-level="3"><text:bookmark-start text:name="a-crise-do-paradigma-mecanicista"/><text:soft-page-break/>A crise do paradigma mecanicista<text:bookmark-end text:name="a-crise-do-paradigma-mecanicista"/></text:h>
      <text:p text:style-name="P2">Desde René Descartes e Isaac Newton, a ciência moderna se apoiou em três pilares: o reducionismo, o dualismo e o racionalismo extremo. A natureza era concebida como uma máquina, regida por leis fixas, previsíveis e lineares. Esse modelo produziu avanços extraordinários no conhecimento físico e tecnológico, mas mostrou-se insuficiente para lidar com a complexidade dos sistemas vivos, da mente humana, dos ecossistemas e das interações sociais. Como apontam Capra e Luisi, a ciência mecanicista ignorou aspectos relacionais, subjetivos e contextuais da vida, contribuindo para a fragmentação do saber e para uma cultura de dominação da natureza.</text:p>
      <text:p text:style-name="P3">Nas últimas décadas, esse modelo começou a ser questionado por diversas áreas do conhecimento. A física quântica revelou a inseparabilidade entre observador e observado; a biologia passou a compreender os organismos como redes auto-organizadas; a ecologia demonstrou que a estabilidade dos sistemas naturais depende de relações de equilíbrio dinâmico e retroalimentação. Esses desenvolvimentos prepararam o terreno para a emergência do pensamento sistêmico, como uma forma mais adequada de lidar com a complexidade real da vida.</text:p>
      <text:h text:style-name="P5" text:outline-level="3"><text:bookmark-start text:name="pensar-em-rede-padrões-relações-e-processos"/>Pensar em rede: padrões, relações e processos<text:bookmark-end text:name="pensar-em-rede-padrões-relações-e-processos"/></text:h>
      <text:p text:style-name="P2">O pensamento sistêmico se estrutura a partir de três eixos fundamentais: contexto, relação e processo. Em vez de perguntar “do que é feito?”, a abordagem sistêmica pergunta “como isso se organiza?”, “com o que se conecta?” e “como se transforma?”. A rede, e não mais a máquina, torna-se a metáfora central. Sistemas vivos — desde células até sociedades — são compreendidos como redes de produção, transformação e regulação, capazes de se reorganizar continuamente em resposta ao ambiente.</text:p>
      <text:p text:style-name="P3">Capra descreve essa mudança como uma transição de uma epistemologia da separação para uma epistemologia da participação. O observador não é mais neutro nem externo ao fenômeno: ele faz parte da rede que observa, e seu ato de conhecer modifica o sistema. Isso implica uma ciência mais reflexiva, sensível aos seus próprios pressupostos, e capaz de integrar dados objetivos com a experiência vivida.</text:p>
      <text:p text:style-name="P3">Além disso, o pensamento sistêmico valoriza a causalidade circular, a retroalimentação e a emergência. Em vez de relações lineares e unidimensionais, ele trabalha com ciclos, interações simultâneas e propriedades emergentes — isto é, características do sistema que não podem ser reduzidas às suas partes isoladas. A vida, portanto, é vista como um fenômeno coletivo, processual e auto-organizado.</text:p>
      <text:h text:style-name="P5" text:outline-level="3"><text:bookmark-start text:name="implicações-epistemológicas-e-culturais"/>Implicações epistemológicas e culturais<text:bookmark-end text:name="implicações-epistemológicas-e-culturais"/></text:h>
      <text:p text:style-name="P2">A adoção da visão sistêmica implica uma profunda reformulação da própria ideia de conhecimento. Em lugar de uma razão fragmentada, baseada na objetividade absoluta e na compartimentação disciplinar, emerge uma racionalidade relacional, ecológica e transdisciplinar. <text:soft-page-break/>A verdade deixa de ser uma correspondência exata entre representação e objeto, e passa a ser entendida como coerência contextual entre padrões de relação, organização e significado.</text:p>
      <text:p text:style-name="P3">Isso tem implicações diretas na educação, que passa a priorizar não apenas a transmissão de conteúdos, mas a capacidade de pensar em contextos, reconhecer padrões e agir de forma ética em redes complexas. Também afeta a política, que deixa de ser mera administração de interesses fragmentados, para tornar-se um campo de negociação interdependente entre comunidades, culturas e ecossistemas.</text:p>
      <text:p text:style-name="P3">Na economia, o paradigma sistêmico questiona os modelos extrativistas e competitivos, propondo formas de produção e distribuição baseadas em cooperação, circularidade e sustentabilidade. E na ética, ele redefine o bem não como um valor absoluto ou abstrato, mas como o que favorece a harmonia das relações, a coesão dos sistemas e a manutenção da vida em sua diversidade.</text:p>
      <text:h text:style-name="P5" text:outline-level="3"><text:bookmark-start text:name="ciência-com-consciência-a-espiritualidade-como-dimensão-da-complexidade"/>Ciência com consciência: a espiritualidade como dimensão da complexidade<text:bookmark-end text:name="ciência-com-consciência-a-espiritualidade-como-dimensão-da-complexidade"/></text:h>
      <text:p text:style-name="P2">Ao propor uma ciência mais reflexiva e integradora, o pensamento sistêmico abre também espaço para um diálogo renovado com a espiritualidade. Não se trata de um retorno a crenças dogmáticas, mas do reconhecimento de que a experiência espiritual pode oferecer uma compreensão legítima da interconexão da vida, do sentido existencial e da ética relacional. Isso é particularmente relevante quando se considera que muitas tradições espirituais – como o Taoísmo, o Budismo e o próprio Espiritismo – já sustentavam uma visão integrada do ser humano e do cosmos.</text:p>
      <text:p text:style-name="P3">A espiritualidade, nesse contexto, não é uma instância separada da razão, mas uma dimensão profunda da complexidade vivida. Ela nos lembra que conhecer é também transformar-se, que a sabedoria envolve não apenas o saber, mas o cuidado, e que a verdadeira inteligência é aquela que integra, cura e orienta para a totalidade.</text:p>
      <text:p text:style-name="P3">Capra e Luisi, ao discutirem os limites da ciência mecanicista, afirmam que a nova visão sistêmica do mundo requer uma “ciência com consciência” – uma forma de saber que reconheça a interdependência de todos os seres e a responsabilidade do conhecimento frente ao bem comum. Essa proposta ressoa com o ideal espírita de uma razão moralizada, capaz de investigar com lucidez, mas também de servir com compaixão.</text:p>
      <text:h text:style-name="P5" text:outline-level="3"><text:bookmark-start text:name="conclusão-uma-nova-forma-de-pensar-agir-e-existir"/>Conclusão: uma nova forma de pensar, agir e existir<text:bookmark-end text:name="conclusão-uma-nova-forma-de-pensar-agir-e-existir"/></text:h>
      <text:p text:style-name="P2">Em síntese, o pensamento sistêmico representa mais do que uma nova teoria científica: é um novo modo de ver e viver o mundo, fundamentado na conexão, na interdependência e na complexidade. Ele nos convida a superar a ilusão da separação — entre sujeito e objeto, entre razão e emoção, entre ciência e espiritualidade — e a construir uma cultura baseada na colaboração, na responsabilidade e no cuidado com a vida.</text:p>
      <text:p text:style-name="P3">Ao reorientar a ciência para um paradigma mais relacional, o pensamento sistêmico recupera o <text:soft-page-break/>sentido ético e existencial do conhecimento, e oferece um caminho fecundo para enfrentar os desafios contemporâneos com inteligência, sensibilidade e integridade. Nesse sentido, ele não apenas complementa, mas aprofunda a proposta da Doutrina Espírita, ao oferecer uma base conceitual ampliada para compreender o Espírito, a vida e o cosmos como partes de uma única rede em evolução.</text:p>
      <text:h text:style-name="P1" text:outline-level="2"><text:bookmark-start text:name="da-análise-à-síntese"/>Da Análise à Síntese<text:bookmark-end text:name="da-análise-à-síntese"/></text:h>
      <text:p text:style-name="P2">A transição do pensamento mecanicista para o pensamento sistêmico representa uma das mais significativas mudanças epistemológicas da modernidade. No coração dessa transição está a inversão da lógica tradicional que buscava compreender o todo a partir da análise de suas partes. O pensamento sistêmico propõe o oposto: é o todo que confere sentido às partes. Essa mudança reflete não apenas uma reorientação metodológica, mas uma nova forma de conceber a realidade e nossa posição como observadores e participantes dela.</text:p>
      <text:p text:style-name="P3">Durante séculos, a ciência moderna, herdeira do racionalismo cartesiano, privilegiou a análise como método primário de investigação. Conhecer era decompor. Compreender um organismo, uma instituição ou um fenômeno natural significava fragmentá-lo, isolar variáveis, eliminar interferências contextuais e operar sobre elementos individualizados. Esse método mostrou-se altamente eficaz em sistemas simples, como os estudados pela física clássica, mas tornou-se cada vez mais limitado diante dos sistemas vivos, sociais e cognitivos, cuja complexidade relacional exige outro tipo de abordagem.</text:p>
      <text:p text:style-name="P3">O pensamento sistêmico surge como uma resposta a essas limitações. Ao invés de partir da substância, ele parte do padrão; ao invés de privilegiar o objeto, foca na relação. Como destacam Fritjof Capra e Pier Luigi Luisi em <text:span text:style-name="T1">A Visão Sistêmica da Vida</text:span>, compreender a vida exige compreender as interações, os fluxos, os processos e as redes que sustentam a existência. Em sistemas complexos, como o corpo humano, um ecossistema ou uma rede social, as propriedades do todo não podem ser previstas a partir das propriedades das partes — elas emergem da organização e da dinâmica do sistema como um todo.</text:p>
      <text:p text:style-name="P3">Esse princípio da não-somatividade — de que o todo é mais do que a soma de suas partes — é central na abordagem sistêmica. Por exemplo, uma célula viva não é meramente um conjunto de moléculas; seu funcionamento só pode ser entendido em termos da organização interativa dessas moléculas. Da mesma forma, o comportamento de uma comunidade não é redutível às ações de seus membros individuais, mas depende das normas, relações, memórias coletivas e fluxos de influência que operam em rede.</text:p>
      <text:p text:style-name="P3">Essa mudança de perspectiva, além de epistemológica, é também metodológica. O foco desloca-se da identificação de causas lineares para o mapeamento de padrões relacionais, causalidades circulares e propriedades emergentes. Isso exige ferramentas que vão além da matemática linear tradicional, como diagramas de redes, modelos de simulação e formas de raciocínio contextual e qualitativo. Trata-se de reconhecer que o contexto é constitutivo do fenômeno — não um ruído a ser eliminado, mas um elemento essencial para sua inteligibilidade.</text:p>
      <text:p text:style-name="P3">A contraposição entre análise e síntese está, portanto, no cerne da crítica sistêmica ao <text:soft-page-break/>reducionismo. Enquanto a análise fragmenta, a síntese reconecta. Analisar é necessário, mas torna-se insuficiente quando operada isoladamente. A síntese — entendida não como mera soma, mas como leitura dos padrões que organizam as relações — é condição para a compreensão plena de fenômenos complexos.</text:p>
      <text:p text:style-name="P3">Essa distinção tem importantes implicações na prática científica, educacional e cultural. Na medicina, por exemplo, o modelo analítico trata sintomas isoladamente, muitas vezes sem considerar o organismo como um todo ou seu contexto de vida. Em contraste, a medicina sistêmica — como a medicina integrativa ou a medicina chinesa — vê a doença como um desequilíbrio relacional, considerando não apenas órgãos, mas também emoções, ambiente e padrões de comportamento.</text:p>
      <text:p text:style-name="P3">Na educação, o currículo tradicional baseado em disciplinas compartimentalizadas torna-se obsoleto diante da necessidade de formar pessoas capazes de pensar de forma contextual, crítica e interconectada. A abordagem sistêmica propõe métodos interdisciplinares, projetos integradores e aprendizagens baseadas em problemas reais, promovendo não apenas o acúmulo de informações, mas a formação de uma inteligência relacional e ética.</text:p>
      <text:p text:style-name="P3">A crítica sistêmica ao reducionismo também atinge a filosofia da ciência. Capra e Luisi argumentam que a biologia molecular, embora tenha produzido um inventário detalhado dos componentes da vida, falha em explicar como esses componentes interagem para formar um sistema vivo. É a biologia de sistemas que começa a revelar essas interações, indicando que o conhecimento precisa tornar-se mais processual, contextual e histórico.</text:p>
      <text:p text:style-name="P3">Essa transformação implica uma mudança ontológica: do primado dos objetos para o primado das relações. Em vez de assumir que as entidades existem independentemente e interagem posteriormente, o pensamento sistêmico propõe que a identidade das partes emerge de suas posições e funções dentro da rede à qual pertencem. A ontologia clássica, centrada na substância, dá lugar a uma ontologia relacional, em que o ser é compreendido como fluxo, processo e padrão dinâmico.</text:p>
      <text:p text:style-name="P3">Essa visão tem implicações éticas profundas. Ao considerar que todos os fenômenos estão interligados, a abordagem sistêmica convida a uma postura mais humilde, mais cooperativa e mais responsável. O conhecimento deixa de ser instrumento de domínio e passa a ser ferramenta de compreensão e transformação relacional. Pensar o todo é reconhecer que nossas escolhas afetam não apenas a nós mesmos, mas toda a rede à qual pertencemos.</text:p>
      <text:p text:style-name="P3">Nesse sentido, a síntese é também uma prática ética: ela nos exige considerar os efeitos de longo prazo, integrar diferentes perspectivas, reconhecer a complexidade dos contextos e buscar soluções que promovam harmonia, equilíbrio e sustentabilidade. Como afirma Capra, a visão sistêmica é “não apenas uma nova forma de pensar a ciência, mas uma nova forma de compreender a vida e nosso lugar no mundo”.</text:p>
      <text:p text:style-name="P3">A passagem da análise para a síntese, da parte para o todo, da substância para o padrão, marca, portanto, uma inflexão civilizatória. Trata-se de um novo modelo de racionalidade, mais atento à vida, mais aberto à pluralidade e mais sintonizado com a complexidade do real. Essa racionalidade não exclui a razão clássica, mas a transcende e a integra, operando em múltiplos <text:soft-page-break/>níveis de significação e promovendo um conhecimento que é, ao mesmo tempo, técnico, ecológico, simbólico e espiritual.</text:p>
      <text:h text:style-name="P1" text:outline-level="2"><text:bookmark-start text:name="a-visão-em-rede"/>A visão em rede<text:bookmark-end text:name="a-visão-em-rede"/></text:h>
      <text:p text:style-name="P2">Uma das expressões mais emblemáticas do pensamento sistêmico é a afirmação de que tudo está conectado. Essa ideia, longe de ser apenas uma metáfora poética, é o resultado direto da compreensão científica e filosófica de que a realidade é composta por redes de relações. No lugar de entidades isoladas ou linhas causais simples, o mundo aparece como um entrelaçamento de interações, reciprocidades e fluxos contínuos entre sistemas vivos, sociais, ecológicos e até mesmo mentais.</text:p>
      <text:p text:style-name="P3">A metáfora da rede é central na abordagem sistêmica. Em contraste com a estrutura linear e hierárquica da ciência tradicional, as redes expressam interdependência, descentralização e circularidade. Numa rede, cada elemento (ou nó) só pode ser entendido a partir de suas conexões com os demais. Essa concepção rompe com a lógica de causa e efeito lineares e nos leva a pensar em relações de co-emergência, onde os efeitos são simultaneamente causas e as estruturas são moldadas por processos dinâmicos.</text:p>
      <text:p text:style-name="P3">Na biologia, por exemplo, as redes metabólicas, as redes de proteínas, as redes de sinalização celular e os ecossistemas representam sistemas complexos cujo funcionamento depende da qualidade das conexões entre os elementos, e não apenas da presença ou ausência de componentes específicos. A própria vida, conforme argumenta Fritjof Capra, pode ser descrita como uma rede de processos de autopoiese – isto é, processos de auto-produção e auto-organização em constante interação com o ambiente.</text:p>
      <text:p text:style-name="P3">A noção de rede é, portanto, mais do que uma representação gráfica ou uma metáfora didática. Trata-se de um modelo epistemológico e ontológico que expressa como o mundo realmente opera. Como explicam Capra e Luisi, os sistemas vivos, desde as células até os ecossistemas, são compostos por redes de componentes que interagem e se organizam em função de regras internas de conexão. Esses componentes não são fixos, mas sim processos: fluxos de matéria, energia e informação que se sustentam mutuamente.</text:p>
      <text:p text:style-name="P3">As redes também estão presentes em dimensões cognitivas e sociais. O cérebro humano funciona como uma intricada rede de neurônios e sinapses, cuja plasticidade permite aprendizado, adaptação e criatividade. As sociedades humanas são compostas por redes de relações interpessoais, culturais e institucionais, onde o comportamento coletivo emerge da interação entre indivíduos, grupos e estruturas simbólicas. Em ambos os casos, o foco sistêmico está nas relações e nos padrões, não nos elementos isolados.</text:p>
      <text:p text:style-name="P3">Essa visão relacional da realidade transforma profundamente a maneira como nos posicionamos no mundo. Se tudo está conectado, então nossas ações – individuais e coletivas – têm consequências que reverberam além do imediato e do visível. Essa consciência relacional fundamenta uma ética ecológica e social baseada na responsabilidade mútua, na cooperação e na solidariedade.</text:p>
      <text:p text:style-name="P3">Além disso, a visão em rede permite compreender a resiliência e a fragilidade dos sistemas. <text:soft-page-break/>Redes bem conectadas tendem a ser mais adaptáveis, pois podem redistribuir tensões e resistir a falhas localizadas. Por outro lado, redes excessivamente concentradas ou com poucos pontos de interconexão estão mais sujeitas ao colapso. Esse princípio tem aplicações práticas em áreas como economia, governança, tecnologia, saúde pública e ecologia.</text:p>
      <text:p text:style-name="P3">Por exemplo, um ecossistema com alta biodiversidade – isto é, com muitas espécies interconectadas por relações simbióticas e alimentares – é mais resiliente a perturbações ambientais do que um ecossistema simplificado por monoculturas. Da mesma forma, uma rede social com laços múltiplos e variados tende a ser mais criativa, sustentável e democrática do que uma rede hierárquica e rígida.</text:p>
      <text:p text:style-name="P3">Do ponto de vista epistemológico, a visão relacional desafia o individualismo cognitivo. O conhecimento não é mais visto como algo produzido por um sujeito isolado, mas como o resultado de uma construção coletiva, situada em redes simbólicas e sociais. Isso abre espaço para práticas interdisciplinares, diálogo de saberes e abordagens integrativas da educação, da ciência e da cultura.</text:p>
      <text:p text:style-name="P3">A metáfora da rede permite ainda reinterpretar conceitos clássicos sob uma nova ótica. Por exemplo, a noção de identidade deixa de ser entendida como essência isolada e passa a ser definida pelas relações que um sistema mantém com outros sistemas. Isso vale para indivíduos, organismos, instituições e até mesmo para ideias e valores.</text:p>
      <text:p text:style-name="P3">Essa perspectiva também tem afinidades com diversas tradições filosóficas e espirituais, que há muito afirmam a interdependência de todos os seres. O pensamento budista, por exemplo, fala da “originação dependente”, segundo a qual nenhum fenômeno existe por si só, mas apenas em relação aos demais. O pensamento sistêmico, ao recuperar e validar essa visão à luz da ciência contemporânea, oferece uma ponte entre razão e espiritualidade.</text:p>
      <text:p text:style-name="P3">Por fim, vale destacar que a noção de rede está na base da teoria da complexidade e da emergência. Padrões complexos, como a consciência, o comportamento coletivo ou a evolução, não são explicáveis por componentes isolados, mas emergem de redes de interação. A propriedade emergente de um sistema é, em última instância, uma propriedade da rede como um todo – o que será aprofundado nos próximos capítulos.</text:p>
      <text:p text:style-name="P3">Em síntese, ao afirmar que tudo está conectado, o pensamento sistêmico nos convida a enxergar a vida como uma trama de relações vivas, dinâmicas e interdependentes, onde cada ser, cada ato e cada escolha participa da constituição do todo. Essa perspectiva relacional não apenas transforma a ciência, mas também a forma como habitamos o mundo, nos relacionamos com os outros e construímos sentido para nossa existência.</text:p>
      <text:h text:style-name="P1" text:outline-level="2"><text:bookmark-start text:name="emergência-auto-organização-e-padrões"/>Emergência, Auto-Organização e Padrões<text:bookmark-end text:name="emergência-auto-organização-e-padrões"/></text:h>
      <text:p text:style-name="P2">O pensamento sistêmico oferece uma chave poderosa para compreender a complexidade da vida ao introduzir conceitos que vão além da linearidade e da previsibilidade, características do paradigma mecanicista. Entre esses conceitos, destacam-se três noções interligadas e fundamentais: emergência, auto-organização e padrões. Juntas, elas revelam que a vida não é um sistema de engrenagens pré-determinadas, mas um processo dinâmico, criativo e em constante <text:soft-page-break/>transformação, sustentado por relações e estruturas que surgem de forma espontânea e integrada.</text:p>
      <text:h text:style-name="P5" text:outline-level="3"><text:bookmark-start text:name="a-emergência-quando-o-todo-cria-o-novo"/>A emergência: quando o todo cria o novo<text:bookmark-end text:name="a-emergência-quando-o-todo-cria-o-novo"/></text:h>
      <text:p text:style-name="P2">A emergência é definida como o surgimento de propriedades, comportamentos ou estruturas que não estão presentes nas partes isoladas, mas resultam da organização e interação entre essas partes. Trata-se de um fenômeno radical que expressa a ideia de que o todo é mais - e diferente - do que a soma de suas partes. Em sistemas complexos, a emergência ocorre quando a interação entre os componentes atinge um certo limiar de organização, permitindo que novas qualidades surjam espontaneamente.</text:p>
      <text:p text:style-name="P3">Um exemplo emblemático é a mente humana: nenhum neurônio individual possui consciência, mas quando bilhões de neurônios interagem, propriedades mentais como linguagem, intencionalidade e memória emergem. O mesmo ocorre com cardumes, enxames, economias, culturas e até mesmo com a própria vida – que surge da interação entre moléculas que, individualmente, não são vivas.</text:p>
      <text:p text:style-name="P3">Fritjof Capra e Pier Luigi Luisi destacam que tais propriedades emergentes não são aleatórias. Elas surgem a partir de regras locais simples, cuja multiplicação e interconexão produzem padrões globais inesperados. Isso exige uma nova abordagem epistemológica, pois as propriedades emergentes não podem ser previstas a partir da decomposição analítica do sistema. A causalidade, nesse contexto, deixa de ser linear para tornar-se circular, distribuída e dependente do contexto.</text:p>
      <text:h text:style-name="P5" text:outline-level="3"><text:bookmark-start text:name="a-auto-organização-ordem-que-nasce-de-dentro"/>A auto-organização: ordem que nasce de dentro<text:bookmark-end text:name="a-auto-organização-ordem-que-nasce-de-dentro"/></text:h>
      <text:p text:style-name="P2">A emergência está intrinsecamente ligada à auto-organização, isto é, à capacidade de sistemas complexos de gerar ordem interna sem intervenção externa centralizada. Esse conceito rompe com a tradição mecanicista, que atribuía toda organização a um projeto externo. Em vez disso, a auto-organização mostra que a ordem pode emergir do caos, desde que existam interações locais entre elementos e abertura para trocas com o ambiente.</text:p>
      <text:p text:style-name="P3">A teoria das estruturas dissipativas, desenvolvida por Ilya Prigogine, foi uma das primeiras a mostrar que sistemas abertos podem se reorganizar em níveis mais altos de complexidade ao interagir com seu ambiente. Longe de ser um obstáculo, o caos e a entropia se tornam matéria-prima para a criação de formas novas, demonstrando que o universo é, em si, um processo criativo.</text:p>
      <text:p text:style-name="P3">Na biologia, essa dinâmica se manifesta desde o surgimento da vida até a formação de órgãos, sistemas nervosos e redes metabólicas. Na sociedade, ela se revela na construção espontânea de mercados, linguagens, normas e culturas. Em todos os casos, os sistemas se mantêm por meio da reprodução contínua de si mesmos, em um processo chamado autopoiese, conceito central elaborado por Humberto Maturana e Francisco Varela.</text:p>
      <text:h text:style-name="P5" text:outline-level="3"><text:bookmark-start text:name="autopoiese-a-vida-como-produção-de-si"/><text:soft-page-break/>Autopoiese: a vida como produção de si<text:bookmark-end text:name="autopoiese-a-vida-como-produção-de-si"/></text:h>
      <text:p text:style-name="P2">A autopoiese define os seres vivos como sistemas autoproduzidos: sua organização é mantida por redes de processos que regeneram continuamente seus próprios componentes. Um organismo não é apenas algo que vive – é algo que se produz enquanto vive. Essa visão desloca o foco do conteúdo material para o padrão de organização relacional, fazendo da vida não uma substância, mas um processo.</text:p>
      <text:p text:style-name="P3">Essa compreensão é revolucionária porque mostra que a vida não é imposta, mas emerge e se mantém por meio de relações internas dinâmicas, continuamente em interação com o ambiente. Os organismos não são estruturas fixas, mas sistemas em fluxo, constantemente atualizando sua forma, trocando energia, matéria e informação com o meio.</text:p>
      <text:p text:style-name="P3">Esse modelo também tem implicações práticas. Em vez de buscar controlar os sistemas, o pensamento sistêmico propõe criar condições favoráveis para que a auto-organização aconteça. Isso vale para educação, saúde, gestão e política. Organizações humanas, por exemplo, tornam-se mais resilientes e adaptativas quando operam em redes descentralizadas, baseadas em confiança, autonomia e propósito comum.</text:p>
      <text:h text:style-name="P5" text:outline-level="3"><text:bookmark-start text:name="o-papel-dos-padrões-na-organização-da-vida"/>O papel dos padrões na organização da vida<text:bookmark-end text:name="o-papel-dos-padrões-na-organização-da-vida"/></text:h>
      <text:p text:style-name="P2">Ao lado da emergência e da auto-organização, o pensamento sistêmico destaca a importância dos padrões como forma de reconhecimento e organização da complexidade. A vida, longe de ser caótica, expressa regularidades estruturais e comportamentais que se repetem em diferentes escalas. Tais padrões, longe de serem apenas estéticos, revelam a lógica profunda dos sistemas vivos.</text:p>
      <text:p text:style-name="P3">Capra diferencia dois tipos de padrões: os de organização, que referem-se à estrutura das conexões (como redes alimentares, sinapses, fluxos econômicos); e os de comportamento, que se referem à dinâmica temporal (como ciclos, pulsações, oscilações). Na natureza, esses padrões aparecem em formações geológicas, nos corpos celestes, nas redes neuronais, nas rotas migratórias, nas florestas e nos ritmos hormonais dos organismos.</text:p>
      <text:p text:style-name="P3">Na biologia, por exemplo, os padrões de regulação gênica, as redes metabólicas e os circuitos de retroalimentação são o que sustentam a vida. A biologia de sistemas mapeia essas redes, demonstrando que a compreensão da vida depende menos dos “blocos” (como genes ou proteínas isoladas) e mais das relações e interações entre eles.</text:p>
      <text:p text:style-name="P3">Na cognição humana, reconhecer padrões é essencial para a aprendizagem, a memória, a linguagem e a criatividade. O cérebro aprende identificando regularidades e comparando-as com experiências anteriores. O pensamento crítico e o raciocínio complexo exigem essa capacidade de perceber conexões não óbvias, de ver “a forma por trás da informação”.</text:p>
      <text:h text:style-name="P5" text:outline-level="3"><text:bookmark-start text:name="padrões-estética-e-significado"/>Padrões, estética e significado<text:bookmark-end text:name="padrões-estética-e-significado"/></text:h>
      <text:p text:style-name="P2">Os padrões também atravessam a estética, a espiritualidade e a cultura. Na música, na arte, na <text:soft-page-break/>arquitetura e nas tradições religiosas, o ser humano codifica e comunica significados por meio de formas recorrentes. Mandalas, fractais, ornamentos, harmonias e ritmos expressam a busca por ordem, coerência e unidade. A beleza, nesse contexto, é o nome que damos à harmonia dos padrões – uma harmonia que ressoa com nossa percepção interna e com as estruturas da natureza.</text:p>
      <text:p text:style-name="P3">Gregory Bateson, importante autor sistêmico, argumentava que o belo, o verdadeiro e o vivo estão ligados pela presença de padrões que conectam. A educação estética, nesse sentido, é também uma forma de alfabetização sistêmica: ensina a perceber conexões, sutilezas e sentidos ocultos nas formas do mundo.</text:p>
      <text:h text:style-name="P5" text:outline-level="3"><text:bookmark-start text:name="implicações-práticas-e-filosóficas"/>Implicações práticas e filosóficas<text:bookmark-end text:name="implicações-práticas-e-filosóficas"/></text:h>
      <text:p text:style-name="P2">Compreender emergência, auto-organização e padrões tem efeitos profundos em todos os campos do conhecimento e da prática. Na gestão, favorece estruturas flexíveis e descentralizadas. Na política, valoriza a participação e a inteligência coletiva. Na saúde, propõe abordagens integrativas. Na educação, estimula a construção de ambientes de aprendizagem vivos e interativos. E na espiritualidade, convida à contemplação de um universo onde a ordem não é imposta, mas criada continuamente pelas próprias relações que constituem a vida.</text:p>
      <text:p text:style-name="P3">Do ponto de vista filosófico, essa visão dissolve o ideal de controle absoluto e nos convida à humildade epistemológica. Em vez de tentar dominar a complexidade, somos chamados a escutá-la, a cooperar com ela, a confiar em sua inteligência intrínseca. Isso exige uma ética nova: uma ética da escuta, da coevolução e da responsabilidade compartilhada.</text:p>
      <text:h text:style-name="P5" text:outline-level="3"><text:bookmark-start text:name="conclusão"/>Conclusão<text:bookmark-end text:name="conclusão"/></text:h>
      <text:p text:style-name="P2">O conjunto formado por emergência, auto-organização e padrões representa o núcleo dinâmico da compreensão sistêmica da vida. Ao contrário do paradigma mecanicista, que via a ordem como algo imposto, o pensamento sistêmico mostra que a ordem pode emergir do próprio fluxo da vida. Essa ordem não é estática, mas viva, mutável, criativa e relacional.</text:p>
      <text:p text:style-name="P3">A adoção desta nova visão cria a abertura para uma ciência que reconhece a inteligência da natureza, para uma pedagogia que confia no poder criador do sujeito, para uma política que respeita a diversidade e a colaboração, e para uma espiritualidade que celebra o mistério da vida como processo em rede. Compreender esses conceitos é, portanto, compreender a própria possibilidade da transformação consciente, tanto em nível individual quanto coletivo.</text:p>
      <text:h text:style-name="P1" text:outline-level="2"><text:bookmark-start text:name="o-pensamento-não-linear"/>O pensamento não-linear<text:bookmark-end text:name="o-pensamento-não-linear"/></text:h>
      <text:p text:style-name="P2">O pensamento sistêmico alcança sua maturidade conceitual ao integrar os fundamentos da teoria da complexidade, campo interdisciplinar que estuda sistemas compostos por múltiplos elementos interativos, cujos comportamentos não podem ser previstos por regras lineares ou modelos deterministas simples. Um dos traços mais característicos desses sistemas é sua não-linearidade – uma propriedade que desafia radicalmente a lógica tradicional de causa e efeito.</text:p>
      <text:p text:style-name="P3"><text:soft-page-break/>Na causalidade linear, típica do pensamento mecanicista, um mesmo estímulo sempre gera um mesmo resultado, e os efeitos são proporcionais às causas. Esse tipo de raciocínio funciona bem em sistemas simples, como mecanismos técnicos. Porém, em sistemas complexos – como climas, ecossistemas, mercados, redes neurais ou sociedades – pequenas causas podem gerar grandes efeitos, e grandes causas podem não ter efeito algum, dependendo do contexto em que se inserem. Isso é o que se chama sensibilidade às condições iniciais, popularmente conhecida como “efeito borboleta”.</text:p>
      <text:p text:style-name="P3">Essa ideia foi formalizada no contexto da teoria do caos, especialmente por Edward Lorenz, meteorologista que demonstrou como pequenos desvios em modelos climáticos levavam a comportamentos imprevisíveis. O “efeito borboleta” tornou-se uma imagem poderosa para descrever como a complexidade do mundo exige atenção ao detalhe e consciência do contexto.</text:p>
      <text:p text:style-name="P3">A não-linearidade implica que os resultados não podem ser somados, previstos ou controlados por abordagens reducionistas. Em vez disso, os sistemas complexos operam segundo padrões dinâmicos, adaptações contínuas e retroalimentações múltiplas, que produzem comportamentos inesperados, flutuações e até mesmo reorganizações completas (como rupturas sociais, saltos evolutivos ou crises ecológicas).</text:p>
      <text:p text:style-name="P3">A teoria da complexidade desenvolveu-se a partir de diferentes áreas, como a termodinâmica de Prigogine, os autômatos celulares de Stephen Wolfram, a cibernética de segunda ordem, e os estudos do Instituto de Santa Fé. Todas essas correntes compartilham a busca por entender como a ordem pode emergir do caos, e como a instabilidade, longe de ser um defeito, pode ser fonte de inovação, aprendizado e transformação.</text:p>
      <text:p text:style-name="P3">O químico e físico belga Ilya Prigogine, premiado com o Nobel em 1977, foi um dos pioneiros ao demonstrar que certos sistemas, quando afastados do equilíbrio, não colapsam, mas evoluem para novos estados organizados, por meio de flutuações amplificadas e bifurcações. Essa visão rompe com a ideia clássica de que a entropia – a tendência à desordem – seria incompatível com a vida. Pelo contrário, sistemas vivos utilizam a entropia como combustível para reorganização e evolução.</text:p>
      <text:p text:style-name="P3">Fritjof Capra destaca que o pensamento não-linear exige um novo modo de raciocínio, mais contextual, relacional e probabilístico. Ele nos convida a abandonar a obsessão pelo controle e pela previsibilidade, e a desenvolver uma postura de escuta ativa da complexidade, reconhecendo a natureza dinâmica, criativa e, por vezes, paradoxal dos sistemas vivos.</text:p>
      <text:p text:style-name="P3">Em vez de buscar respostas definitivas, o pensamento não-linear valoriza a capacidade de adaptação, a sensibilidade às transições e a leitura de padrões emergentes. Isso tem implicações práticas em diversas áreas:</text:p>
      <text:list text:style-name="L2">
        <text:list-item>
          <text:p text:style-name="P6">Na educação, sugere currículos flexíveis, interdisciplinares e baseados em projetos. Ao invés de conteúdos fragmentados e previsíveis, favorece o desenvolvimento de competências como pensamento crítico, cooperação e resolução criativa de problemas.</text:p>
        </text:list-item>
        <text:list-item>
          <text:p text:style-name="P6">Na gestão, propõe modelos organizacionais em rede, com autonomia distribuída e aprendizado contínuo. Empresas e instituições tornam-se organismos vivos, capazes de se <text:soft-page-break/>adaptar a ambientes em constante transformação.</text:p>
        </text:list-item>
        <text:list-item>
          <text:p text:style-name="P6">Na ciência, abre espaço para modelos híbridos, interativos e iterativos, que incorporam incerteza e complexidade. Isso inclui simulações computacionais, modelagens dinâmicas e abordagens transdisciplinares.</text:p>
        </text:list-item>
        <text:list-item>
          <text:p text:style-name="P6">Na ética e na política, estimula o pensamento prudente, sistêmico e ecológico, que reconhece as consequências de longo prazo e os efeitos colaterais das ações humanas. A tomada de decisão torna-se mais sensível ao impacto coletivo e intergeracional.</text:p>
        </text:list-item>
      </text:list>
      <text:p text:style-name="P2">A não-linearidade também nos obriga a cultivar a humildade cognitiva. Em sistemas complexos, não temos controle total, nem conhecimento absoluto. Precisamos atuar com base em princípios, padrões e propensões, mais do que em certezas. Isso não significa abdicar da razão, mas expandi-la, tornando-a mais sensível ao real.</text:p>
      <text:p text:style-name="P3">O filósofo Edgar Morin, em sua proposta de um “pensamento complexo”, reforça essa postura. Para ele, o conhecimento deve incorporar a incerteza, o paradoxo e a instabilidade como componentes inevitáveis do real, e não como falhas a serem eliminadas. O pensamento linear, ao tentar reduzir a complexidade à simplicidade, acaba muitas vezes por deformar ou empobrecer os fenômenos que pretende explicar.</text:p>
      <text:p text:style-name="P3">Além disso, a não-linearidade é essencial para compreender como os sistemas evoluem e aprendem. Sistemas adaptativos complexos, como o cérebro humano ou uma economia, são capazes de modificar sua estrutura interna em resposta ao ambiente – não por comando externo, mas por reorganização interna. Esse processo, explorado em capítulos anteriores como auto-organização e emergência, só é possível graças à capacidade de responder de forma não-proporcional e contextualizada aos estímulos.</text:p>
      <text:p text:style-name="P3">A teoria da complexidade não é, portanto, apenas uma nova ciência: é uma nova forma de ver, pensar e atuar no mundo. Ela nos convida a substituir o ideal de previsão e controle por uma prática de sensibilidade, escuta e co-evolução com os sistemas dos quais fazemos parte. Como escrevem Capra e Luisi, “a vida se sustenta na borda do caos” – um espaço fértil onde estabilidade e instabilidade coexistem, e onde a criatividade floresce.</text:p>
      <text:p text:style-name="P3">Por fim, é importante destacar que a teoria da complexidade não é um novo dogma, mas uma linguagem para lidar com o incerto e o instável, com base em princípios como interdependência, circularidade, emergência e auto-organização – todos já abordados nesta parte da monografia.</text:p>
      <text:p text:style-name="P3">Assim, ao incorporar o pensamento não-linear, o paradigma sistêmico nos convida a um novo tipo de inteligência: uma inteligência relacional, adaptativa e sensível à complexidade da vida, cujas aplicações serão ampliadas nos capítulos seguintes, quando abordaremos padrões, processos e significados nos sistemas vivos.</text:p>
      <text:h text:style-name="P1" text:outline-level="2"><text:bookmark-start text:name="quatro-dimensões-da-vida"/>Quatro dimensões da vida<text:bookmark-end text:name="quatro-dimensões-da-vida"/></text:h>
      <text:p text:style-name="P2">Uma das contribuições mais refinadas do pensamento sistêmico contemporâneo é a proposta de compreender a vida não apenas como uma entidade biológica, mas como um fenômeno <text:soft-page-break/>complexo e multidimensional. Em <text:span text:style-name="T1">A Visão Sistêmica da Vida</text:span>, Fritjof Capra e Pier Luigi Luisi sintetizam décadas de avanços científicos, filosóficos e epistemológicos ao propor que a compreensão plena da vida exige a consideração simultânea de quatro dimensões interdependentes: processo, forma, matéria e significado.</text:p>
      <text:p text:style-name="P3">Essa estrutura conceitual permite superar a fragmentação típica da ciência reducionista moderna, que historicamente privilegiou a dimensão material em detrimento das demais. Em vez disso, a visão sistêmica oferece um modelo integrador e transdisciplinar, que reconhece tanto os aspectos físicos quanto os organizacionais, relacionais e experienciáveis da vida. Cada uma dessas quatro dimensões revela um aspecto específico e complementar da existência dos sistemas vivos.</text:p>
      <text:h text:style-name="P5" text:outline-level="3"><text:bookmark-start text:name="processo"/>1. Processo<text:bookmark-end text:name="processo"/></text:h>
      <text:p text:style-name="P2">A vida é, antes de tudo, um processo contínuo, um fluxo dinâmico de transformação e renovação. Os organismos não são entidades fixas ou objetos estáticos, mas sim sistemas metabolicamente ativos que se mantêm em constante interação com o ambiente. Essa visão se apoia em conceitos fundamentais como metabolismo, autopoiese e dinâmica não-linear. Em vez de estruturas rígidas, os seres vivos se definem por sua capacidade de manter sua identidade por meio de processos auto-organizados.</text:p>
      <text:p text:style-name="P3">Na biologia de sistemas, isso se traduz em modelos que focam menos nos “blocos de construção” – como genes e proteínas isolados – e mais nos ciclos de retroalimentação, fluxos de energia e cadeias de transformação. O processo é, portanto, a dimensão do tempo e da mudança, sem o qual não há vida, apenas estrutura inerte.</text:p>
      <text:p text:style-name="P3">Essa ideia também está presente na termodinâmica de sistemas abertos. Como ressaltou Prigogine, a ordem pode emergir da dissipação de energia, e os sistemas vivos são exemplos de estruturas dissipativas: organizam-se e se mantêm longe do equilíbrio através do fluxo constante de matéria e energia com o meio.</text:p>
      <text:h text:style-name="P5" text:outline-level="3"><text:bookmark-start text:name="forma"/>2. Forma<text:bookmark-end text:name="forma"/></text:h>
      <text:p text:style-name="P2">A forma é a dimensão estrutural da vida. Ela se refere ao padrão de organização – a rede de relações entre os componentes do sistema – que confere identidade ao organismo. É a forma que define os limites, a arquitetura interna e a lógica de funcionamento de um sistema. Mesmo que as substâncias materiais que compõem um ser vivo sejam renovadas continuamente, sua forma permanece estável, servindo como um esquema de referência organizacional.</text:p>
      <text:p text:style-name="P3">Capra e Luisi destacam que a forma de um sistema vivo é autogerada: ela não é imposta externamente, mas emerge de maneira interna a partir das interações entre os elementos do sistema. Trata-se de uma forma processual, que existe enquanto os processos que a sustentam estão em operação.</text:p>
      <text:p text:style-name="P3">No contexto do pensamento sistêmico, a forma é vista como uma rede, muitas vezes representada por diagramas de conexões e interdependências. Isso permite mapear sistemas ecológicos, redes neuronais, organizações sociais e até padrões de pensamento. O conceito de forma vai além do <text:soft-page-break/>aspecto físico e pode ser compreendido como a matriz de relações que sustenta a vida.</text:p>
      <text:h text:style-name="P5" text:outline-level="3"><text:bookmark-start text:name="matéria"/>3. Matéria<text:bookmark-end text:name="matéria"/></text:h>
      <text:p text:style-name="P2">Embora o pensamento sistêmico critique o materialismo reducionista, ele não ignora a importância da matéria. A matéria é o suporte físico dos processos vitais: moléculas, tecidos, órgãos, nutrientes, elementos químicos. É graças à matéria que os processos se concretizam e que a forma se expressa.</text:p>
      <text:p text:style-name="P3">Contudo, Capra enfatiza que a matéria, por si só, não explica a vida. A mesma composição química pode dar origem a sistemas vivos ou inertes, dependendo da forma e do processo a que está associada. O que distingue um organismo vivo de um sistema puramente físico não é o tipo de matéria, mas o modo como essa matéria é organizada e processada.</text:p>
      <text:p text:style-name="P3">Além disso, a matéria nos lembra que os sistemas vivos são encarnados: eles existem no espaço, têm limites, densidade, peso e resistências. Isso é importante para reconhecer as condições ecológicas concretas da vida, como a dependência de nutrientes, a necessidade de habitat e a vulnerabilidade a toxinas e desequilíbrios ambientais.</text:p>
      <text:h text:style-name="P5" text:outline-level="3"><text:bookmark-start text:name="significado"/>4. Significado<text:bookmark-end text:name="significado"/></text:h>
      <text:p text:style-name="P2">A dimensão do significado representa uma ruptura decisiva com o modelo científico tradicional. Trata-se do reconhecimento de que a vida não é apenas física, mas também subjetiva, relacional e simbólica. O significado não é algo adicionado ao final, mas é constitutivo da experiência viva.</text:p>
      <text:p text:style-name="P3">Essa dimensão se torna explícita na consciência humana, mas não se restringe a ela. A própria cognição – segundo autores como Maturana e Varela – é entendida como um processo relacional e incorporado, em que o organismo constrói sentido a partir da interação com seu ambiente. Assim, o significado está presente em qualquer sistema que tenha a capacidade de sentir, responder e adaptar-se com base em suas relações com o mundo.</text:p>
      <text:p text:style-name="P3">Na prática, o significado se manifesta em múltiplas formas: na comunicação, na percepção, nos vínculos emocionais, nas narrativas culturais, na busca por propósito e no senso de identidade. A ética, a linguagem, os valores e a espiritualidade são expressões dessa dimensão. Por isso, incluir o significado na compreensão da vida abre espaço para o diálogo entre ciência e humanidades, entre biologia e filosofia, entre empiria e sabedoria.</text:p>
      <text:h text:style-name="P5" text:outline-level="3"><text:bookmark-start text:name="uma-visão-integrada"/>Uma visão integrada<text:bookmark-end text:name="uma-visão-integrada"/></text:h>
      <text:p text:style-name="P2">A proposta das quatro dimensões da vida oferece um modelo verdadeiramente integrado e transdisciplinar. Ao unir processo (tempo e dinâmica), forma (organização e estrutura), matéria (composição física) e significado (experiência e simbolismo), somos capazes de compreender a vida em sua totalidade, sem reduzir nenhum de seus aspectos essenciais.</text:p>
      <text:p text:style-name="P3">Essa abordagem contrasta com a visão clássica, que frequentemente separa o corpo da mente, a razão da emoção, o sujeito do objeto. O paradigma sistêmico afirma, ao contrário, que essas <text:soft-page-break/>separações são ilusões epistemológicas, úteis em certos contextos, mas insuficientes para compreender a complexidade da existência.</text:p>
      <text:p text:style-name="P3">Além disso, esse modelo cria pontes entre ciência e espiritualidade, ao reconhecer que o significado não é um subproduto da matéria, mas uma dimensão ontológica legítima da vida. Essa abertura será fundamental na terceira parte desta monografia, onde buscaremos articular os conceitos sistêmicos com os fundamentos da Doutrina Espírita, especialmente no que se refere à consciência, à reencarnação e à evolução espiritual.</text:p>
      <text:p text:style-name="P3">Em síntese, compreender a vida como a interpenetração de processo, forma, matéria e significado é adotar uma postura intelectual e existencial mais ampla, sensível e coerente com a complexidade do real. Essa visão convida à humildade, à escuta e à reverência diante dos sistemas vivos – não como máquinas, mas como redes inteligentes de sentido, evolução e expressão.</text:p>
      <text:h text:style-name="P1" text:outline-level="2"><text:bookmark-start text:name="mente-e-consciência"/>Mente e consciência<text:bookmark-end text:name="mente-e-consciência"/></text:h>
      <text:p text:style-name="P2">O pensamento sistêmico, ao longo de sua evolução, ampliou progressivamente sua abrangência – da física à biologia, da ecologia às ciências sociais. Um de seus campos mais instigantes é a reflexão sobre mente e consciência, temas tradicionalmente tratados pela filosofia e pela psicologia, mas que, à luz da abordagem sistêmica, ganham novas dimensões, profundamente conectadas com os processos da vida e com a própria estrutura dos sistemas vivos.</text:p>
      <text:p text:style-name="P3">Na tradição cartesiana, corpo e mente eram concebidos como substâncias distintas: a mente como <text:span text:style-name="T1">res cogitans</text:span> (coisa pensante) e o corpo como <text:span text:style-name="T1">res extensa</text:span> (coisa extensa). Essa separação originou o chamado dualismo mente-corpo, que permeou o pensamento ocidental durante séculos e ainda influencia muitas concepções modernas da consciência. A ciência reducionista herdou esse paradigma, tentando localizar a mente no cérebro como uma espécie de centro de controle, tratando os fenômenos mentais como epifenômenos da atividade neural.</text:p>
      <text:p text:style-name="P3">No entanto, o pensamento sistêmico rejeita essa dicotomia e propõe uma visão integrada, relacional e processual da mente. De acordo com essa perspectiva, mente e corpo não são entidades separadas, mas aspectos complementares e simultâneos do mesmo sistema vivo em funcionamento. Essa visão é coerente com a crítica à fragmentação do conhecimento e com a busca por modelos que compreendam os fenômenos a partir da totalidade em interação.</text:p>
      <text:p text:style-name="P3">Um dos marcos dessa virada foi a obra de Humberto Maturana e Francisco Varela, especialmente no desenvolvimento da teoria da autopoiese e da cognição enativa. Para esses autores, os organismos vivos não são apenas estruturas autogeradas, mas também sistemas cognitivos. Ou seja, <text:span text:style-name="T1">viver é conhecer</text:span>, e conhecer é um modo de viver. A cognição, nesse sentido, não é a representação de um mundo externo, mas um processo de acoplamento estrutural entre o organismo e seu ambiente, em que cada interação modifica ambos.</text:p>
      <text:p text:style-name="P3">A mente, portanto, não está localizada em um órgão específico, como o cérebro, mas emerge da dinâmica relacional entre cérebro, corpo e ambiente. Essa concepção rompe com a ideia da mente como um “software” que roda no “hardware” cerebral. Em vez disso, a mente é concebida como um padrão de organização que emerge da complexidade integrada do ser vivo. Como <text:soft-page-break/>explicam Capra e Luisi, “a mente não está no cérebro, assim como a forma de uma tempestade não está no vento. A mente é uma configuração de processos, e não uma coisa”.</text:p>
      <text:p text:style-name="P3">Essa perspectiva permite entender a consciência como um fenômeno emergente, que resulta da organização integrada e da complexidade relacional dos sistemas vivos. Trata-se de uma consciência processual e não substancial, que não pode ser reduzida a componentes físicos, embora dependa de sua organização. Assim, o cérebro é condição necessária, mas não suficiente, para a consciência: o que importa é a totalidade do sistema e sua interação com o ambiente.</text:p>
      <text:p text:style-name="P3">Capra e Luisi argumentam que a consciência existe em graus, ao longo de um continuum evolutivo. Desde os organismos unicelulares que apresentam comportamento sensível ao ambiente, até animais com complexidade neurológica mais sofisticada, há formas progressivas de processamento de informação, sensibilidade e resposta. Essa abordagem rompe com a ideia antropocêntrica de que a consciência é um atributo exclusivamente humano e abre espaço para uma ética ampliada, que reconhece graus de sensibilidade e subjetividade em outras formas de vida.</text:p>
      <text:p text:style-name="P3">Essa concepção tem implicações profundas para a ciência, a ética e a espiritualidade. Do ponto de vista científico, ela permite abordar os fenômenos mentais sem reducionismo, integrando neurociência, ecologia, psicologia e filosofia da mente. Do ponto de vista ético, ela convida a reconhecer a dignidade dos seres vivos como portadores de experiências, mesmo que não conscientes nos moldes humanos. E do ponto de vista espiritual, ela abre espaço para um diálogo com tradições que sempre conceberam a consciência como base constitutiva da realidade, e não como subproduto da matéria.</text:p>
      <text:p text:style-name="P3">A filosofia da mente, sobretudo nas abordagens fenomenológicas e enativas, também converge com essa visão. Autores como Evan Thompson e Shaun Gallagher argumentam que a consciência é inseparável da experiência vivida em primeira pessoa, e que essa experiência não pode ser capturada inteiramente por descrições de terceira pessoa, como gráficos de atividade cerebral. Há, portanto, uma dimensão experiencial e relacional da mente que desafia os modelos objetivistas tradicionais.</text:p>
      <text:p text:style-name="P3">Além disso, a perspectiva sistêmica permite conceber a mente como intersubjetiva, isto é, formada nas relações com os outros. A linguagem, a cultura, o afeto e a convivência moldam a subjetividade humana, mostrando que o “eu” não é um núcleo isolado, mas uma rede de relações internalizadas. Essa visão é coerente com as concepções de Maturana sobre a <text:span text:style-name="T1">linguagem como coordenação de ações</text:span> e com a noção de que a identidade pessoal emerge de processos históricos e sociais de interação.</text:p>
      <text:p text:style-name="P3">Capra ressalta que essa abordagem não exclui o espiritual: ao contrário, ela abre um espaço legítimo para ele, ao reconhecer que os estados mentais e os significados não podem ser plenamente explicados por variáveis físico-químicas. A consciência torna-se, assim, um campo que atravessa o físico, o mental, o relacional e o simbólico.</text:p>
      <text:p text:style-name="P3">Por fim, o pensamento sistêmico sugere que a consciência não é apenas um dado cognitivo, mas também um campo ético e estético. Ser consciente é ser capaz de perceber padrões, intuir significados, sentir empatia e agir com responsabilidade. Assim, a consciência não se reduz à <text:soft-page-break/>autoconsciência racional, mas se expande como sensibilidade ao todo, à complexidade e à interconexão da vida.</text:p>
      <text:p text:style-name="P3">Essa concepção está profundamente alinhada com abordagens espirituais que entendem a consciência como princípio fundamental da existência, e não como um epifenômeno material. Esse ponto será retomado na Parte 3 desta monografia, onde exploraremos as correspondências entre essa concepção sistêmica da consciência e a ideia espírita de Espírito, perispírito e evolução espiritual.</text:p>
      <text:h text:style-name="P1" text:outline-level="2"><text:bookmark-start text:name="parte-2-doutrina-espírita"/>Parte 2 – Doutrina Espírita<text:bookmark-end text:name="parte-2-doutrina-espírita"/></text:h>
      <text:h text:style-name="P5" text:outline-level="3"><text:bookmark-start text:name="introdução-1"/>Introdução<text:bookmark-end text:name="introdução-1"/></text:h>
      <text:p text:style-name="P2">Se a primeira parte desta monografia apresentou uma nova maneira de compreender a realidade a partir da interconexão, da complexidade e da emergência, esta segunda parte volta-se a um corpo de conhecimento espiritual que também propõe uma leitura ampla e integradora da existência: a Doutrina Espírita, codificada por Allan Kardec a partir da segunda metade do século XIX.</text:p>
      <text:p text:style-name="P3">A proposta desta parte é apresentar os fundamentos filosóficos, morais e científicos do Espiritismo, com base nos textos clássicos organizados por Kardec (<text:span text:style-name="T1">O Livro dos Espíritos</text:span>, <text:span text:style-name="T1">O Livro dos Médiuns</text:span>, <text:span text:style-name="T1">O Evangelho Segundo o Espiritismo</text:span>, <text:span text:style-name="T1">A Gênese</text:span> e <text:span text:style-name="T1">O Céu e o Inferno</text:span>), articulando suas principais ideias em torno de eixos conceituais claros e progressivos.</text:p>
      <text:p text:style-name="P3">O Espiritismo não se limita a uma crença ou culto religioso. Ele se define como uma doutrina de consequências filosóficas, morais e científicas, fundada na observação de fenômenos mediúnicos, na investigação racional da vida espiritual e na análise das leis naturais que regem a existência e a evolução do ser. Seu ponto de partida é a existência do Espírito como princípio inteligente do universo, sobrevivente à morte do corpo físico, e em constante processo de aperfeiçoamento por meio da reencarnação.</text:p>
      <text:p text:style-name="P3">Como veremos nos capítulos seguintes, a Doutrina Espírita propõe uma visão evolutiva do ser humano, onde a matéria e a experiência corporal são meios transitórios de aprendizado, e onde a moralidade, o livre-arbítrio e a responsabilidade individual são os motores do progresso espiritual. Para o Espiritismo, o universo é habitado por uma multidão de Espíritos em diferentes graus de adiantamento, todos sujeitos às mesmas leis universais de justiça, amor e solidariedade.</text:p>
      <text:p text:style-name="P3">Essa visão espiritualista é, no entanto, distinta das tradições dogmáticas ou místicas: o Espiritismo propõe-se como uma filosofia com base racional, que admite o uso da razão, da observação e da experimentação como meios legítimos de validação de suas proposições. Essa postura foi expressa de forma notável por Kardec ao propor o método empírico e comparativo como base para a codificação dos ensinamentos espirituais.</text:p>
      <text:p text:style-name="P3">Ao longo desta parte, exploraremos os principais conceitos espíritas – o Espírito, a reencarnação, a mediunidade, o progresso moral, as leis naturais, entre outros – sempre com atenção à coerência interna da doutrina, à sua lógica filosófica e às suas implicações para a compreensão da vida, da morte e do sentido da existência.</text:p>
      <text:p text:style-name="P3"><text:soft-page-break/>Finalmente, este exame sistemático da Doutrina Espírita prepara o terreno para a terceira parte desta monografia, em que buscaremos articular os fundamentos da visão sistêmica e da doutrina espírita em uma proposta integrativa e especulativa, que chamaremos de Espiritismo Sistêmico.</text:p>
      <text:h text:style-name="P1" text:outline-level="2"><text:bookmark-start text:name="o-que-é-o-espiritismo"/>O que é o Espiritismo?<text:bookmark-end text:name="o-que-é-o-espiritismo"/></text:h>
      <text:p text:style-name="P2">O Espiritismo, tal como definido por Allan Kardec, é uma doutrina filosófica, científica e moral que tem por objeto o estudo da natureza, origem e destino dos Espíritos, bem como de suas relações com o mundo corporal. Nas palavras do próprio codificador: “O Espiritismo é, ao mesmo tempo, uma ciência de observação e uma doutrina filosófica” (<text:span text:style-name="T1">O que é o Espiritismo?</text:span>). Ele propõe uma visão ampliada do ser humano e do universo, fundamentada na ideia de que a vida não se restringe à existência material, mas se estende à dimensão espiritual, regida por leis naturais e acessível à razão.</text:p>
      <text:p text:style-name="P3">Diferentemente das religiões dogmáticas tradicionais, o Espiritismo não se fundamenta em revelações divinas isoladas, nem em estruturas sacerdotais, rituais ou cultos. Sua proposta é racional, experimental e progressiva. É uma doutrina que se constrói com base na observação metódica dos fenômenos espíritas – manifestações de entidades imateriais –, na análise filosófica de suas mensagens, e na interpretação ética e moral desses conteúdos, à luz de uma lei universal de progresso.</text:p>
      <text:p text:style-name="P3">O ponto de partida da Doutrina Espírita é a constatação da existência de uma realidade espiritual imaterial, pré-existente e sobrevivente à morte física. Essa realidade se manifesta por meio de fenômenos chamados “espíritas” ou “mediúnicos”, nos quais Espíritos – seres humanos desencarnados – interagem com o mundo corporal através de médiuns. Allan Kardec, ao estudar esses fenômenos com o rigor de um pesquisador, elaborou uma metodologia que incluiu a comparação de comunicações obtidas por diversos médiuns independentes, filtrando as ideias repetidas, coerentes e elevadas, e rejeitando contradições, imprecisões ou opiniões pessoais dos comunicantes.</text:p>
      <text:p text:style-name="P3">Em sua obra inaugural, <text:span text:style-name="T1">O Livro dos Espíritos</text:span> (1857), Kardec apresenta o Espiritismo como uma doutrina de três aspectos complementares:</text:p>
      <text:list text:style-name="L3">
        <text:list-item>
          <text:p text:style-name="P7">Ciência, por investigar os fenômenos mediúnicos segundo o método de observação, analogia e indução, com controle de variáveis e repetição de experiências;</text:p>
        </text:list-item>
        <text:list-item>
          <text:p text:style-name="P7">Filosofia, por refletir sobre as questões fundamentais da existência – de onde viemos, por que sofremos, para onde vamos – à luz da razão e da experiência dos Espíritos;</text:p>
        </text:list-item>
        <text:list-item>
          <text:p text:style-name="P7">Moral, por propor uma ética universal baseada na fraternidade, na evolução do ser e na responsabilidade individual como condição para o progresso espiritual.</text:p>
        </text:list-item>
      </text:list>
      <text:p text:style-name="P2">Esse tripé dá ao Espiritismo um caráter singular: ele não é apenas uma ciência dos fenômenos nem uma moral racional, mas uma síntese dinâmica entre o saber empírico, o pensamento reflexivo e a prática do bem.</text:p>
      <text:p text:style-name="P3">No texto introdutório de <text:span text:style-name="T1">O que é o Espiritismo?</text:span> (1859), Kardec deixa claro que a doutrina não <text:soft-page-break/>pretende ser infalível nem definitiva. Ao contrário, ela se apresenta como um corpo de ideias em constante aprimoramento, guiado pelo princípio da verdade progressiva: “O Espiritismo marcha com o progresso, e jamais será ultrapassado, porque, se novas descobertas lhe demonstrarem estar em erro sobre um ponto, ele se modificará nesse ponto. Se uma verdade nova se revelar, ele a aceitará.”</text:p>
      <text:p text:style-name="P3">A origem do conteúdo doutrinário está nos Espíritos superiores, cuja autoridade, segundo Kardec, não deriva de sua identidade, mas da elevação moral e intelectual de suas comunicações, bem como de sua universalidade. Isso significa que nenhuma comunicação isolada, mesmo que vinda de um Espírito famoso ou venerado, pode ser aceita como verdade doutrinária se não for confirmada pela convergência de mensagens semelhantes, obtidas por médiuns distintos, em lugares e circunstâncias diversas.</text:p>
      <text:p text:style-name="P3">Outro aspecto importante do Espiritismo é sua recusa do sobrenatural. Para Kardec, todos os fenômenos – inclusive os espirituais – obedecem a leis naturais, ainda que muitas delas ainda não tenham sido plenamente conhecidas pela ciência material. Nesse sentido, o Espiritismo reconcilia ciência e espiritualidade, ao propor que o plano espiritual não é um domínio do irracional ou do milagre, mas sim uma dimensão natural da existência, sujeita à investigação e à compreensão racional.</text:p>
      <text:p text:style-name="P3">Ao tratar da sobrevivência da alma e da comunicação com os mortos, o Espiritismo recupera temas antigos – presentes em tradições religiosas e filosóficas desde a Antiguidade – mas o faz de maneira inovadora ao submetê-los à razão crítica e à experimentação coletiva. Essa postura levou muitos autores, inclusive fora do campo espírita, a considerarem Kardec um precursor de uma espiritualidade racional moderna, em contraste com os dogmas de fé cega.</text:p>
      <text:p text:style-name="P3">Na concepção espírita, os Espíritos são seres em constante processo de evolução, cuja trajetória se realiza por meio de múltiplas existências corporais (reencarnações), pelas quais eles desenvolvem gradualmente sua inteligência, sensibilidade, moralidade e senso de justiça. A vida corporal é apenas uma fase transitória de um processo evolutivo contínuo, regido por leis morais e de causa e efeito. O sofrimento, as provações e as desigualdades são compreendidos como experiências educativas e oportunidades de progresso espiritual.</text:p>
      <text:p text:style-name="P3">Kardec estabelece que a verdadeira elevação espiritual não depende de ritos, crenças formais ou castigos divinos, mas sim do aperfeiçoamento moral e da prática constante do bem. O Espírito progride à medida que aprende a dominar suas paixões, cultivar virtudes e agir com empatia, compaixão e justiça.</text:p>
      <text:p text:style-name="P3">Além disso, o Espiritismo valoriza a liberdade de consciência e a autonomia do pensamento. A fé espírita deve ser racional e questionadora: “Fé inabalável é somente aquela que pode encarar a razão face a face em todas as épocas da Humanidade”, declara Kardec no capítulo I de <text:span text:style-name="T1">O Evangelho segundo o Espiritismo</text:span>.</text:p>
      <text:p text:style-name="P3">Em síntese, o Espiritismo é uma doutrina que busca unir razão e espiritualidade, ciência e ética, observação e transcendência. Ele propõe uma visão integrada do ser humano, em que corpo, mente e espírito são expressões interdependentes de uma mesma realidade vital. Ao oferecer uma interpretação racional da imortalidade, da reencarnação, da comunicação entre os planos e da <text:soft-page-break/>evolução moral, o Espiritismo se apresenta como uma chave de leitura profunda da existência, que será detalhada e expandida nos capítulos seguintes desta Parte 2 da monografia.</text:p>
      <text:h text:style-name="P1" text:outline-level="2"><text:bookmark-start text:name="o-espírito-e-o-perispírito"/>O Espírito e o Perispírito<text:bookmark-end text:name="o-espírito-e-o-perispírito"/></text:h>
      <text:p text:style-name="P2">No centro da Doutrina Espírita está a noção de Espírito – definido como o princípio inteligente do universo. Essa definição, apresentada de maneira clara logo no início de <text:span text:style-name="T1">O Livro dos Espíritos</text:span>, estabelece que tudo o que possui consciência, vontade e capacidade de evolução se fundamenta nessa entidade imaterial. A abordagem espírita parte da seguinte premissa: a existência do Espírito é um fato verificável pelos fenômenos mediúnicos e pelas observações sistemáticas feitas ao longo de décadas de pesquisa. Kardec propôs uma doutrina que, antes de afirmar dogmas, questiona, investiga e sistematiza os dados extraídos da experiência espiritual.</text:p>
      <text:p text:style-name="P3">Na questão nº 23 de <text:span text:style-name="T1">O Livro dos Espíritos</text:span>, Kardec pergunta: “Que é o Espírito?”, e os Espíritos superiores respondem: “O princípio inteligente do universo.” Já na questão nº 76, esclarecem: “Os Espíritos são os seres inteligentes da Criação. Povoam o universo, fora do mundo material.” Desse modo, o Espírito não é uma ideia abstrata, mas uma entidade individualizada, consciente, ativa, que sobrevive à morte física e prossegue em seu processo evolutivo.</text:p>
      <text:p text:style-name="P3">Essa individualidade é uma característica fundamental da antropologia espírita: cada Espírito é único, com sua própria história, memória, inclinações e possibilidades de progresso. Essa perspectiva distingue o Espiritismo tanto do materialismo (que nega a existência da alma) quanto de certas correntes místicas que diluem o eu em uma “consciência cósmica” impessoal. Para o Espiritismo, a individualidade espiritual é preservada além da morte, e o Espírito conserva suas aquisições intelectuais, morais e afetivas, aperfeiçoando-se gradualmente ao longo de inúmeras existências.</text:p>
      <text:p text:style-name="P3">Para interagir com o plano material, o Espírito utiliza um instrumento intermediário: o perispírito. Essa noção, desenvolvida por Kardec com base nas observações dos fenômenos mediúnicos, refere-se a um envoltório semimaterial que liga o Espírito ao corpo durante a vida corpórea e persiste após a morte. Descrito como fluídico, o perispírito reflete o estado mental e moral do Espírito, sendo mais denso nos Espíritos inferiores e mais sutil nos Espíritos elevados. É ele quem permite os fenômenos de aparição, bicorporeidade, escrita direta, obsessão, cura espiritual, entre outros – todos amplamente documentados nas obras da Codificação.</text:p>
      <text:p text:style-name="P3">Naturalmente, a ideia de um corpo intermediário entre o Espírito e a matéria não é exclusiva do Espiritismo. Diversas culturas e tradições espirituais ao longo da história mencionaram formas de “corpo sutil”, “duplo etérico” ou “corpo astral”, com funções semelhantes. O mérito da Doutrina Espírita está em oferecer uma abordagem menos mística e mais racional sobre esse elemento, atribuindo-lhe função, estrutura e propriedades verificáveis. Kardec considerava o perispírito “o princípio de todas as manifestações espíritas”, sustentando a tese de que esse envoltório é a chave para compreender os fenômenos da vida espiritual em relação com o plano material.</text:p>
      <text:p text:style-name="P3">Embora o conceito básico de perispírito seja relativamente intuitivo, sua compreensão profunda exige esforço conceitual. Na literatura espírita, ele é descrito sob diversos nomes – “corpo <text:soft-page-break/>espiritual”, “psicossoma”, “envoltório fluídico”, entre outros – refletindo tanto a riqueza da tradição quanto a complexidade do fenômeno. Sua natureza exata ainda é tema de debate entre estudiosos e correntes interpretativas dentro do próprio Espiritismo.</text:p>
      <text:p text:style-name="P3">De forma geral, podemos identificar duas abordagens principais quanto à natureza do perispírito:</text:p>
      <text:list text:style-name="L4">
        <text:list-item>
          <text:p text:style-name="P8">A abordagem dos níveis de matéria: inspirada nas próprias expressões utilizadas por Kardec, como “matéria quintessenciada”, essa visão propõe que a matéria se manifesta em diferentes graus de sutileza, de acordo com sua estrutura vibratória. O perispírito seria constituído de uma matéria mais sutil ou refinada, ainda pertencente à mesma substância universal da qual tudo é feito, mas localizada em uma faixa não perceptível aos sentidos comuns. Essa perspectiva dialoga, inclusive, com certos conceitos da física moderna, como os estados quânticos da matéria e as relações entre energia e campo. Nessa abordagem, os chamados “fluidos espirituais” seriam manifestações dessa matéria em diferentes níveis de organização.</text:p>
        </text:list-item>
        <text:list-item>
          <text:p text:style-name="P8">A abordagem das dimensões múltiplas: essa linha considera que o mundo espiritual não está simplesmente “fora” do mundo físico, mas em dimensões coexistentes que não percebemos por limitação dos nossos sentidos. A realidade espiritual seria composta de outras dimensões – talvez quatro, cinco, onze, ou mesmo infinitas – como postulam algumas teorias da física contemporânea. O perispírito, nesse cenário, seria um corpo multidimensional, capaz de atuar em várias camadas da realidade simultaneamente, servindo como interface adaptativa entre o Espírito e o mundo material. Essa abordagem se alinha a relatos de experiências fora do corpo, onde o Espírito parece acessar realidades “superpostas”, sem perder o vínculo com as dimensões materiais.</text:p>
        </text:list-item>
      </text:list>
      <text:p text:style-name="P2">Essas duas abordagens não são necessariamente excludentes. É plausível imaginar que o perispírito seja, ao mesmo tempo, constituído por uma matéria sutil e organizado para operar em múltiplas dimensões. Assim, sua função seria tanto física quanto metafísica: permitir ao Espírito atuar no plano encarnado e, ao mesmo tempo, conservar sua identidade e integridade nas esferas invisíveis da realidade. Essa complexidade conceitual reflete justamente a profundidade da antropologia espírita, que não se satisfaz com explicações simplistas e busca articular espiritualidade, ciência e filosofia.</text:p>
      <text:p text:style-name="P3">Essa constituição tripartida do ser humano – Espírito, perispírito e corpo físico – é, portanto, uma das chaves para compreender não apenas os fenômenos mediúnicos, mas a própria experiência da vida e da evolução moral. O corpo é o instrumento de manifestação no mundo material; o perispírito é o elo de ligação fluídico; o Espírito é o ser essencial, sede da consciência, da razão e da vontade. Essa estrutura também explica as influências espirituais sutis, as doenças de origem psíquico-espiritual, os traços de personalidade que atravessam encarnações e os estados pós-morte descritos em comunicações mediúnicas.</text:p>
      <text:p text:style-name="P3">O Espírito, para o Espiritismo, é um ser essencialmente perfectível. Criado simples e ignorante, ele carrega o germe de todas as potencialidades que irá desenvolver ao longo das eras, por meio de suas experiências, escolhas, erros e acertos. Não há criação de Espíritos “maus” ou “bons” por natureza: todos percorrem o mesmo caminho de aprendizado progressivo, segundo as leis de Deus. A reencarnação é o mecanismo por excelência desse progresso, pois permite ao Espírito <text:soft-page-break/>viver em diferentes contextos sociais, culturais e morais, reparando equívocos, desenvolvendo virtudes e adquirindo sabedoria.</text:p>
      <text:p text:style-name="P3">A lei de causa e efeito, profundamente conectada ao livre-arbítrio, garante que cada ação do Espírito – no bem ou no mal – tenha consequências para sua evolução. Assim, a justiça divina não é punitiva, mas educativa e restauradora, permitindo ao ser colher os frutos de suas escolhas e reorientar sua trajetória conforme sua maturidade interior.</text:p>
      <text:p text:style-name="P3">Importante observar que o Espírito não evolui no isolamento. A vida espiritual é essencialmente relacional: os Espíritos vivem em comunidades, agrupam-se por afinidades, ajudam-se mutuamente e influenciam o mundo material. A obra <text:span text:style-name="T1">O Céu e o Inferno</text:span> (1865) detalha as condições da vida espiritual após a morte e mostra, por meio de comunicações mediúnicas, como os Espíritos se percebem, se emocionam e evoluem em interação contínua com os demais.</text:p>
      <text:p text:style-name="P3">Na escala espírita, descrita no capítulo I da segunda parte de <text:span text:style-name="T1">O Livro dos Espíritos</text:span>, os Espíritos são classificados conforme seu grau de evolução moral e intelectual. Essa hierarquia vai dos Espíritos imperfeitos (ainda presos ao egoísmo, à ignorância e ao instinto) aos Espíritos superiores (que já alcançaram sabedoria, amor e pureza moral), passando por graus intermediários em que predomina a luta entre os desejos e a razão. A ascensão de um grau a outro é fruto do esforço pessoal, da reforma íntima e da prática do bem.</text:p>
      <text:p text:style-name="P3">O Espírito, portanto, é o agente consciente de sua própria transformação. Ele não é passivo diante do destino, nem joguete de forças aleatórias. Ao contrário, constrói seu caminho ao longo de múltiplas existências, guiado pelas leis divinas, amparado por Espíritos mais evoluídos e movido por sua sede de plenitude. Essa visão é profundamente ética, pois estabelece uma responsabilidade pessoal integral e intransferível pela evolução da própria alma.</text:p>
      <text:p text:style-name="P3">Por fim, o conceito espírita de Espírito e perispírito tem implicações não apenas filosóficas, mas também científicas e morais. Científicas, porque permite interpretar fenômenos antes considerados sobrenaturais à luz de uma nova ciência do Espírito, baseada em dados empíricos e princípios racionais. Morais, porque desloca o foco da salvação religiosa para a transformação interior contínua, colocando o indivíduo diante da necessidade de se melhorar a cada dia, por meio do conhecimento de si mesmo e da vivência do amor ao próximo.</text:p>
      <text:p text:style-name="P3">Em síntese, o Espírito, na visão espírita, é o sujeito eterno da experiência, o viajante da evolução e o elo entre o mundo físico e o mundo moral. Ele é, em última instância, a consciência em expansão, destinada à sabedoria, à liberdade interior e à comunhão com o divino. Compreender o Espírito e sua relação com o perispírito é compreender o ser humano em sua essência integral – e essa compreensão orienta toda a cosmologia e a ética da Doutrina Espírita.</text:p>
      <text:h text:style-name="P1" text:outline-level="2"><text:bookmark-start text:name="leis-naturais-e-morais"/>Leis Naturais e Morais<text:bookmark-end text:name="leis-naturais-e-morais"/></text:h>
      <text:p text:style-name="P2">Um dos aspectos mais distintivos e coerentes da Doutrina Espírita é sua ênfase na existência de leis naturais e universais que regem todos os aspectos da vida — tanto os fenômenos materiais quanto os espirituais, tanto os eventos externos quanto os processos íntimos da consciência. Essas leis não são arbitrárias nem exclusivas a uma cultura ou época: são imanentes à criação, reveladoras da ordem moral e estrutural do universo, e acessíveis à razão humana. Para o <text:soft-page-break/>Espiritismo, compreender essas leis é a chave para a evolução do Espírito, a justiça divina e o sentido da vida.</text:p>
      <text:p text:style-name="P3">Historicamente, a busca humana por explicações das regularidades da natureza e da existência se dividiu, de forma simplificada, em duas vertentes fundamentais: uma religiosa e outra científica. A primeira associa as leis da vida a um princípio transcendental — Deus — concebido como a causa primária, mantenedora e organizadora do universo. A segunda, por sua vez, busca explicações imanentes, que derivem de observações empíricas e raciocínios lógicos, sem apelo à intervenção sobrenatural. Enquanto a religião fala de “leis divinas”, reveladas por meio de profetas, tradições ou escrituras, a ciência fala de “leis naturais”, formuladas a partir da observação dos fatos, confirmadas por experimentos e submetidas à refutação.</text:p>
      <text:p text:style-name="P3">O Espiritismo, segundo Allan Kardec, surge como uma ponte entre essas duas abordagens, recusando tanto o dogmatismo religioso quanto o materialismo cientificista. Ele reconhece que a ciência revela as leis do mundo físico, enquanto a espiritualidade revela as leis morais que orientam o Espírito. Ambas são válidas e complementares. Como afirma o próprio Kardec: “A Ciência e a Religião são as duas alavancas da inteligência humana: uma revela as leis do mundo material e a outra as do mundo moral.” (<text:span text:style-name="T1">A Gênese</text:span>, cap. I, item 16).</text:p>
      <text:p text:style-name="P3">Essa concepção de conciliação fundamenta o caráter singular da Doutrina Espírita: ela não se reduz a uma ciência, tampouco a uma religião nos moldes tradicionais. É, como explica Kardec, uma ciência filosófica com consequências morais, ou, em outras palavras, um esforço racional e experiencial para compreender tanto os fenômenos espirituais quanto suas implicações éticas e existenciais. A Doutrina Espírita não apenas propõe uma nova teologia racional, como também oferece um modelo epistemológico inovador, em que a revelação não se opõe ao conhecimento, mas o integra.</text:p>
      <text:h text:style-name="P5" text:outline-level="3"><text:bookmark-start text:name="a-lei-divina-ou-natural"/>A Lei Divina ou Natural<text:bookmark-end text:name="a-lei-divina-ou-natural"/></text:h>
      <text:p text:style-name="P2">A Terceira Parte de <text:span text:style-name="T1">O Livro dos Espíritos</text:span>, intitulada “Das Leis Morais”, inaugura seu primeiro capítulo com uma pergunta fundamental: “Que se deve entender por lei natural?” E os Espíritos respondem: “A lei natural é a lei de Deus. É a única necessária à felicidade do homem; ela lhe indica o que deve fazer ou deixar de fazer e ele só é infeliz quando dela se afasta.” (<text:span text:style-name="T1">LE</text:span>, questão 614). Com isso, fica estabelecido o princípio de que as leis divinas e as leis naturais são, em essência, uma só e mesma realidade: manifestações da vontade divina, impressas na própria estrutura do universo e na consciência do ser.</text:p>
      <text:p text:style-name="P3">Essas leis são consideradas universais, imutáveis e eternas — reflexos da sabedoria e da justiça divinas —, mas sua compreensão por parte dos seres humanos é progressiva. Kardec afirma que a revelação espírita possui um duplo caráter: ela é, ao mesmo tempo, divina e humana. Divina, porque parte de Espíritos superiores que transmitem ensinamentos morais compatíveis com os mais altos princípios éticos; humana, porque depende da capacidade de recepção, análise, comparação e sistematização por parte dos homens. Isso significa que a revelação das leis divinas é dinâmica, e se realiza por meio da evolução do pensamento, da experiência espiritual e da ciência.</text:p>
      <text:h text:style-name="P5" text:outline-level="3"><text:bookmark-start text:name="o-papel-da-razão-e-da-consciência"/><text:soft-page-break/>O papel da razão e da consciência<text:bookmark-end text:name="o-papel-da-razão-e-da-consciência"/></text:h>
      <text:p text:style-name="P2">Para a Doutrina Espírita, a principal forma de acesso às leis divinas não é a fé cega, mas o uso da razão e da experiência. A verdade moral está inscrita na consciência, e cada Espírito é chamado a descobri-la progressivamente, por meio do livre-arbítrio, da reflexão e da vivência. Como sintetiza <text:span text:style-name="T1">O Livro dos Espíritos</text:span>: “A verdadeira lei de Deus está gravada no coração do homem; é a mesma para todos os tempos e para todos os povos.” (<text:span text:style-name="T1">LE</text:span>, questão 621). Assim, as leis morais não dependem de revelações arbitrárias, mas são objeto de descoberta contínua, tal como as leis físicas.</text:p>
      <text:p text:style-name="P3">Esse modelo é profundamente moderno: admite que a moralidade seja objeto de estudo racional, sem abrir mão de seu caráter transcendente. Em vez de um código fixo e impositivo, temos um sistema ético aberto e progressivo, em constante diálogo com a razão, a ciência e a experiência vivida.</text:p>
      <text:h text:style-name="P5" text:outline-level="3"><text:bookmark-start text:name="a-lei-de-causa-e-efeito"/>A Lei de Causa e Efeito<text:bookmark-end text:name="a-lei-de-causa-e-efeito"/></text:h>
      <text:p text:style-name="P2">Entre todas as leis morais, a lei de causa e efeito é uma das mais importantes para o entendimento espírita da justiça e da evolução. Segundo essa lei, toda ação gera consequências compatíveis com sua natureza moral. Não se trata de punições arbitrárias, mas de processos naturais de aprendizado e reequilíbrio. As dificuldades, dores e aparentes injustiças que enfrentamos na vida podem ser compreendidas como efeitos de causas passadas — nesta ou em outras existências — que nos conduzem à reparação e ao amadurecimento moral.</text:p>
      <text:p text:style-name="P3">Essa concepção elimina o fatalismo e a noção de castigo divino. Ao contrário, ela valoriza o livre-arbítrio, a responsabilidade e a capacidade de transformação. O Espírito é o artífice de seu destino, e cada experiência dolorosa é uma oportunidade de crescimento. Trata-se, portanto, de uma lei educativa, que opera com sabedoria e sem violência, oferecendo a cada um os meios adequados ao seu nível evolutivo.</text:p>
      <text:p text:style-name="P3">Contudo, é importante ressaltar que, embora esta lei seja frequentemente apresentada de forma mecanicista (causa → efeito), ela deve ser reinterpretada à luz da complexidade e da dinâmica espiritual. A vida não é uma equação simples; é um sistema interdependente em que múltiplas causas convergem e múltiplas consequências se entrelaçam. Isso sugere que o Espiritismo pode — e deve — dialogar com abordagens contemporâneas da causalidade complexa, como será tratado na Parte 3 desta monografia.</text:p>
      <text:h text:style-name="P5" text:outline-level="3"><text:bookmark-start text:name="a-lei-do-progresso"/>A Lei do Progresso<text:bookmark-end text:name="a-lei-do-progresso"/></text:h>
      <text:p text:style-name="P2">Outro eixo fundamental da moral espírita é a lei do progresso, segundo a qual todos os Espíritos estão destinados à perfeição. Criados simples e ignorantes, os Espíritos evoluem ao longo de múltiplas existências, desenvolvendo suas faculdades intelectuais e morais. O erro e o sofrimento fazem parte desse processo, mas não o definem. A perfeição é o fim natural, e a dor, quando ocorre, é um meio pedagógico.</text:p>
      <text:p text:style-name="P3">Esse progresso é tanto individual quanto coletivo. A humanidade, em seu conjunto, também <text:soft-page-break/>avança rumo à fraternidade, à justiça e à consciência planetária. As crises, os retrocessos e os conflitos devem ser compreendidos como fases transitórias de transformação. O Espiritismo oferece, assim, uma visão otimista e teleológica da história, em que o bem é o destino final de todos os seres.</text:p>
      <text:h text:style-name="P5" text:outline-level="3"><text:bookmark-start text:name="leis-de-convivência-e-relação-espiritual"/>Leis de convivência e relação espiritual<text:bookmark-end text:name="leis-de-convivência-e-relação-espiritual"/></text:h>
      <text:p text:style-name="P2">Além das leis que regem a evolução individual, o Espiritismo reconhece leis que organizam as relações entre os Espíritos, entre os mundos e entre os planos material e espiritual. São elas que explicam:</text:p>
      <text:list text:style-name="L5">
        <text:list-item>
          <text:p text:style-name="P9">A atuação dos Espíritos protetores, que orientam sem impor;</text:p>
        </text:list-item>
        <text:list-item>
          <text:p text:style-name="P9">Os vínculos de afinidade espiritual, que formam famílias, grupos e coletividades;</text:p>
        </text:list-item>
        <text:list-item>
          <text:p text:style-name="P9">As influências espirituais, tanto positivas (intuições, inspirações) quanto negativas (obsessões, induções);</text:p>
        </text:list-item>
        <text:list-item>
          <text:p text:style-name="P9">Os processos de reencarnação, regidos por critérios morais, compromissos evolutivos e necessidades de aprendizado mútuo.</text:p>
        </text:list-item>
      </text:list>
      <text:p text:style-name="P2">Essas leis revelam que o universo espiritual é um sistema vivo, dinâmico e relacional, estruturado por princípios de cooperação, responsabilidade mútua e solidariedade evolutiva.</text:p>
      <text:h text:style-name="P5" text:outline-level="3"><text:bookmark-start text:name="conclusão-1"/>Conclusão<text:bookmark-end text:name="conclusão-1"/></text:h>
      <text:p text:style-name="P2">A Doutrina Espírita oferece uma visão ética e espiritual baseada em leis naturais, e não em dogmas ou arbitrariedades. Sua moral é racional, experiencial e universal, pautada pela liberdade, responsabilidade e perfectibilidade de todos os Espíritos. Ao propor uma aliança entre ciência e espiritualidade, o Espiritismo inaugura uma nova forma de compreender o bem: não como mandamento, mas como direção evolutiva da vida.</text:p>
      <text:p text:style-name="P3">A concepção de que as leis morais são reveladas tanto pela consciência quanto pelo esforço científico mostra que o Espiritismo não pertence nem à margem religiosa, nem à margem científica — mas à ponte entre ambas. Ele integra razão e fé, revelação e investigação, tradição e progresso. É nesse equilíbrio dinâmico que reside sua força, sua coerência e sua atualidade.</text:p>
      <text:h text:style-name="P1" text:outline-level="2"><text:bookmark-start text:name="progresso-espiritual"/>Progresso Espiritual<text:bookmark-end text:name="progresso-espiritual"/></text:h>
      <text:p text:style-name="P2">No centro da Doutrina Espírita está a concepção do Espírito como um ser essencialmente perfectível. Criado “simples e ignorante”, conforme afirmam os Espíritos superiores em <text:span text:style-name="T1">O Livro dos Espíritos</text:span> (questão 115), o Espírito carrega, desde sua origem, a semente da evolução. O objetivo final da criação espiritual é a perfeição relativa da criatura – um estado de plenitude moral, intelectual e afetiva compatível com a condição de ser criado. Esse progresso, longe de ser uma imposição externa ou resultado do acaso, é intrínseco à própria natureza espiritual. Kardec denomina esse princípio de perfectibilidade, isto é, a capacidade de desenvolvimento <text:soft-page-break/>gradual rumo ao bem.</text:p>
      <text:p text:style-name="P3">Esse entendimento distingue a visão espírita de outras doutrinas que veem a alma humana como imutável ou fixada em categorias definitivas. Na filosofia espírita, nenhum Espírito é criado bom ou mau. Todos, sem exceção, iniciam sua jornada na ignorância e na simplicidade, dotados, porém, de liberdade e razão, e destinados a conquistar, por esforço próprio, os valores que os elevarão.</text:p>
      <text:p text:style-name="P3">Kardec insiste que o progresso é uma lei natural, tão imperiosa quanto a gravidade ou a conservação da energia. Ele afirma: “Sendo o progresso uma condição da natureza humana, não está no poder do homem opor-se-lhe. É uma força viva, cuja ação pode ser retardada, porém não anulada, por leis humanas más.” (<text:span text:style-name="T1">LE</text:span>, questão 783). Essa força vital é alimentada por duas correntes complementares: uma interna, que corresponde ao impulso inato do Espírito para a perfeição; outra externa, resultante das experiências e desafios enfrentados ao longo das encarnações e da vida espiritual.</text:p>
      <text:p text:style-name="P3">Assim, a evolução espiritual compreende duas dimensões: uma ontológica – ligada à constituição essencial do Espírito; e outra histórica – associada às vivências acumuladas, às relações, aos contextos culturais e às escolhas existenciais. Inicialmente, esse progresso se dá de forma inconsciente, regido pelas forças da natureza e pelas necessidades instintivas. Mais tarde, com o desenvolvimento do livre-arbítrio e da consciência de si, o Espírito passa a participar ativamente de sua transformação, tornando-se sujeito de seu próprio aperfeiçoamento.</text:p>
      <text:h text:style-name="P5" text:outline-level="3"><text:bookmark-start text:name="progresso-intelectual-e-moral"/>Progresso intelectual e moral<text:bookmark-end text:name="progresso-intelectual-e-moral"/></text:h>
      <text:p text:style-name="P2">Kardec propôs uma divisão didática do progresso espiritual em dois vetores principais: o intelectual e o moral. O progresso intelectual envolve o desenvolvimento das capacidades cognitivas do Espírito: percepção, atenção, memória, raciocínio, criatividade, imaginação, julgamento e pensamento abstrato. Trata-se de um conjunto de funções que compõem o que a psicologia moderna chama de cognição – a capacidade de conhecer, interpretar e transformar a realidade. Por meio do intelecto, o Espírito adquire conhecimento do mundo, compreende as leis naturais e refina sua capacidade de previsão, escolha e ação.</text:p>
      <text:p text:style-name="P3">Entretanto, Kardec adverte que o progresso intelectual, por si só, não garante a elevação moral. A inteligência é moralmente neutra: pode ser usada tanto para o bem quanto para o mal. Por isso, é necessário que à cognição se una o desenvolvimento das virtudes, como humildade, compaixão, justiça, paciência, generosidade e amor ao próximo. Esse é o campo do progresso moral – a lapidação do caráter e a integração da inteligência ao sentimento.</text:p>
      <text:p text:style-name="P3">O progresso moral exige do Espírito o esforço da reforma íntima, a superação do egoísmo e do orgulho, e a vivência dos valores do bem em situações concretas. Kardec reconhece que essa dimensão é mais difícil e lenta que o progresso intelectual, pois demanda autoconhecimento, renúncia, empatia e constância. Contudo, ressalta que o progresso intelectual acaba por favorecer o progresso moral, ao tornar o bem compreensível e o mal inaceitável. “O progresso intelectual engendra o progresso moral, tornando compreensíveis o bem e o mal. Desde então, o homem pode escolher.” (<text:span text:style-name="T1">LE</text:span>, questão 780)</text:p>
      <text:h text:style-name="P5" text:outline-level="3"><text:bookmark-start text:name="progresso-coletivo-e-solidariedade-evolutiva"/><text:soft-page-break/>Progresso coletivo e solidariedade evolutiva<text:bookmark-end text:name="progresso-coletivo-e-solidariedade-evolutiva"/></text:h>
      <text:p text:style-name="P2">O progresso, porém, não se dá em isolamento. Desde os primeiros momentos da vida espiritual, o Espírito se desenvolve em interação com outros Espíritos, encarnados ou desencarnados. A convivência social, os laços familiares, as experiências de amor e conflito, os vínculos de afinidade e as influências espirituais mútuas são elementos essenciais para a evolução individual. Nesse sentido, a trajetória de cada Espírito está inserida numa teia de relações interdependentes, em que o crescimento de um repercute no crescimento de muitos.</text:p>
      <text:p text:style-name="P3">Essa dimensão relacional do progresso foi sublinhada por pensadores espíritas como Gustave Geley, que cunhou a expressão evolução solidária. Para Geley, não há progresso autêntico sem compromisso com o bem coletivo. “Tudo o que favorece ou retarda a evolução de outrem e a evolução geral favorece ou retarda a evolução de qualquer membro da coletividade”, escreveu. Isso significa que a ascensão espiritual não é apenas individual, mas co-participativa, pois todo esforço no sentido do bem tem repercussões coletivas, assim como todo ato de egoísmo ou violência atinge, de algum modo, o equilíbrio geral.</text:p>
      <text:p text:style-name="P3">Essa noção encontra eco nas ideias de Kardec sobre a finalidade social da encarnação. Em <text:span text:style-name="T1">O Livro dos Espíritos</text:span>, ele afirma: “A ação dos seres corpóreos é necessária à marcha do universo. Deus, porém, na sua sabedoria, quis que nessa mesma ação eles encontrassem um meio de progredir e de se aproximar dele.” (Introdução, item VI). Ou seja, contribuir para a ordem do mundo e para o bem do próximo faz parte do próprio processo de crescimento espiritual.</text:p>
      <text:h text:style-name="P5" text:outline-level="3"><text:bookmark-start text:name="limites-da-compreensão-humana"/>Limites da compreensão humana<text:bookmark-end text:name="limites-da-compreensão-humana"/></text:h>
      <text:p text:style-name="P2">A filosofia espírita reconhece que, apesar dos esforços de sistematização e raciocínio, certas questões permanecem envoltas em mistério, sobretudo aquelas que dizem respeito aos primeiros instantes da trajetória espiritual. Por exemplo, como explicar a escolha entre o bem e o mal por um Espírito ainda ignorante, sem pleno uso do livre-arbítrio? Kardec admite a limitação do nosso entendimento sobre esse ponto. A perfectibilidade, embora seja um dado da criação, só se manifesta plenamente com o amadurecimento da consciência e da liberdade – processos que não ocorrem instantaneamente, mas ao longo de vastos períodos de tempo e experiência.</text:p>
      <text:p text:style-name="P3">Essa limitação epistemológica, longe de invalidar a proposta espírita, ressalta o valor da humildade intelectual e da abertura a novos avanços do conhecimento, tanto espiritual quanto científico. O progresso do Espírito é também progresso do saber humano, e o Espiritismo não pretende dar respostas definitivas, mas propor uma estrutura racional e ética para a compreensão da vida espiritual, em constante diálogo com a razão, a ciência e a experiência.</text:p>
      <text:h text:style-name="P5" text:outline-level="3"><text:bookmark-start text:name="a-paz-como-fruto-do-progresso"/>A paz como fruto do progresso<text:bookmark-end text:name="a-paz-como-fruto-do-progresso"/></text:h>
      <text:p text:style-name="P2">À medida que progride, o Espírito se torna mais livre, mais lúcido e mais compassivo. Liberta-se das ilusões do ego, das paixões desordenadas, dos condicionamentos materiais e dos impulsos destrutivos. Ele compreende melhor as leis divinas, sente-se unido ao todo e age movido por princípios mais elevados. Essa libertação é acompanhada por uma paz interior duradoura, que <text:soft-page-break/>não depende das circunstâncias externas, mas do alinhamento entre consciência, propósito e ação.</text:p>
      <text:p text:style-name="P3">Por outro lado, como observou Geley, ninguém avança sozinho. O Espírito maduro renuncia a expectativas meramente individuais para investir no bem comum. Ele compreende que a felicidade não é posse egoísta, mas estado de alma partilhado e cultivado em rede. As provas, expiações e missões que vivencia jamais são eventos isolados, mas envolvem os demais Espíritos com os quais mantém vínculos de afeto, responsabilidade e reparação. É nessa trama de relações que o progresso se concretiza, e é nela que a verdadeira espiritualidade floresce.</text:p>
      <text:h text:style-name="P5" text:outline-level="3"><text:bookmark-start text:name="conclusão-2"/>Conclusão<text:bookmark-end text:name="conclusão-2"/></text:h>
      <text:p text:style-name="P2">O progresso espiritual é, na filosofia espírita, a finalidade da existência e a chave para compreender a trajetória da alma. Ele não se limita ao acúmulo de conhecimento ou à prática de rituais, mas exige uma transformação profunda da consciência, da conduta e das intenções. Essa evolução é movida pela perfectibilidade do Espírito, realizada por meio da experiência vivida, e sustentada pela solidariedade universal. É um caminho de liberdade e responsabilidade, de autoconhecimento e doação, de sabedoria e amor.</text:p>
      <text:p text:style-name="P3">Como ensina Kardec, a humanidade encontrará sua felicidade apenas quando unir o progresso intelectual ao progresso moral – e o Espiritismo, ao revelar essa meta e fornecer os instrumentos para alcançá-la, oferece uma das mais poderosas alavancas da renovação espiritual do ser humano.</text:p>
      <text:h text:style-name="P1" text:outline-level="2"><text:bookmark-start text:name="reencarnação"/>Reencarnação<text:bookmark-end text:name="reencarnação"/></text:h>
      <text:p text:style-name="P2">A reencarnação é um dos pilares fundamentais da Doutrina Espírita e o mecanismo central pelo qual se realiza o progresso do Espírito. Conforme ensinam os Espíritos superiores em <text:span text:style-name="T1">O Livro dos Espíritos</text:span>, trata-se de uma lei natural, justa e necessária, sem a qual a justiça divina pareceria incompleta, e o desenvolvimento do ser espiritual seria impossível de se cumprir plenamente em uma só existência.</text:p>
      <text:h text:style-name="P5" text:outline-level="3"><text:bookmark-start text:name="a-reencarnação-como-ideia-universal"/>A reencarnação como ideia universal<text:bookmark-end text:name="a-reencarnação-como-ideia-universal"/></text:h>
      <text:p text:style-name="P2">A ideia da reencarnação não é exclusividade do Espiritismo moderno. Desde a Antiguidade, encontramos registros dessa concepção em diversas culturas. No Egito, por volta de 3000 a.C., textos afirmavam que “antes de nascer a criança viveu, e a morte não é o fim”. Entre os hindus, o princípio da reencarnação era ensinado pelos Vedas sob o nome de metempsicose, frequentemente associado ao conceito de carma, segundo o qual as ações passadas determinam as condições da vida presente. Na Grécia antiga, pensadores como Pitágoras, Sócrates e Platão também discutiram a palingenesia, ou vidas sucessivas, como parte do aperfeiçoamento da alma.</text:p>
      <text:p text:style-name="P3">Nos tempos modernos, além do testemunho das tradições filosóficas e religiosas, a reencarnação passou a ser objeto de investigação empírica, especialmente no campo da psiquiatria infantil. Destaca-se o trabalho pioneiro de Ian Stevenson, da Universidade da Virgínia, que viajou o <text:soft-page-break/>mundo documentando relatos de crianças que afirmavam recordar de vidas anteriores. Suas pesquisas, reunidas em obras como <text:span text:style-name="T1">Vinte Casos Sugestivos de Reencarnação</text:span>, seguem influentes até hoje, sendo continuadas por estudiosos como Jim Tucker, com destaque para o livro <text:span text:style-name="T1">Vida Antes da Vida</text:span>. No Brasil, o pesquisador espírita Hernani Guimarães Andrade também contribuiu significativamente ao estudo de casos que sugerem a veracidade da reencarnação.</text:p>
      <text:h text:style-name="P5" text:outline-level="3"><text:bookmark-start text:name="o-que-é-a-reencarnação"/>O que é a reencarnação?<text:bookmark-end text:name="o-que-é-a-reencarnação"/></text:h>
      <text:p text:style-name="P2">Do ponto de vista espírita, reencarnar significa retornar à vida corporal. Após um período de existência no plano espiritual (erraticidade), o Espírito une-se a um novo corpo por meio do perispírito, iniciando nova etapa na matéria. Cada existência é única, mas se insere em um processo contínuo de aprendizado, expiação, missão e evolução moral e intelectual. Ao contrário da metempsicose — segundo a qual um ser humano poderia reencarnar como animal — o Espiritismo afirma que o Espírito não retrocede na escala evolutiva: suas experiências sucessivas se dão sempre no plano humano, ainda que com variadas condições de existência.</text:p>
      <text:h text:style-name="P5" text:outline-level="3"><text:bookmark-start text:name="razões-para-reencarnar"/>Razões para reencarnar<text:bookmark-end text:name="razões-para-reencarnar"/></text:h>
      <text:p text:style-name="P2">A reencarnação atende a dois objetivos fundamentais:</text:p>
      <text:list text:style-name="L6">
        <text:list-item>
          <text:p text:style-name="P10">Expiação e prova: permite ao Espírito colher as consequências de suas ações passadas, superar tendências inferiores e corrigir desvios morais.</text:p>
        </text:list-item>
        <text:list-item>
          <text:p text:style-name="P10">Missão e aprendizado: possibilita o exercício do bem, a aquisição de virtudes e o desenvolvimento das faculdades intelectuais.</text:p>
        </text:list-item>
      </text:list>
      <text:p text:style-name="P2">Esse duplo aspecto evidencia que a reencarnação não é castigo, mas sim instrumento de justiça e de amor divinos, que oferece a todos os Espíritos as mesmas oportunidades de progresso. Como afirma Kardec, “a passagem dos Espíritos pela vida corporal é necessária para que possam cumprir, por meio de uma ação material, os desígnios cuja execução Deus lhes confia” (<text:span text:style-name="T1">LE</text:span>, q. 132).</text:p>
      <text:h text:style-name="P5" text:outline-level="3"><text:bookmark-start text:name="esquecimento-do-passado"/>Esquecimento do passado<text:bookmark-end text:name="esquecimento-do-passado"/></text:h>
      <text:p text:style-name="P2">Durante a encarnação, o Espírito perde o acesso direto à memória consciente de suas vidas anteriores. Esse esquecimento temporário é compreendido como um mecanismo protetor, que favorece a liberdade de ação e impede o surgimento de ressentimentos que poderiam dificultar a convivência com antigos desafetos, agora reencarnados como familiares ou colegas. No entanto, os traços morais, inclinações e aptidões permanecem, manifestando-se como tendências naturais do indivíduo.</text:p>
      <text:h text:style-name="P5" text:outline-level="3"><text:bookmark-start text:name="reencarnação-e-laços-afetivos"/>Reencarnação e laços afetivos<text:bookmark-end text:name="reencarnação-e-laços-afetivos"/></text:h>
      <text:p text:style-name="P2">A reencarnação também explica os vínculos profundos e recorrentes entre Espíritos. Os laços afetivos, os reencontros familiares e até certas inimizades persistentes são vistos como <text:soft-page-break/>expressões de uma pedagogia espiritual, em que os Espíritos se reencontram para ajustar débitos, renovar sentimentos e construir solidariedade. O lar, nesse sentido, é uma escola recíproca, onde o perdão, a empatia e o amor são exercitados.</text:p>
      <text:h text:style-name="P5" text:outline-level="3"><text:bookmark-start text:name="reencarnação-na-história-e-na-linguagem"/>Reencarnação na história e na linguagem<text:bookmark-end text:name="reencarnação-na-história-e-na-linguagem"/></text:h>
      <text:p text:style-name="P2">Embora alguns autores tenham atribuído a Kardec a criação do termo “reencarnação”, a palavra já circulava na Europa antes do século XIX. Os termos latinos <text:span text:style-name="T1">reincarnatio</text:span> e <text:span text:style-name="T1">reincarnationis</text:span> aparecem entre os séculos XVI e XVIII, sendo posteriormente incorporados a várias línguas modernas. O que Kardec fez foi sistematizar o conceito, conferindo-lhe coerência lógica, racionalidade filosófica e suporte empírico, especialmente no contexto da justiça divina e do progresso espiritual.</text:p>
      <text:h text:style-name="P5" text:outline-level="3"><text:bookmark-start text:name="a-coerência-filosófica-e-científica-da-reencarnação"/>A coerência filosófica e científica da reencarnação<text:bookmark-end text:name="a-coerência-filosófica-e-científica-da-reencarnação"/></text:h>
      <text:p text:style-name="P2">Na obra kardequiana, a reencarnação é apresentada como necessidade filosófica e lógica para explicar os contrastes da vida e garantir a imparcialidade das leis divinas. Como observa Kardec:</text:p>
      <text:p text:style-name="P11">“Quando se trata de remontar dos efeitos às causas, a reencarnação surge como uma necessidade absoluta, como condição inerente à humanidade; numa palavra: como lei da Natureza.” (<text:span text:style-name="T1">LE</text:span>, q. 171)</text:p>
      <text:p text:style-name="P2">Além disso, ela confere ao Espírito continuidade de identidade e sentido para os sofrimentos, as desigualdades e as aparentes injustiças do mundo. A cada vida, o Espírito traz consigo tudo que adquiriu em inteligência e moralidade, bem como os germes das imperfeições que ainda deve superar.</text:p>
      <text:p text:style-name="P3">Em paralelo, os estudos contemporâneos de casos sugestivos de vidas passadas — como os realizados por Stevenson, Tucker e Andrade — fornecem evidências empíricas que, embora não conclusivas para a ciência materialista, são altamente compatíveis com o paradigma espírita e abrem campo para futuras investigações interdisciplinares.</text:p>
      <text:h text:style-name="P5" text:outline-level="3"><text:bookmark-start text:name="permanência-e-diversidade-de-mundos"/>Permanência e diversidade de mundos<text:bookmark-end text:name="permanência-e-diversidade-de-mundos"/></text:h>
      <text:p text:style-name="P2">A Doutrina Espírita também refuta a ideia de que o Espírito reencarna apenas uma vez em cada planeta. Como destaca Kardec, o fato de encontrarmos na Terra Espíritos em todos os graus de evolução — da barbárie à civilização — demonstra que o nosso mundo é um ambiente adequado para múltiplos estágios de progresso. Mudanças constantes de mundo gerariam obstáculos à continuidade do aprendizado, tanto intelectual quanto moral. A permanência por mais de uma encarnação em um mesmo planeta favorece a consolidação de laços afetivos, o amadurecimento do Espírito e a reparação de erros anteriores.</text:p>
      <text:p text:style-name="P3">Não obstante, há consenso na Doutrina Espírita de que, ao alcançar determinado grau de evolução, o Espírito deixa o mundo atual para reencarnar em planetas mais adiantados, compatíveis com seu nível de progresso. O universo, com suas centenas de bilhões de planetas, <text:soft-page-break/>constitui, assim, um campo vastíssimo para as experiências evolutivas.</text:p>
      <text:h text:style-name="P5" text:outline-level="3"><text:bookmark-start text:name="implicações-morais-e-existenciais"/>Implicações morais e existenciais<text:bookmark-end text:name="implicações-morais-e-existenciais"/></text:h>
      <text:p text:style-name="P2">A reencarnação possui importantes implicações morais. Ela convida à autoresponsabilidade, à paciência com as provas, ao respeito às diferenças e à solidariedade universal. Nenhum sofrimento é em vão; nenhum mérito é perdido. Cada existência é uma oportunidade de crescimento, de resgate e de serviço. Como bem afirmam os Espíritos:</text:p>
      <text:p text:style-name="P11">“Na existência corporal é que põe em prática as ideias que adquiriu.” (<text:span text:style-name="T1">LE</text:span>, q. 226)</text:p>
      <text:p text:style-name="P2">A reencarnação também dissolve fronteiras culturais e religiosas: ao afirmar que todos os Espíritos são criados iguais e destinados ao mesmo fim, ela derruba a ideia de privilégios eternos e convida à fraternidade entre todos os povos e raças.</text:p>
      <text:h text:style-name="P5" text:outline-level="3"><text:bookmark-start text:name="considerações-finais"/>Considerações finais<text:bookmark-end text:name="considerações-finais"/></text:h>
      <text:p text:style-name="P2">Em síntese, a reencarnação é chave de leitura para compreender a vida espiritual, a justiça divina e o sentido da existência. Longe de ser apenas uma crença religiosa, é uma hipótese racional, coerente e aberta à investigação, que encontra respaldo em tradições milenares, dados empíricos e reflexões filosóficas. Para o Espiritismo, ela revela um universo em constante movimento, onde cada Espírito é arquiteto de seu próprio destino, e a pluralidade das vidas corporais é o caminho pelo qual se atinge a plenitude.</text:p>
      <text:p text:style-name="P3">Sob a luz da reencarnação, a vida deixa de ser um evento isolado para tornar-se um percurso solidário e progressivo, rumo à sabedoria, à harmonia e ao amor universal – metas últimas da jornada espiritual.</text:p>
      <text:h text:style-name="P1" text:outline-level="2"><text:bookmark-start text:name="mediunidade"/>Mediunidade<text:bookmark-end text:name="mediunidade"/></text:h>
      <text:p text:style-name="P2">A mediunidade é o conjunto de faculdades que permitem ao ser humano perceber, receber ou transmitir comunicações dos Espíritos. Ela constitui um fenômeno natural, regido por leis psíquicas e fluídicas, e está presente em graus variados em todos os indivíduos, embora apenas alguns apresentem sensibilidade suficiente para atuar como médiuns ostensivos. Para a Doutrina Espírita, a mediunidade não é privilégio nem dom sobrenatural, mas uma faculdade orgânica e moralmente neutra, que pode ser desenvolvida, educada e direcionada ao bem.</text:p>
      <text:p text:style-name="P3">Na conclusão de <text:span text:style-name="T1">O Livro dos Espíritos</text:span>, Allan Kardec esclarece que o Espiritismo apresenta-se sob três aspectos complementares: o das manifestações dos Espíritos, o dos princípios filosóficos e o da aplicação moral desses princípios. Assim, a mediunidade, longe de ser um apêndice acessório da doutrina, é parte integrante e fundante de sua estrutura conceitual e prática. Ignorá-la, negligenciá-la ou suprimi-la equivale a amputar uma dimensão essencial do pensamento espírita.</text:p>
      <text:h text:style-name="P5" text:outline-level="3"><text:bookmark-start text:name="a-naturalização-da-mediunidade"/><text:soft-page-break/>A naturalização da mediunidade<text:bookmark-end text:name="a-naturalização-da-mediunidade"/></text:h>
      <text:p text:style-name="P2">Ao estudar os fenômenos mediúnicos com método, crítica e rigor, Kardec retirou a mediunidade do campo do misticismo e do sobrenatural, compreendendo-a como uma função humana natural, passível de investigação e regulamentação. A comunicação com os Espíritos, que ao longo da história foi tratada como sagrada, mágica ou demoníaca, passou a ser compreendida como uma extensão das leis que regem o ser espiritual e sua relação com o universo fluídico. Esse avanço foi revolucionário, pois rompeu com o monopólio religioso sobre a experiência espiritual.</text:p>
      <text:p text:style-name="P3">Historicamente, o intercâmbio espiritual esteve reservado a castas sacerdotais ou interditado pelas tradições religiosas dominantes. Médiuns foram perseguidos, demonizados ou manipulados por instituições religiosas, especialmente na tradição judaico-cristã, que proibiu expressamente essas práticas (como se lê em Levítico 20:6 e 20:27) e as associou à bruxaria e à heresia. Em muitos casos, a mediunidade foi sufocada sob o peso da superstição, da intolerância e do poder dogmático.</text:p>
      <text:p text:style-name="P3">Kardec devolveu a mediunidade ao povo. Ao propor que “todo aquele que sente, em grau qualquer, a influência dos Espíritos é, por isso mesmo, médium” (<text:span text:style-name="T1">O Livro dos Médiuns</text:span>, cap. XIV), ele universalizou o fenômeno, revelando que se trata de uma interface fluídica entre os planos da existência, e não de uma prerrogativa de eleitos. Ao mesmo tempo, defendeu que seu exercício deve ser livre, acessível e metódico, mas jamais negligente ou irresponsável.</text:p>
      <text:h text:style-name="P5" text:outline-level="3"><text:bookmark-start text:name="as-bases-da-mediunidade-fluido-perispírito-e-sintonia"/>As bases da mediunidade: fluido, perispírito e sintonia<text:bookmark-end text:name="as-bases-da-mediunidade-fluido-perispírito-e-sintonia"/></text:h>
      <text:p text:style-name="P2">A mediunidade, do ponto de vista espírita, assenta-se na interação entre o perispírito do médium e o do Espírito comunicante, mediada por uma substância sutil conhecida como fluido universal – “elemento básico do universo” (<text:span text:style-name="T1">A Gênese</text:span>, cap. XIV). Sob a ação do pensamento, esse fluido pode ser moldado, transmitido e transformado, funcionando como meio de expressão entre os dois planos da vida.</text:p>
      <text:p text:style-name="P3">O perispírito, por sua vez, atua como instrumento de captação, condensação e emissão do fluido, viabilizando os processos de comunicação entre Espíritos encarnados e desencarnados. A qualidade das comunicações depende de múltiplos fatores: afinidade moral, sintonia vibratória, disciplina mental e emocional, e elevação dos propósitos envolvidos. Não há mágica, apenas leis naturais atuando de forma ainda sutil à percepção comum.</text:p>
      <text:p text:style-name="P3">Essa visão reafirma a natureza relacional e sistêmica da mediunidade. O médium é um elo de uma cadeia mais ampla, e seu funcionamento depende do equilíbrio do conjunto: da harmonia do grupo, da pureza das intenções, do esclarecimento doutrinário e da vigilância íntima.</text:p>
      <text:h text:style-name="P5" text:outline-level="3"><text:bookmark-start text:name="variedades-da-mediunidade"/>Variedades da mediunidade<text:bookmark-end text:name="variedades-da-mediunidade"/></text:h>
      <text:p text:style-name="P2">A classificação proposta por Kardec, embora não exaustiva, permite compreender a amplitude e diversidade dos fenômenos mediúnicos. Entre as principais formas, destacam-se:</text:p>
      <text:list text:style-name="L7">
        <text:list-item>
          <text:p text:style-name="P12">Mediunidade intuitiva – mais comum, ocorre quando o médium capta ideias ou <text:soft-page-break/>pensamentos do Espírito em sua própria consciência;</text:p>
        </text:list-item>
        <text:list-item>
          <text:p text:style-name="P12">Mediunidade psicográfica – comunicação pela escrita, como exemplificado nas obras de Chico Xavier;</text:p>
        </text:list-item>
        <text:list-item>
          <text:p text:style-name="P12">Mediunidade falante – manifestação pela fala, com variação no grau de consciência do médium;</text:p>
        </text:list-item>
        <text:list-item>
          <text:p text:style-name="P12">Mediunidade de efeitos físicos – manifestações tangíveis como ruídos, levitações, materializações ou curas;</text:p>
        </text:list-item>
        <text:list-item>
          <text:p text:style-name="P12">Mediunidade vidente e auditiva – percepção direta de imagens ou vozes espirituais.</text:p>
        </text:list-item>
      </text:list>
      <text:p text:style-name="P2">As categorias podem combinar-se, e sua relevância está menos na forma que assumem do que no propósito com que se manifestam: educar, esclarecer, consolar e despertar o ser para sua dimensão espiritual.</text:p>
      <text:h text:style-name="P5" text:outline-level="3"><text:bookmark-start text:name="a-finalidade-superior-da-mediunidade"/>A finalidade superior da mediunidade<text:bookmark-end text:name="a-finalidade-superior-da-mediunidade"/></text:h>
      <text:p text:style-name="P2">A mediunidade tem por fim a elevação do ser, não o espetáculo ou o lucro. Qualquer uso voltado à vaidade, à adivinhação vulgar, ao comércio de crenças ou à manipulação emocional é contrário à ética espírita e gera consequências morais e fluídicas negativas, tanto para o médium quanto para os Espíritos envolvidos.</text:p>
      <text:p text:style-name="P3">Quando bem conduzida, a mediunidade torna-se instrumento de caridade e de elevação, permitindo:</text:p>
      <text:list text:style-name="L8">
        <text:list-item>
          <text:p text:style-name="P13">O socorro a Espíritos sofredores;</text:p>
        </text:list-item>
        <text:list-item>
          <text:p text:style-name="P13">A transmissão de mensagens de consolo, orientação e amor;</text:p>
        </text:list-item>
        <text:list-item>
          <text:p text:style-name="P13">A disseminação de ensinamentos espirituais profundos;</text:p>
        </text:list-item>
        <text:list-item>
          <text:p text:style-name="P13">O fortalecimento da fé raciocinada na continuidade da vida.</text:p>
        </text:list-item>
      </text:list>
      <text:h text:style-name="P5" text:outline-level="3"><text:bookmark-start text:name="mediunidade-crítica-e-o-risco-do-espiritismo-sem-espíritos"/>Mediunidade, crítica e o risco do “Espiritismo sem Espíritos”<text:bookmark-end text:name="mediunidade-crítica-e-o-risco-do-espiritismo-sem-espíritos"/></text:h>
      <text:p text:style-name="P2">Apesar de sua centralidade na Doutrina Espírita, observa-se um fenômeno preocupante no movimento espírita contemporâneo: a progressiva marginalização da mediunidade em nome de uma pretensa racionalidade doutrinária. Cresce o número de espíritas que nunca presenciaram uma reunião mediúnica, que se afastam da prática ou sequer acreditam em sua utilidade. Paralelamente, dissemina-se nas redes sociais um discurso de ceticismo quanto à validade das comunicações, levando àquilo que se tem chamado de “Espiritismo sem Espíritos”.</text:p>
      <text:p text:style-name="P3">Esse movimento, embora às vezes motivado por justa cautela frente aos excessos e mistificações, representa um retrocesso. A Doutrina Espírita nasceu da observação e análise crítica das manifestações dos Espíritos. Negar ou desprezar a mediunidade é negar o próprio método de Kardec. O remédio para os abusos não é o abandono, mas o estudo sério, o exercício responsável <text:soft-page-break/>e o compromisso com a verdade.</text:p>
      <text:h text:style-name="P5" text:outline-level="3"><text:bookmark-start text:name="vigilância-ética-e-responsabilidade"/>Vigilância, ética e responsabilidade<text:bookmark-end text:name="vigilância-ética-e-responsabilidade"/></text:h>
      <text:p text:style-name="P2">Pela sua natureza sensível, a mediunidade exige formação doutrinária, equilíbrio emocional e disciplina constante. Os riscos associados ao seu mau uso são reais: obsessões, fascinação, desequilíbrios físicos e psíquicos, exposição a Espíritos mistificadores. A proteção contra tais riscos está no conhecimento lúcido da Doutrina, na humildade sincera e na orientação por grupos sérios e bem preparados.</text:p>
      <text:p text:style-name="P3">A vigilância não implica repressão ou medo, mas maturidade espiritual. É necessário superar a ingenuidade que vê nos Espíritos autoridades infalíveis, bem como o personalismo que confere ao médium um prestígio indevido. Espíritos são seres humanos desencarnados, sujeitos a erros, paixões e ilusões, e os médiuns são instrumentos falíveis, que devem buscar o autoaperfeiçoamento constante.</text:p>
      <text:h text:style-name="P5" text:outline-level="3"><text:bookmark-start text:name="mediunidade-e-transformação-espiritual"/>Mediunidade e transformação espiritual<text:bookmark-end text:name="mediunidade-e-transformação-espiritual"/></text:h>
      <text:p text:style-name="P2">A mediunidade, quando aliada à vivência evangélica, torna-se um caminho de reforma íntima e de engajamento no bem. Ao entrar em contato com as dores do mundo espiritual, o médium é convidado à empatia, ao serviço e à humildade. Ao lidar com ensinamentos superiores, é chamado à coerência, ao estudo e à renovação de si mesmo.</text:p>
      <text:p text:style-name="P3">Em sentido mais amplo, a mediunidade reflete o estágio evolutivo da humanidade. Estamos nos tornando mais sensíveis às realidades espirituais, mais abertos ao sutil, mais conscientes de nossa interdependência. O fenômeno mediúnico pode ser interpretado como uma expressão da emergência de uma consciência mais ampla, mais conectada e mais compassiva – em sintonia com as ideias do pensamento sistêmico e da complexidade.</text:p>
      <text:p text:style-name="P3">Essa leitura amplia o horizonte da mediunidade: ela deixa de ser apenas um canal de mensagens e se torna um campo de desenvolvimento da consciência, uma prática de integração entre mundos, uma ponte entre razão e espírito, ciência e transcendência.</text:p>
      <text:p text:style-name="P2">Em síntese, a mediunidade é um fenômeno natural, educativo e transformador, que ocupa lugar essencial no tripé doutrinário do Espiritismo. Quando compreendida em sua profundidade, praticada com ética e iluminada pela razão e pelo amor, ela se revela como um dos mais belos testemunhos da continuidade da vida, da solidariedade entre os mundos e da possibilidade real de comunhão entre os seres em evolução. Desconsiderar essa dimensão é reduzir o alcance do Espiritismo; cultivá-la com sabedoria é participar da obra de regeneração moral e espiritual da humanidade.</text:p>
      <text:h text:style-name="P1" text:outline-level="2"><text:bookmark-start text:name="consequências-morais"/>Consequências morais<text:bookmark-end text:name="consequências-morais"/></text:h>
      <text:p text:style-name="P2">Embora o Espiritismo se apresente como uma doutrina de consequências científicas, filosóficas e morais, é neste último aspecto – o moral – que se encontra seu objetivo mais elevado e transformador. Como esclarecem os próprios Espíritos superiores, o valor essencial do <text:soft-page-break/>Espiritismo não está nos fenômenos mediúnicos, nem no acervo conceitual que oferece à filosofia e à ciência, mas na capacidade de promover a regeneração interior do ser humano, iluminando sua consciência com as leis universais do amor, da justiça e da caridade.</text:p>
      <text:p text:style-name="P3">Allan Kardec foi categórico ao afirmar que o Espiritismo não veio revelar mistérios sobrenaturais, mas relembrar à humanidade a moral de Jesus, liberta de dogmas e distorções institucionais. Em <text:span text:style-name="T1">O Evangelho Segundo o Espiritismo</text:span>, o codificador sintetiza o núcleo ético da doutrina na máxima: “Fora da caridade não há salvação”. Essa frase, simples e revolucionária, desloca o eixo da salvação da crença cega para a vivência ativa do bem. Salvar-se, no Espiritismo, é evoluir pela prática consciente da fraternidade.</text:p>
      <text:h text:style-name="P5" text:outline-level="3"><text:bookmark-start text:name="a-caridade-como-expressão-máxima-da-moral-espírita"/>A caridade como expressão máxima da moral espírita<text:bookmark-end text:name="a-caridade-como-expressão-máxima-da-moral-espírita"/></text:h>
      <text:p text:style-name="P2">No contexto espírita, a caridade transcende o sentido habitual de doação material. Ela é entendida como amor em ação, traduzido em gestos de benevolência, indulgência e perdão. Trata-se de uma disposição profunda de acolher, compreender e servir ao próximo, reconhecendo em cada ser humano um irmão em jornada evolutiva.</text:p>
      <text:p text:style-name="P3">Essa caridade não exige perfeição, mas sinceridade de propósitos e esforço contínuo de superação do egoísmo. Ela começa na intimidade do lar, no convívio com os mais próximos, e se estende à coletividade, em atitudes solidárias, respeitosas e construtivas. O verdadeiro espírita, dizem os Espíritos, é aquele que “se esforça por domar suas más inclinações” (<text:span text:style-name="T1">O Evangelho Segundo o Espiritismo</text:span>, cap. XVII), sinalizando que a moralidade é um caminho dinâmico e pessoal, não uma máscara de virtudes aparentes.</text:p>
      <text:h text:style-name="P5" text:outline-level="3"><text:bookmark-start text:name="uma-ética-universal-racional-e-progressiva"/>Uma ética universal, racional e progressiva<text:bookmark-end text:name="uma-ética-universal-racional-e-progressiva"/></text:h>
      <text:p text:style-name="P2">A moral espírita distingue-se por ser universalista, racional e progressiva. Ela não se funda em mandamentos impostos de fora para dentro, mas na consciência do Espírito, onde está inscrita, segundo os ensinamentos espirituais, a lei natural de Deus. Essa lei manifesta-se como um senso interno de justiça, dever e empatia, que amadurece à medida que o Espírito evolui.</text:p>
      <text:p text:style-name="P3">Sendo universal, a moral espírita transcende religiões, culturas e épocas. Seu fundamento não é um código exógeno, mas a harmonia entre liberdade e responsabilidade, entre individualidade e solidariedade. Por isso, ela dialoga com as grandes tradições filosóficas e espirituais da humanidade, ao mesmo tempo em que propõe uma via própria, fundada na reencarnação e na comunicabilidade dos Espíritos.</text:p>
      <text:p text:style-name="P3">Sendo racional, essa moral pode ser compreendida, refletida e aplicada sem exigir adesão cega. Ela convida o ser humano à ética da lucidez, onde fazer o bem é uma escolha consciente de sintonia com as leis universais da vida.</text:p>
      <text:p text:style-name="P3">E sendo progressiva, ela se renova conforme o Espírito avança, exigindo níveis mais sutis de autodomínio, compaixão e serviço. A moralidade não é um fim em si mesma, mas um processo contínuo de refinamento interior, rumo à elevação do sentimento e da consciência.</text:p>
      <text:h text:style-name="P5" text:outline-level="3"><text:bookmark-start text:name="liberdade-moral-e-responsabilidade-espiritual"/><text:soft-page-break/>Liberdade moral e responsabilidade espiritual<text:bookmark-end text:name="liberdade-moral-e-responsabilidade-espiritual"/></text:h>
      <text:p text:style-name="P2">A moral espírita repousa sobre dois pilares fundamentais: liberdade e responsabilidade.</text:p>
      <text:list text:style-name="L9">
        <text:list-item>
          <text:p text:style-name="P14">O Espírito é, por natureza, livre para escolher, pensar, agir e trilhar seus próprios caminhos. Essa liberdade é indispensável ao mérito moral: sem liberdade, não há progresso real.</text:p>
        </text:list-item>
        <text:list-item>
          <text:p text:style-name="P14">Mas a liberdade não é absoluta nem irresponsável. Ela está submetida às leis divinas, especialmente à lei de causa e efeito, segundo a qual toda ação produz consequências naturais e proporcionais – não por punição, mas por aprendizado.</text:p>
        </text:list-item>
      </text:list>
      <text:p text:style-name="P2">Assim, a moral espírita não funciona como um sistema de recompensas e castigos externos, mas como um mecanismo de harmonização entre o ser e a ordem universal. O sofrimento não é castigo arbitrário de um Deus vingativo, mas recurso educativo que convida o Espírito a refletir, reparar e crescer.</text:p>
      <text:h text:style-name="P5" text:outline-level="3"><text:bookmark-start text:name="reparação-e-regeneração"/>Reparação e regeneração<text:bookmark-end text:name="reparação-e-regeneração"/></text:h>
      <text:p text:style-name="P2">O Espiritismo reconhece que o mal existe, mas o compreende como ignorância transitória, e não como condição essencial. Nenhum Espírito é irremediavelmente perdido. Todos, sem exceção, têm diante de si o horizonte infinito da perfeição. Mesmo os erros mais graves podem ser reparados por meio de novas oportunidades reencarnatórias, de provas voluntárias e da prática consciente do bem.</text:p>
      <text:p text:style-name="P3">Essa concepção confere dignidade ao sofrimento e transforma a dor em aliada do progresso. O Espírito compreende que não está sendo punido, mas reeducado, e que a justiça divina se manifesta pela chance constante de recomeço e superação.</text:p>
      <text:h text:style-name="P5" text:outline-level="3"><text:bookmark-start text:name="evolução-moral-e-transformação-interior"/>Evolução moral e transformação interior<text:bookmark-end text:name="evolução-moral-e-transformação-interior"/></text:h>
      <text:p text:style-name="P2">A moralidade espírita é, sobretudo, experiencial e transformadora. Não se limita a enunciados teóricos, mas se expressa em atitudes cotidianas, na maneira como o indivíduo se relaciona consigo mesmo, com os outros e com o mundo.</text:p>
      <text:p text:style-name="P3">Evoluir espiritualmente, à luz do Espiritismo, é:</text:p>
      <text:list text:style-name="L10">
        <text:list-item>
          <text:p text:style-name="P15">Domar o orgulho, o egoísmo e a intolerância;</text:p>
        </text:list-item>
        <text:list-item>
          <text:p text:style-name="P15">Desenvolver a empatia, o perdão e a compaixão;</text:p>
        </text:list-item>
        <text:list-item>
          <text:p text:style-name="P15">Buscar a coerência entre o pensar, o sentir e o agir;</text:p>
        </text:list-item>
        <text:list-item>
          <text:p text:style-name="P15">Assumir responsabilidade pelas próprias escolhas;</text:p>
        </text:list-item>
        <text:list-item>
          <text:p text:style-name="P15">Servir à coletividade com humildade e alegria.</text:p>
        </text:list-item>
      </text:list>
      <text:p text:style-name="P2">Essa transformação é gradativa, pessoal e intransferível. Não basta professar o Espiritismo; é <text:soft-page-break/>preciso viver seus princípios, colocando-os em prática nas circunstâncias mais simples e nos desafios mais complexos da existência.</text:p>
      <text:h text:style-name="P5" text:outline-level="3"><text:bookmark-start text:name="uma-moral-para-o-mundo-em-transição"/>Uma moral para o mundo em transição<text:bookmark-end text:name="uma-moral-para-o-mundo-em-transição"/></text:h>
      <text:p text:style-name="P2">Num mundo marcado por desigualdades, violência e materialismo, o aspecto moral da Doutrina Espírita oferece uma ética de esperança e de reconciliação. Ele propõe um novo pacto com a vida: não mais baseado na competição ou no medo, mas na cooperação, na fraternidade e no amor lúcido.</text:p>
      <text:p text:style-name="P3">Essa moral não é apenas individual, mas tem implicações sociais e planetárias. Ela convida à construção de um mundo mais justo, solidário e sustentável, onde cada ser é reconhecido como parte de um todo interdependente. Nesse sentido, o pensamento espírita encontra afinidade com o pensamento sistêmico e com as correntes contemporâneas de ecologia profunda e ética relacional.</text:p>
      <text:p text:style-name="P16"/>
      <text:p text:style-name="P2">Em síntese, o aspecto moral da Doutrina Espírita é a expressão viva de sua vocação transformadora. Ele oferece ao Espírito humano não um código imposto de fora, mas um chamado interior à lucidez, à compaixão e à elevação. Ao propor uma ética fundamentada na liberdade consciente, na responsabilidade amorosa e no aperfeiçoamento contínuo, o Espiritismo convida cada indivíduo a fazer da própria existência um caminho de luz, de paz e de construção do bem – uma jornada que une razão e sentimento, conhecimento e ação, ciência e espiritualidade.</text:p>
      <text:h text:style-name="P1" text:outline-level="2"><text:bookmark-start text:name="espiritismo-cartesiano"/>Espiritismo cartesiano<text:bookmark-end text:name="espiritismo-cartesiano"/></text:h>
      <text:p text:style-name="P2">Apesar de seu caráter progressista e inovador para o século XIX, a Doutrina Espírita nasceu dentro de um contexto cultural e científico profundamente influenciado pela visão de mundo cartesiana e mecanicista, predominante na Europa da época. Como resultado, embora tenha proposto uma nova concepção da vida e da espiritualidade, o Espiritismo preserva, em alguns de seus elementos, certos traços conceituais herdados do paradigma dualista da modernidade.</text:p>
      <text:h text:style-name="P5" text:outline-level="3"><text:bookmark-start text:name="o-dualismo-mente-corpo"/>O dualismo mente-corpo<text:bookmark-end text:name="o-dualismo-mente-corpo"/></text:h>
      <text:p text:style-name="P2">O primeiro e mais evidente aspecto herdado da filosofia cartesiana é o dualismo ontológico entre Espírito e corpo, ou entre a substância pensante (res cogitans) e a substância material (res extensa). Allan Kardec, embora critique os dogmas religiosos e proponha uma abordagem racional da alma, mantém a distinção clara entre Espírito (princípio imaterial e inteligente) e corpo físico, com o perispírito servindo de mediação entre essas duas instâncias.</text:p>
      <text:p text:style-name="P3">Essa estrutura tripartida – Espírito, perispírito, corpo – embora inovadora em relação ao pensamento religioso tradicional, ainda conserva a ideia de que a mente (ou alma) existe de forma separada e anterior à matéria, o que se alinha a uma forma de substancialismo espiritual típico do dualismo clássico. A proposta sistêmica, como veremos na Parte 3, tende a dissolver <text:soft-page-break/>essas fronteiras, entendendo mente, corpo e ambiente como aspectos indissociáveis de um mesmo sistema vivo e cognitivo.</text:p>
      <text:h text:style-name="P5" text:outline-level="3"><text:bookmark-start text:name="o-modelo-explicativo-linear-e-classificatório"/>O modelo explicativo linear e classificatório<text:bookmark-end text:name="o-modelo-explicativo-linear-e-classificatório"/></text:h>
      <text:p text:style-name="P2">Outro traço cartesiano presente na codificação espírita é o uso de classificações fixas, tabelas hierárquicas e explicações lineares, especialmente visíveis na organização das categorias de Espíritos (puros, bons, imperfeitos), nos graus de mediunidade e nas leis morais sistematizadas. Essa ordenação – embora pedagógica – reflete uma necessidade de sistematização própria do espírito científico do século XIX, ainda fortemente influenciado pela lógica classificatória do Iluminismo e pelas taxonomias da ciência natural.</text:p>
      <text:p text:style-name="P3">Do ponto de vista sistêmico e complexo, entretanto, os processos espirituais e psíquicos são mais fluídos, contextuais e dinâmicos do que as estruturas fixas permitem representar. As fronteiras entre categorias de Espíritos, por exemplo, não são tão rígidas, e a evolução moral pode ocorrer em saltos, regressões e interações complexas com fatores culturais, relacionais e históricos.</text:p>
      <text:h text:style-name="P5" text:outline-level="3"><text:bookmark-start text:name="a-racionalidade-analítica"/>A racionalidade analítica<text:bookmark-end text:name="a-racionalidade-analítica"/></text:h>
      <text:p text:style-name="P2">Kardec foi um racionalista convicto. Para ele, a razão era o principal critério de verdade, e o Espiritismo deveria ser racional em seus fundamentos, experimental em seus métodos e lógico em suas conclusões. Esse esforço foi essencial para diferenciar o Espiritismo das superstições e crendices populares de sua época. No entanto, essa valorização da razão – herdada diretamente do paradigma cartesiano – privilegia o pensamento analítico e dedutivo em detrimento de formas de conhecimento mais integrativas, intuitivas ou relacionais.</text:p>
      <text:p text:style-name="P3">O paradigma sistêmico, por sua vez, amplia o escopo da racionalidade ao incorporar padrões, processos, relações e significados como formas legítimas de inteligibilidade. Ele não abandona a razão, mas a recontextualiza em um universo vivo, interdependente e não-linear, onde a compreensão exige empatia, sensibilidade e abertura à complexidade.</text:p>
      <text:h text:style-name="P5" text:outline-level="3"><text:bookmark-start text:name="a-concepção-mecânica-do-perispírito"/>A concepção mecânica do perispírito<text:bookmark-end text:name="a-concepção-mecânica-do-perispírito"/></text:h>
      <text:p text:style-name="P2">Por fim, é possível identificar no tratamento do perispírito certas analogias com modelos físicos e mecânicos, como se o corpo fluídico obedecesse a leis semelhantes às do eletromagnetismo ou da termodinâmica clássica. Expressões como “fluido vital”, “vibrações”, “densidade” e “irradiação” aparecem com frequência nas obras básicas, revelando uma tentativa de traduzir o espiritual em linguagem técnico-material, ainda limitada pelas categorias da ciência física do século XIX.</text:p>
      <text:p text:style-name="P3">Embora essa estratégia tenha sido útil para justificar os fenômenos mediúnicos perante o saber da época, hoje sabemos que a física moderna (relatividade, mecânica quântica, sistemas complexos) e a biologia contemporânea oferecem modelos mais ricos e coerentes para abordar a relação entre mente, corpo e energia. Tais abordagens permitem conceber o perispírito não como um “objeto sutil”, mas como um padrão dinâmico de organização energética e informacional, mais <text:soft-page-break/>próximo das redes vivas do que de um corpo invisível.</text:p>
      <text:h text:style-name="P5" text:outline-level="3"><text:bookmark-start text:name="separação-entre-sujeito-e-objeto-na-comunicação-mediúnica"/>Separação entre sujeito e objeto na comunicação mediúnica<text:bookmark-end text:name="separação-entre-sujeito-e-objeto-na-comunicação-mediúnica"/></text:h>
      <text:p text:style-name="P2">Outro traço cartesiano sutilmente presente no Espiritismo é a epistemologia que separa sujeito e objeto na prática mediúnica. A comunicação com os Espíritos é muitas vezes descrita em termos quase mecanicistas: o médium atua como um instrumento passivo, que “recebe” uma mensagem transmitida por uma entidade exterior. Essa abordagem pressupõe uma separação rígida entre emissor, canal e receptor, reforçando a ideia de um observador neutro, tal como postulado por Descartes na fundação da ciência moderna.</text:p>
      <text:p text:style-name="P3">Sob a ótica sistêmica, no entanto, a mediunidade pode ser reinterpretada como um processo relacional e coemergente, em que o estado emocional, moral e psíquico do médium – bem como o ambiente e o grupo envolvido – modulam ativamente o conteúdo e a forma da comunicação. A mensagem, nesse caso, não é apenas transmitida, mas cocriada no campo relacional entre os planos.</text:p>
      <text:h text:style-name="P5" text:outline-level="3"><text:bookmark-start text:name="concepção-substancial-da-alma"/>Concepção substancial da alma<text:bookmark-end text:name="concepção-substancial-da-alma"/></text:h>
      <text:p text:style-name="P2">A concepção do Espírito como “ente” dotado de existência própria, anterior e posterior à matéria, guarda proximidade com a noção clássica da alma como substância separável. Apesar da proposta inovadora do perispírito como elo, a estrutura ontológica do ser espiritual ainda é apresentada em termos substanciais, estáveis e essencialistas – elementos típicos da metafísica dualista. A abordagem sistêmica contemporânea, por outro lado, propõe uma visão processual da mente e da subjetividade, em que a consciência é entendida como fenômeno relacional, encarnado e emergente, inseparável da rede de interações vividas.</text:p>
      <text:h text:style-name="P5" text:outline-level="3"><text:bookmark-start text:name="noção-cartesiana-de-verdade-como-correspondência"/>Noção cartesiana de verdade como correspondência<text:bookmark-end text:name="noção-cartesiana-de-verdade-como-correspondência"/></text:h>
      <text:p text:style-name="P2">Por fim, a própria ideia de “verdade espírita” ainda se apoia em um modelo correspondencial de verdade, em que o valor das mensagens espirituais é aferido por sua consistência lógica, universalidade e convergência objetiva. Essa concepção, embora avançada para seu tempo, baseia-se em pressupostos de um sujeito racional que observa, compara e julga fatos espirituais com critérios externos e fixos.</text:p>
      <text:p text:style-name="P3">A visão sistêmica, ao contrário, propõe uma noção de verdade mais contextual e relacional, na qual o conhecimento é construído em rede, através de múltiplos olhares, sensibilidades e interações. O verdadeiro deixa de ser um espelho da realidade objetiva para se tornar uma expressão de coerência dinâmica entre sujeito, meio e sentido.</text:p>
      <text:p text:style-name="P2">Em síntese, a Doutrina Espírita representa uma síntese notável entre espiritualidade e racionalidade científica, mas carrega consigo traços conceituais do paradigma cartesiano de sua época. Reconhecer esses aspectos não diminui seu valor – ao contrário, permite refletir criticamente sobre sua evolução e atualizações possíveis, especialmente à luz das novas abordagens sistêmicas e complexas que emergiram nos séculos XX e XXI. Essa rearticulação <text:soft-page-break/>será o objetivo da Parte 3 desta monografia, dedicada ao Espiritismo Sistêmico.</text:p>
      <text:h text:style-name="P1" text:outline-level="2"><text:bookmark-start text:name="espiritismo-sistêmico"/>Espiritismo Sistêmico<text:bookmark-end text:name="espiritismo-sistêmico"/></text:h>
      <text:p text:style-name="P2">A proposta da Parte III desta monografia é aprofundar o diálogo entre os fundamentos do pensamento sistêmico e os princípios estruturantes da Doutrina Espírita. Se nas partes anteriores delineamos as bases epistemológicas e espirituais desses dois grandes campos de saber, agora buscamos integrar tais perspectivas numa abordagem que seja tanto filosófica quanto operativa, interpretativa e também transformadora. A noção de <text:span text:style-name="T1">Espiritismo Sistêmico</text:span> emerge, nesse sentido, como uma proposta de leitura convergente e dialógica, capaz de ampliar nossa compreensão da realidade espiritual sem abandonar o rigor doutrinário nem a abertura para os paradigmas científicos contemporâneos.</text:p>
      <text:p text:style-name="P3">Ao longo dos últimos cinquenta anos, o pensamento sistêmico consolidou-se como uma alternativa crítica à visão mecanicista, reducionista e linear herdada da modernidade. De acordo com autores como Fritjof Capra, Edgar Morin e Humberto Maturana, a complexidade exige uma nova forma de ver, pensar e agir: uma epistemologia que considere a interdependência, a retroalimentação, os padrões relacionais, a emergência e os níveis múltiplos de organização. O conhecimento deixa de ser uma descrição objetiva e neutra da realidade para tornar-se um modo de inserção ativa, ética e co-evolutiva no tecido da vida. Essa mudança de paradigma não é apenas cognitiva, mas também ética, estética e espiritual.</text:p>
      <text:p text:style-name="P3">A Doutrina Espírita, codificada por Allan Kardec no século XIX, surge como uma filosofia espiritualista racional, que busca compreender o ser humano em sua dimensão integral: corpo, mente e espírito. A partir da investigação metódica das manifestações mediúnicas, Kardec estruturou um corpo doutrinário assentado sobre três pilares: ciência, filosofia e moral. Embora ancorado no racionalismo progressista de sua época, o Espiritismo antecipou questões fundamentais que hoje estão no centro do pensamento sistêmico: a pluralidade dos mundos habitados, a reencarnação como processo evolutivo, a existência de redes espirituais de afinidade, a influência dos estados mentais sobre a realidade e, principalmente, a noção de que tudo no universo está conectado por leis de harmonia e justiça.</text:p>
      <text:p text:style-name="P3">Na medida em que a ciência contemporânea reconhece a insuficiência do paradigma cartesiano-newtoniano e caminha em direção a uma abordagem mais integrativa, relacional e contextualizada, abre-se um espaço fértil para um reencontro com os princípios da espiritualidade – não sob a forma dogmática das religiões institucionalizadas, mas como uma dimensão legítima da realidade e do conhecimento. É nesse ponto de intersecção entre ciência e espiritualidade que o Espiritismo Sistêmico se propõe a atuar. Ele não representa uma ruptura com o legado kardecista, mas sim uma releitura ampliada, que busca atualizar seus conceitos à luz dos avanços da epistemologia da complexidade e da ecologia de saberes.</text:p>
      <text:p text:style-name="P3">A Parte III organiza-se em sete capítulos interdependentes, cada qual abordando um aspecto específico do diálogo entre Espiritismo e pensamento sistêmico. No primeiro capítulo, investigamos as relações entre espírito, mente e consciência, contrapondo o dualismo cartesiano a uma visão integradora em que mente e espírito formam uma unidade complexa e auto-organizada. No segundo, refletimos sobre a evolução espiritual à luz do conceito de emergência, <text:soft-page-break/>reinterpretando o perispírito como campo dinâmico e processual, em constante adaptação às condições evolutivas do ser.</text:p>
      <text:p text:style-name="P3">O terceiro capítulo propõe uma releitura da reencarnação não apenas como um mecanismo de justiça e aprendizado, mas como uma estratégia adaptativa da consciência para explorar diferentes configurações relacionais. A noção de ciclo encarnatório é aqui pensada em paralelo com os ciclos de complexificação nos sistemas vivos. Já no quarto capítulo, tratamos da vida espiritual como rede: uma malha interdependente de vínculos, afinidades, influências e coevoluções. Essa abordagem permite superar a ideia de hierarquias fixas e valorizar os fluxos e interações que moldam a trajetória dos Espíritos.</text:p>
      <text:p text:style-name="P3">No quinto capítulo, propomos uma ética sistêmica do bem, baseada na ideia de que fazer o bem é promover reconexão, integração e harmonia nos campos relacionais. O bem, nesse sentido, não é uma moral abstrata ou uma norma externa, mas uma força de reorganização da vida. Essa ética da conexão tem profundas implicações tanto para a prática mediúnica quanto para o cotidiano das relações humanas. O sexto capítulo, por sua vez, aborda a causalidade complexa, revendo criticamente a noção de “lei de causa e efeito” à luz da não-linearidade, das redes de feedback e da plasticidade espiritual. Aqui, a responsabilidade moral é ampliada e recontextualizada, exigindo uma ética do cuidado com as redes de influência que criamos.</text:p>
      <text:p text:style-name="P3">Por fim, o sétimo capítulo discute a convergência entre ciência, espiritualidade e complexidade, propondo que o Espiritismo Sistêmico pode servir como ponto de interseção entre esses domínios, ao oferecer uma epistemologia espiritual fundamentada na razão, na experiência e na interconexão. Ao invés de substituir os paradigmas científicos ou religiosos, o Espiritismo Sistêmico busca articular suas contribuições num plano mais abrangente de compreensão do real.</text:p>
      <text:p text:style-name="P3">Não se trata, portanto, de reduzir o Espiritismo a uma corrente da ciência da complexidade, tampouco de espiritualizar a ciência sistêmica com categorias doutrinárias. O objetivo é instaurar um diálogo, onde ambos os campos possam se enriquecer mutuamente. O pensamento sistêmico oferece ao Espiritismo uma linguagem conceitual atualizada, capaz de iluminar suas intuições filosóficas com rigor teórico. Por sua vez, o Espiritismo oferece ao pensamento sistêmico uma ontologia espiritual que responde às questões de sentido, valor e finalidade – dimensões frequentemente relegadas ao segundo plano no discurso científico.</text:p>
      <text:p text:style-name="P3">Essa perspectiva integrativa encontra respaldo em autores como Capra e Luisi, que argumentam que os sistemas vivos são sustentados por padrões de organização, fluxos de energia e redes de comunicação que operam de forma auto-organizada e não-linear. A consciência, nesse modelo, não é uma propriedade emergente do cérebro isolado, mas uma expressão de um sistema vivo em interação com seu ambiente. Tal visão está em consonância com a concepção espírita do espírito como princípio inteligente, capaz de atuar sobre a matéria, interagir com outros seres e evoluir por meio da experiência e do aprendizado.</text:p>
      <text:p text:style-name="P3">O desafio contemporâneo é justamente integrar essas abordagens, superando a fragmentação do saber e do ser. Como afirmam diversos pensadores sistêmicos, o conhecimento não pode ser separado da ética, da estética ou da espiritualidade, pois toda forma de conhecer transforma aquele que conhece. A proposta do Espiritismo Sistêmico é, nesse contexto, uma tentativa de pensar o espírito não como um ente isolado que habita o corpo, mas como um nó de relações, <text:soft-page-break/>uma consciência em rede, cuja evolução está intrinsecamente ligada à qualidade das conexões que estabelece.</text:p>
      <text:p text:style-name="P3">Esta Parte III não pretende esgotar esse vasto campo de reflexão, mas oferecer um mapa inicial, um convite à pesquisa, à meditação e ao exercício prático dessas ideias. Ao entrelaçar os fios do pensamento sistêmico com os princípios do Espiritismo, buscamos uma compreensão mais plena da vida, da consciência e do destino humano. Que essa leitura possa despertar nos leitores não apenas uma nova forma de pensar, mas também uma nova forma de sentir, agir e coevoluir.</text:p>
      <text:h text:style-name="P1" text:outline-level="2"><text:bookmark-start text:name="espírito-mente-e-consciência"/>Espírito, mente e consciência<text:bookmark-end text:name="espírito-mente-e-consciência"/></text:h>
      <text:p text:style-name="P2">A Doutrina Espírita, desde suas formulações inaugurais, posiciona o espírito como princípio inteligente do universo, dotado de identidade própria, consciência e capacidade evolutiva. A mente, por sua vez, surge como expressão do espírito encarnado, mediada pelas funções cerebrais e moldada pelas experiências da vida corporal. Tal distinção entre espírito e mente, embora muitas vezes tratada de forma implícita na literatura espírita, revela-se fundamental para compreendermos não apenas a natureza da consciência, mas também os mecanismos pelos quais o espírito se manifesta e transforma em sua jornada evolutiva. Neste capítulo, propomos uma releitura dessa tríade (espírito, mente e consciência) a partir do pensamento sistêmico, superando os limites do dualismo clássico e estabelecendo uma ponte entre ontologia espiritual e ciência da cognição.</text:p>
      <text:h text:style-name="P5" text:outline-level="3"><text:bookmark-start text:name="a-crítica-ao-dualismo-cartesiano"/>A crítica ao dualismo cartesiano<text:bookmark-end text:name="a-crítica-ao-dualismo-cartesiano"/></text:h>
      <text:p text:style-name="P2">A herança filosófica do Ocidente, especialmente a partir de Descartes, impôs uma cisão profunda entre mente e corpo, entre espírito e matéria. O dualismo cartesiano concebe o ser humano como a justaposição de duas substâncias distintas: a res extensa (a substância material, mensurável e extensa) e a res cogitans (a substância pensante, imaterial e autoconsciente). Tal separação, embora tenha servido de base para o desenvolvimento da ciência moderna, implicou também a exclusão da subjetividade, da experiência interior e da consciência como objetos legítimos da investigação racional. Na prática, isso gerou uma ciência sem alma e uma espiritualidade desconectada da realidade concreta.</text:p>
      <text:p text:style-name="P3">O Espiritismo, ao afirmar a existência do espírito como ente real e sua continuidade após a morte física, recupera a dimensão espiritual do ser, mas o faz de maneira que não prescinde da razão. Allan Kardec, influenciado pelo racionalismo iluminista e pelo método experimental, propôs uma abordagem filosófica e empírica da alma, cuja existência era sustentada não por dogmas, mas por evidências extraídas das comunicações mediúnicas repetidas e concordantes. Contudo, a concepção de espírito em Kardec ainda carrega vestígios de uma metafísica substancialista, em que o espírito é concebido como um ser individual, dotado de atributos próprios, porém separado dos processos materiais e cognitivos.</text:p>
      <text:p text:style-name="P3">A partir do pensamento sistêmico, podemos questionar esse modelo substancialista, propondo uma visão mais dinâmica, relacional e processual do espírito e da consciência. O espírito, nesse novo enquadramento, não é um objeto, mas um padrão de organização, um sistema vivo <text:soft-page-break/>autônomo em constante interação com seu ambiente e em evolução permanente. Essa abordagem permite uma compreensão mais integrada dos fenômenos mentais e espirituais, aproximando o Espiritismo das neurociências, da biologia do conhecimento e da filosofia da mente contemporânea.</text:p>
      <text:h text:style-name="P5" text:outline-level="3"><text:bookmark-start text:name="espírito-como-sistema-vivo-autônomo"/>Espírito como sistema vivo autônomo<text:bookmark-end text:name="espírito-como-sistema-vivo-autônomo"/></text:h>
      <text:p text:style-name="P2">Na perspectiva da teoria da complexidade, especialmente conforme desenvolvida por Capra e Luisi, os sistemas vivos não são definidos por sua matéria constitutiva, mas por suas relações internas, seu modo de organização e sua capacidade de autoprodução (autopoiese). O ser vivo é um processo contínuo de produção de si mesmo, que mantém sua identidade através da regeneração incessante de seus componentes. Essa ideia pode ser transposta para a noção de espírito, concebendo-o como uma entidade autopoética, cuja existência não é estática, mas processual: o espírito constrói-se continuamente através de suas experiências, escolhas e interações com outros seres e com o mundo espiritual e material.</text:p>
      <text:p text:style-name="P3">Tal concepção não nega a individualidade espiritual, mas desloca seu fundamento da substância para o padrão relacional. A identidade do espírito não está em uma essência fixa, mas em um conjunto coerente de memórias, disposições, hábitos e valores que se atualizam continuamente. A mente, nesse contexto, pode ser vista como a interface dinâmica entre o espírito e seu corpo de encarnação, o campo de atuação onde se processam as experiências cognitivas, afetivas, simbólicas e volitivas.</text:p>
      <text:h text:style-name="P5" text:outline-level="3"><text:bookmark-start text:name="mente-como-função-sistêmica-encarnada"/>Mente como função sistêmica encarnada<text:bookmark-end text:name="mente-como-função-sistêmica-encarnada"/></text:h>
      <text:p text:style-name="P2">A mente não é, portanto, uma coisa separada do espírito, mas tampouco é idêntica a ele. Ela representa uma expressão particular do espírito encarnado, conformada pelas estruturas neurológicas, pelas experiências culturais e pelos vínculos afetivos que compõem a vida material. Nesse sentido, podemos dizer que a mente é a linguagem do espírito no mundo: um sistema de representação e ação que permite ao espírito experienciar o mundo físico, desenvolver sua inteligência, trabalhar suas emoções e realizar sua evolução moral.</text:p>
      <text:p text:style-name="P3">Do ponto de vista do pensamento sistêmico, essa concepção da mente como função emergente do espírito encarnado aproxima-se de modelos como a Teoria Santiago da cognição, formulada por Humberto Maturana e Francisco Varela. Segundo essa teoria, a cognição é inseparável do viver, e a mente não é um repositório de conteúdos internos, mas uma rede de acoplamentos estruturais entre o organismo e seu meio. Aplicado à Doutrina Espírita, isso implica que a evolução do espírito se dá através da experiência ativa e significativa com o ambiente encarnado, e que a mente é o campo onde essa experiência se organiza, se torna consciente e se transforma.</text:p>
      <text:h text:style-name="P5" text:outline-level="3"><text:bookmark-start text:name="a-consciência-como-emergência-integrada"/>A consciência como emergência integrada<text:bookmark-end text:name="a-consciência-como-emergência-integrada"/></text:h>
      <text:p text:style-name="P2">Um dos desafios centrais tanto para a ciência quanto para o Espiritismo é compreender a natureza da consciência. Kardec reconhece a consciência como atributo do espírito, mas não aprofunda a questão de sua gênese ou desenvolvimento. O pensamento sistêmico, ao tratar da <text:soft-page-break/>consciência como fenômeno emergente, permite ampliar essa visão: a consciência não é uma substância, nem uma entidade isolada, mas um nível superior de organização que emerge quando um sistema vivo atinge determinado grau de complexidade e reflexividade.</text:p>
      <text:p text:style-name="P3">Essa abordagem é coerente com a proposta espírita de que a consciência não é um produto do cérebro, mas uma expressão do espírito. Porém, ao compreendê-la como uma função emergente da interação entre espírito, mente e corpo, podemos evitar tanto o reducionismo materialista quanto o espiritualismo ingênuo. A consciência surge como capacidade de perceber, interpretar e significar o mundo, a si mesmo e os outros, constituindo-se como centro organizador da vida psíquica e moral do ser.</text:p>
      <text:p text:style-name="P3">Do ponto de vista ético, isso implica reconhecer que a consciência é o campo da liberdade, da responsabilidade e da escolha. Ela permite ao espírito refletir sobre si mesmo, revisar suas crenças, transformar seus sentimentos e reconstruir suas relações. Em termos sistêmicos, a consciência é o “ponto de bifurcação” que torna possível a transformação não apenas do indivíduo, mas de todo o campo relacional em que ele está inserido.</text:p>
      <text:h text:style-name="P5" text:outline-level="3"><text:bookmark-start text:name="a-cognição-como-espiritualidade-encarnada"/>A cognição como espiritualidade encarnada<text:bookmark-end text:name="a-cognição-como-espiritualidade-encarnada"/></text:h>
      <text:p text:style-name="P2">Se compreendermos a mente e a consciência como expressões do espírito em sua jornada evolutiva, podemos conceber a cognição – isto é, o processo de conhecer, interpretar e transformar o mundo – como uma forma de espiritualidade encarnada. Conhecer não é apenas acumular informações, mas entrar em relação com o real, acolher a alteridade, interagir com o mistério. Por isso, todo processo de conhecimento genuíno é também um processo espiritual, no sentido de que transforma o ser que conhece.</text:p>
      <text:p text:style-name="P3">Essa visão está presente, de modo implícito, na Doutrina Espírita, quando se afirma que o verdadeiro saber é aquele que ilumina a vida e melhora o coração. A inteligência, por si só, não garante o progresso moral; é a consciência desperta que orienta o uso da inteligência para o bem, para a justiça e para o amor. A cognição, quando integrada ao espírito, torna-se sabedoria, e essa sabedoria é inseparável do cuidado com os outros, com a vida e com a própria evolução.</text:p>
      <text:h text:style-name="P5" text:outline-level="3"><text:bookmark-start text:name="implicações-práticas-para-a-educação-e-a-mediunidade"/>Implicações práticas para a educação e a mediunidade<text:bookmark-end text:name="implicações-práticas-para-a-educação-e-a-mediunidade"/></text:h>
      <text:p text:style-name="P2">Essa concepção integrada de espírito, mente e consciência tem implicações importantes para a educação espírita e para a prática mediúnica. Do ponto de vista educacional, ela convida a superar modelos puramente conteudistas e a promover processos de formação que envolvam o ser como um todo: corpo, emoção, pensamento, intuição e espiritualidade. Educar o espírito é ajudar o ser a tornar-se consciente de si, a reconhecer seus vínculos, a orientar sua liberdade com discernimento, e a integrar-se de modo criativo ao todo da vida.</text:p>
      <text:p text:style-name="P3">Na prática mediúnica, essa visão demanda atenção à qualidade dos estados mentais e ao campo relacional do médium. A mente do médium é uma superfície de ressonância, e sua consciência pode funcionar tanto como filtro quanto como catalisador das influências espirituais. Daí a importância do autoconhecimento, da disciplina emocional, da oração e da sintonia com princípios éticos elevados. Mediunidade não é apenas uma função biológica ou sensorial; é uma <text:soft-page-break/>função sistêmica do ser espiritual encarnado, inserido numa rede de relações que inclui encarnados e desencarnados.</text:p>
      <text:h text:style-name="P5" text:outline-level="3"><text:bookmark-start text:name="conclusão-do-dualismo-à-unidade-dinâmica"/>Conclusão: do dualismo à unidade dinâmica<text:bookmark-end text:name="conclusão-do-dualismo-à-unidade-dinâmica"/></text:h>
      <text:p text:style-name="P2">Ao superar o dualismo mente-corpo, espírito-matéria, interno-externo, o pensamento sistêmico permite ao Espiritismo atualizar sua compreensão do ser humano como unidade dinâmica, relacional e evolutiva. Espírito, mente e consciência não são entidades isoladas, mas aspectos interdependentes de um mesmo processo de individuação e integração. Essa perspectiva não apenas favorece o diálogo entre ciência e espiritualidade, como também oferece ao próprio movimento espírita ferramentas conceituais para repensar sua pedagogia, sua prática e sua missão no mundo contemporâneo.</text:p>
      <text:p text:style-name="P3">A convergência entre a Doutrina Espírita e o pensamento sistêmico, ao iluminar a complexidade da alma humana, reforça a necessidade de uma espiritualidade lúcida, encarnada e responsável – uma espiritualidade que pensa, sente, age e transforma o mundo a partir do reconhecimento profundo de que tudo está interligado, e de que cada consciência é um nó precioso na rede infinita da vida.</text:p>
      <text:h text:style-name="P1" text:outline-level="2"><text:bookmark-start text:name="evolução-espiritual"/>Evolução espiritual<text:bookmark-end text:name="evolução-espiritual"/></text:h>
      <text:p text:style-name="P2">A Doutrina Espírita afirma que o espírito é criado simples e ignorante e evolui progressivamente, através de múltiplas experiências encarnatórias e desencarnatórias, em direção à perfeição moral e intelectual. Um dos conceitos centrais que permite compreender essa trajetória é o de <text:span text:style-name="T1">perispírito</text:span> – envoltório semimaterial do espírito, intermediário entre a alma e o corpo físico. No entanto, essa noção, amplamente difundida na literatura espírita, permanece frequentemente ancorada numa concepção estática e ontológica, que pouco dialoga com os modelos contemporâneos de complexidade, emergência e organização sistêmica. Este capítulo propõe uma releitura do perispírito como fenômeno emergente, dinâmico e adaptativo, integrando-o ao processo evolutivo do espírito à luz do pensamento sistêmico.</text:p>
      <text:h text:style-name="P5" text:outline-level="3"><text:bookmark-start text:name="o-perispírito-na-obra-de-kardec-definição-e-função"/>O perispírito na obra de Kardec: definição e função<text:bookmark-end text:name="o-perispírito-na-obra-de-kardec-definição-e-função"/></text:h>
      <text:p text:style-name="P2">No capítulo I de “O Livro dos Médiuns”, Kardec descreve os Espíritos como seres inteligentes da criação, revestidos de um envoltório fluídico denominado perispírito, que persiste após a morte do corpo físico e constitui o instrumento da manifestação do espírito no mundo espiritual e nas comunicações mediúnicas. Em “O Livro dos Espíritos”, esse envoltório é associado ao “fluido universal”, ou fluido cósmico, sendo uma espécie de molde ou matriz da forma humana que o espírito conserva mesmo desencarnado.</text:p>
      <text:p text:style-name="P3">Embora concebido inicialmente como um elemento intermediário entre espírito e matéria, o perispírito adquire em Kardec diversas funções: é suporte da memória espiritual, campo de registro das impressões morais e veículo de ação sobre a matéria. O conceito é progressivamente enriquecido, mas nunca sistematizado sob um modelo dinâmico ou evolutivo. Ainda que Kardec afirme que o perispírito se modifica com o progresso do espírito, essa modificação permanece <text:soft-page-break/>pouco detalhada em termos de estrutura, complexidade ou interatividade com o meio.</text:p>
      <text:p text:style-name="P3">Aqui entra a contribuição do pensamento sistêmico, especialmente nas teorias de redes complexas e auto-organização, ao permitir que concebamos o perispírito não apenas como um “envoltório”, mas como uma rede de padrões de organização e processamento de informação espiritual, em constante atualização.</text:p>
      <text:h text:style-name="P5" text:outline-level="3"><text:bookmark-start text:name="emergência-complexidade-e-estruturação-do-ser"/>Emergência, complexidade e estruturação do ser<text:bookmark-end text:name="emergência-complexidade-e-estruturação-do-ser"/></text:h>
      <text:p text:style-name="P2">No contexto das ciências da complexidade, o conceito de emergência refere-se ao surgimento de propriedades ou comportamentos novos que não podem ser reduzidos à soma das partes do sistema. Um fenômeno emergente é, por definição, mais do que a adição de seus componentes; ele manifesta qualidades inéditas decorrentes da interação entre os elementos e do contexto em que se organizam.</text:p>
      <text:p text:style-name="P3">Aplicar essa ideia ao perispírito significa concebê-lo como um campo emergente da própria trajetória evolutiva do espírito. Ele não é um “objeto” preexistente, mas uma estrutura fluídica continuamente moldada pelas experiências, pelas emoções, pelos pensamentos e pelas relações do espírito consigo mesmo, com o mundo material e com os demais seres espirituais. Em outras palavras, o perispírito é uma expressão plástica e adaptativa do espírito em sua interação com o universo.</text:p>
      <text:p text:style-name="P3">Esse ponto de vista guarda semelhanças com os modelos contemporâneos da mente como uma função emergente da atividade neuronal (mas não redutível a ela). De modo análogo, o perispírito pode ser pensado como o campo de estruturação espiritual da consciência, integrando dimensões cognitivas, afetivas, volitivas e simbólicas do ser.</text:p>
      <text:h text:style-name="P5" text:outline-level="3"><text:bookmark-start text:name="o-perispírito-como-rede-de-significados-e-registros"/>O perispírito como rede de significados e registros<text:bookmark-end text:name="o-perispírito-como-rede-de-significados-e-registros"/></text:h>
      <text:p text:style-name="P2">Se aceitarmos que o perispírito é mais que um invólucro, e sim uma rede dinâmica de organização espiritual, então devemos também admitir que ele guarda não apenas a forma, mas os conteúdos, padrões e tendências do ser. Isso inclui memórias de vidas passadas, marcas emocionais profundas, automatismos de pensamento, predisposições morais e tendências vibratórias. Trata-se, portanto, de uma espécie de “interface espiritual” por onde se projetam as escolhas, os hábitos, os desequilíbrios e as virtudes.</text:p>
      <text:p text:style-name="P3">No contexto do pensamento sistêmico, essa concepção se aproxima da ideia de que todo sistema vivo é também um sistema simbólico. Ou seja, a estrutura que o sustenta é ao mesmo tempo material e informacional. O perispírito seria, portanto, o “corpo simbólico” do espírito, no qual as experiências se cristalizam sob a forma de padrões recorrentes, tanto positivos quanto disfuncionais.</text:p>
      <text:p text:style-name="P3">Tal concepção permite entender melhor certos fenômenos narrados pela literatura espírita, como deformações perispirituais em Espíritos culpados, luminosidade de Espíritos elevados, ou persistência de impressões físicas e traumas após o desencarne. Não se trata de meras analogias, mas de expressão objetiva de padrões energéticos e informacionais estruturados no campo <text:soft-page-break/>perispiritual.</text:p>
      <text:h text:style-name="P5" text:outline-level="3"><text:bookmark-start text:name="evolução-plasticidade-e-reorganização-perispiritual"/>Evolução, plasticidade e reorganização perispiritual<text:bookmark-end text:name="evolução-plasticidade-e-reorganização-perispiritual"/></text:h>
      <text:p text:style-name="P2">Uma das características mais significativas dos sistemas vivos é sua capacidade de adaptação e reorganização. Segundo a teoria da auto-organização, sistemas suficientemente complexos podem reagir a perturbações reorganizando sua estrutura interna para manter sua identidade e continuidade. Isso se aplica plenamente ao perispírito, que se reestrutura a cada reencarnação, assumindo a forma correspondente ao novo corpo, ao novo plano existencial e às novas lições evolutivas.</text:p>
      <text:p text:style-name="P3">Essa plasticidade não é passiva: ela depende da evolução moral e cognitiva do espírito. Espíritos mais elevados, com maior domínio de si e consciência de suas potências, são capazes de modificar voluntariamente suas formas perispirituais, como demonstrado por relatos de Espíritos superiores que assumem diferentes aparências conforme as circunstâncias. Já Espíritos em sofrimento ou ignorância tendem a manter estruturas rígidas, marcadas por seus traumas, culpas ou ilusões.</text:p>
      <text:p text:style-name="P3">Nesse sentido, a evolução espiritual é, também, um processo de refinamento e reconfiguração do campo perispiritual. Essa reconfiguração é tanto espontânea quanto intencional, dependendo do grau de lucidez do espírito. Práticas como o arrependimento sincero, o esforço no bem, a prece, o estudo e o trabalho caritativo atuam como forças reorganizadoras da malha perispiritual, desfazendo antigos nós de desequilíbrio e favorecendo novas conexões mais harmoniosas.</text:p>
      <text:h text:style-name="P5" text:outline-level="3"><text:bookmark-start text:name="perispírito-e-encarnação-um-ciclo-adaptativo"/>Perispírito e encarnação: um ciclo adaptativo<text:bookmark-end text:name="perispírito-e-encarnação-um-ciclo-adaptativo"/></text:h>
      <text:p text:style-name="P2">Do ponto de vista sistêmico, a encarnação pode ser vista como um ciclo de adaptação mútua entre espírito, perispírito e corpo físico. O espírito, ao se preparar para encarnar, ajusta sua estrutura perispiritual às condições genéticas, familiares, geográficas e culturais que encontrará no novo corpo. O perispírito atua como um mediador desse processo, conformando os órgãos físicos de acordo com suas predisposições e, ao mesmo tempo, sendo modelado pelas experiências sensoriais e afetivas da vida material.</text:p>
      <text:p text:style-name="P3">Esse ciclo adaptativo não é mecânico nem determinado. Ele é regulado pela lei de causa e efeito, mas também pela liberdade relativa do espírito e pelas intervenções benéficas de mentores espirituais. O corpo físico, por sua vez, oferece resistências e potenciais únicos que influenciam o perispírito, retroalimentando-o com novas informações, impressões e aprendizados. Assim, cada encarnação é uma oportunidade de refinamento perispiritual, e cada desencarne é uma chance de reorganização vibratória em novos planos de existência.</text:p>
      <text:p text:style-name="P3">A evolução espiritual, então, não é apenas o acúmulo de virtudes ou conhecimentos, mas uma complexa reorganização do campo perispiritual ao longo dos ciclos de vida e morte, ajustando-se a novas frequências, novos vínculos e novos propósitos.</text:p>
      <text:h text:style-name="P5" text:outline-level="3"><text:bookmark-start text:name="a-consciência-como-fator-de-reorganização-perispiritual"/><text:soft-page-break/>A consciência como fator de reorganização perispiritual<text:bookmark-end text:name="a-consciência-como-fator-de-reorganização-perispiritual"/></text:h>
      <text:p text:style-name="P2">No centro desse processo está a consciência. É ela quem detecta os desequilíbrios, toma decisões, atualiza significados e redireciona energias. O perispírito, como campo simbólico, reage às decisões da consciência, às emoções profundas e aos estados mentais recorrentes. Isso implica que a evolução não é apenas determinada por ações externas, mas por transformações internas, silenciosas e sutis, que se consolidam no tempo.</text:p>
      <text:p text:style-name="P3">No pensamento sistêmico, um sistema reorganiza-se a partir de perturbações significativas, que desafiam seus padrões e o forçam a criar novas configurações. No campo espiritual, essas “perturbações” são frequentemente crises morais, traumas, enfermidades, revelações ou experiências limiares que convidam o espírito a transcender suas velhas formas. A dor, neste contexto, não é um castigo, mas uma alavanca de reorganização do ser.</text:p>
      <text:p text:style-name="P3">Essa perspectiva aprofunda o sentido da responsabilidade individual e da justiça divina: cada espírito constrói e reconstrói continuamente seu corpo espiritual, de acordo com os conteúdos que alimenta, as escolhas que realiza e os vínculos que estabelece. Como afirmam os Espíritos em várias obras da codificação, o perispírito é o espelho do espírito – e, como tal, pode ser polido ou manchado conforme a vontade, o esforço e a consciência.</text:p>
      <text:h text:style-name="P5" text:outline-level="3"><text:bookmark-start text:name="perispírito-redes-espirituais-e-ecossistemas-sutis"/>Perispírito, redes espirituais e ecossistemas sutis<text:bookmark-end text:name="perispírito-redes-espirituais-e-ecossistemas-sutis"/></text:h>
      <text:p text:style-name="P2">Por fim, uma abordagem sistêmica do perispírito exige levá-lo para além do indivíduo. O perispírito é também um nó de uma rede mais ampla de interações espirituais. Ele estabelece vínculos energéticos com outros Espíritos, com lugares, com egrégoras, com formas-pensamento e com os campos espirituais que atravessam a matéria. Em outras palavras, o perispírito não é apenas um corpo: é uma interface relacional com o mundo espiritual.</text:p>
      <text:p text:style-name="P3">Essa concepção permite compreender fenômenos como obsessões, afinidades espirituais, vínculos de grupo, ligações kármicas e ressonâncias mediúnicas. O perispírito não está isolado; ele participa de ecossistemas sutis onde circulam emoções, ideias, memórias e impulsos. A saúde perispiritual é, por isso, também uma questão ecológica: depende da qualidade dos campos com os quais o espírito interage.</text:p>
      <text:p text:style-name="P3">Cuidar do perispírito é, portanto, cuidar dos vínculos, da ética das relações, da elevação dos pensamentos e do cultivo da harmonia interior. A prática da caridade, da oração, do silêncio reflexivo, do perdão e do estudo transforma não apenas o espírito, mas também sua rede perispiritual, desatando os nós do passado e abrindo novos caminhos de evolução.</text:p>
      <text:h text:style-name="P1" text:outline-level="2"><text:bookmark-start text:name="reencarnação-e-as-quatro-dimensões-da-vida"/>Reencarnação e as quatro dimensões da vida<text:bookmark-end text:name="reencarnação-e-as-quatro-dimensões-da-vida"/></text:h>
      <text:p text:style-name="P2">A reencarnação constitui um dos pilares fundamentais da Doutrina Espírita. Longe de ser uma simples hipótese filosófica ou uma crença religiosa, ela representa, para o Espiritismo, uma lei natural que regula a evolução do espírito. Como afirmam os Espíritos superiores na codificação kardecista, o espírito é criado simples e ignorante, e sua trajetória ascensional exige múltiplas experiências no plano material, nas quais ele desenvolve suas faculdades intelectuais e morais, <text:soft-page-break/>reparando faltas e consolidando virtudes.</text:p>
      <text:p text:style-name="P3">Contudo, a reencarnação é muitas vezes interpretada de maneira excessivamente linear ou moralizante, centrada quase exclusivamente na noção de resgate ou de prova expiatória. Embora tais aspectos sejam legítimos e doutrinariamente válidos, eles não esgotam o potencial compreensivo e filosófico do fenômeno. Neste capítulo, propomos uma ampliação desse entendimento à luz do pensamento sistêmico, mais especificamente através da lente conceitual das quatro dimensões da vida – processo, forma, matéria e significado – conforme delineadas por Capra e Luisi em <text:span text:style-name="T1">A Visão Sistêmica da Vida</text:span>.</text:p>
      <text:p text:style-name="P3">Essa estrutura conceitual nos permite pensar a reencarnação não como um simples retorno do espírito à carne, mas como um fenômeno complexo e multidimensional, que envolve simultaneamente transformações dinâmicas (processo), organização de padrões (forma), encarnação física (matéria) e atribuição de sentido (significado). Ao aplicarmos essas categorias ao ciclo reencarnatório, revelamos camadas profundas da experiência espiritual que enriquecem a visão espírita tradicional sem contradizê-la.</text:p>
      <text:h text:style-name="P5" text:outline-level="3"><text:bookmark-start text:name="reencarnação-como-processo-ciclos-de-auto-organização-espiritual"/>1. Reencarnação como processo: ciclos de auto-organização espiritual<text:bookmark-end text:name="reencarnação-como-processo-ciclos-de-auto-organização-espiritual"/></text:h>
      <text:p text:style-name="P2">A dimensão do processo é a primeira a ser considerada. Toda reencarnação insere-se num fluxo contínuo de transformação do espírito. Não se trata de eventos isolados ou episódios desconectados, mas de uma dinâmica de aprendizagem e reestruturação que se desenvolve ao longo de múltiplas existências. O espírito não “recomeça do zero” a cada vida: ele carrega consigo tendências, memórias latentes, vínculos cármicos e disposições morais que se expressam através da experiência.</text:p>
      <text:p text:style-name="P3">Esse fluxo é caracterizado por ciclos adaptativos: cada vida é um contexto específico em que o espírito encontra os desafios e oportunidades adequados ao seu estágio evolutivo. A reencarnação, nesse sentido, é uma estratégia sistêmica de aprendizado, por meio da qual o ser organiza, assimila e transforma suas experiências.</text:p>
      <text:p text:style-name="P3">Do ponto de vista da teoria dos sistemas, isso corresponde à ideia de auto-organização: o espírito é um sistema dinâmico que se regula a partir das perturbações do meio e das escolhas internas. O perispírito, como vimos no capítulo anterior, é o campo intermediário onde essa reorganização se expressa. Assim, reencarnar é não apenas “tomar um novo corpo”, mas reorganizar a própria estrutura interna diante de novas condições contextuais.</text:p>
      <text:p text:style-name="P3">A reencarnação é, portanto, expressão de um contínuo de transformações – o espírito evolui não por acréscimos lineares de informação, mas por reestruturações qualitativas, por reorganizações morais e cognitivas que alteram a configuração global do ser. Como nas estruturas dissipativas de Prigogine, a ordem espiritual emerge do caos, da crise, da entropia superada por meio do esforço consciente e do amparo superior.</text:p>
      <text:h text:style-name="P5" text:outline-level="3"><text:bookmark-start text:name="reencarnação-como-forma-padrões-recorrentes-e-redes-de-relações"/>2. Reencarnação como forma: padrões recorrentes e redes de relações<text:bookmark-end text:name="reencarnação-como-forma-padrões-recorrentes-e-redes-de-relações"/></text:h>
      <text:p text:style-name="P2">A segunda dimensão é a da forma. Cada encarnação não é apenas um acontecimento biológico, <text:soft-page-break/>mas a expressão de um padrão organizacional específico do espírito, que se atualiza em novas circunstâncias. A forma, nesse contexto, refere-se ao conjunto de vínculos, estruturas de pensamento, tendências emocionais e afinidades espirituais que o espírito manifesta ao longo de sua trajetória.</text:p>
      <text:p text:style-name="P3">Na ótica do pensamento sistêmico, a forma de um sistema vivo é entendida como a rede de relações que sustenta sua identidade. O espírito, em sua jornada reencarnatória, constrói e reconstrói continuamente sua forma espiritual por meio dos vínculos que estabelece – com famílias, comunidades, ideias, afetos e ideais. Cada vida é, então, uma manifestação contextualizada de uma forma espiritual mais ampla, que se desdobra de modo singular a cada novo ciclo.</text:p>
      <text:p text:style-name="P3">Do ponto de vista doutrinário, esse conceito de forma ressoa com as ideias de “missão”, “afinidade” e “planejamento reencarnatório”. O espírito não reencarna ao acaso: ele é atraído para os contextos que ressoam com suas necessidades evolutivas, com seus compromissos assumidos e com os aprendizados que precisa consolidar. A forma da vida – tanto em termos simbólicos quanto sociais – é, assim, expressão da estrutura interna do ser espiritual, que interage com o campo coletivo e ecológico do planeta.</text:p>
      <text:p text:style-name="P3">Além disso, a forma é processual. Como afirmam Capra e Luisi, a forma dos sistemas vivos não é estática, mas emergente: ela se atualiza à medida que os processos que a sustentam se desenrolam. O mesmo se dá com o espírito: suas características evoluem, sua forma espiritual se refina, se torna mais sutil e mais integrada ao longo das vidas. A reencarnação, nesse contexto, é um processo de atualização da forma em novos contextos materiais e relacionais, permitindo que o espírito avance, recapitule ou aprofunde padrões de organização internos.</text:p>
      <text:h text:style-name="P5" text:outline-level="3"><text:bookmark-start text:name="reencarnação-como-matéria-a-vida-encarnada-e-seus-limites-físicos"/>3. Reencarnação como matéria: a vida encarnada e seus limites físicos<text:bookmark-end text:name="reencarnação-como-matéria-a-vida-encarnada-e-seus-limites-físicos"/></text:h>
      <text:p text:style-name="P2">A dimensão da matéria é talvez a mais evidente no fenômeno reencarnatório. Reencarnar é, por definição, tornar a assumir um corpo físico, ou seja, inscrever-se novamente nos limites do espaço-tempo, da densidade, da biologia, da hereditariedade. O pensamento sistêmico nos convida, contudo, a não ver essa dimensão como mera prisão ou obstáculo, mas como condição encarnatória da evolução.</text:p>
      <text:p text:style-name="P3">A matéria oferece resistências, mas também possibilidades. A vida corporal impõe ritmos, ciclos, demandas fisiológicas e sociais que desafiam o espírito a desenvolver virtudes como paciência, autodisciplina, compaixão e cuidado. Ao mesmo tempo, a matéria é meio de expressão: é através do corpo que o espírito age, sente, aprende, comunica e transforma a realidade.</text:p>
      <text:p text:style-name="P3">A dimensão material da reencarnação nos lembra que a evolução espiritual não é etérea ou abstrata, mas encarnada e ecológica. Os sistemas vivos existem em contextos ambientais concretos, e o espírito, ao reencarnar, deve lidar com condições geográficas, históricas, sociais e econômicas específicas. Isso implica reconhecer as desigualdades, as injustiças estruturais e os condicionamentos culturais que modulam a experiência encarnada – sem jamais perder de vista a liberdade relativa e a responsabilidade do espírito.</text:p>
      <text:p text:style-name="P3">Além disso, o corpo físico é resultado de um entrelaçamento entre a herança biológica e as <text:soft-page-break/>características perispirituais. A medicina espiritual, como demonstram muitos estudos espíritas e observações mediúnicas, aponta que certas disposições físicas refletem conteúdos profundos do espírito: bloqueios emocionais, tendências morais, memórias não elaboradas. A matéria, então, não é neutra: ela expressa simbolicamente a condição do espírito, e pode ser veículo de transformação quando integrada à consciência.</text:p>
      <text:h text:style-name="P5" text:outline-level="3"><text:bookmark-start text:name="reencarnação-como-significado-propósito-sentido-e-experiência"/>4. Reencarnação como significado: propósito, sentido e experiência<text:bookmark-end text:name="reencarnação-como-significado-propósito-sentido-e-experiência"/></text:h>
      <text:p text:style-name="P2">A quarta e última dimensão é a do significado – e talvez seja a mais decisiva. Por que reencarnamos? Que sentido tem a sucessão de vidas? O que nos move a continuar essa longa jornada de experiências e desafios? O Espiritismo responde: para evoluir, para aprender, para reparar e para crescer em direção à plenitude espiritual. Mas essa resposta não é apenas teórica – ela precisa ser sentida, vivida, elaborada subjetivamente por cada ser.</text:p>
      <text:p text:style-name="P3">Na perspectiva sistêmica, o significado é constitutivo da vida. Os sistemas vivos não apenas sobrevivem: eles interpretam o mundo, respondem aos estímulos com base em significações internas, constroem sentido a partir da experiência. O ser humano, em especial, é dotado de consciência reflexiva e capacidade simbólica: ele busca não apenas viver, mas compreender, narrar, justificar e orientar sua existência.</text:p>
      <text:p text:style-name="P3">A reencarnação, nesse sentido, é uma pedagogia simbólica, um modo de o espírito experimentar o mundo, construir significados, reformular seus valores e reconfigurar sua identidade. Cada vida é uma história, uma narrativa significativa em que o espírito representa um papel, enfrenta dilemas e escolhe caminhos. O sofrimento, a alegria, o fracasso e a superação só se tornam pedagógicos quando são integrados pela consciência como experiências de crescimento – isto é, quando ganham significado.</text:p>
      <text:p text:style-name="P3">Além disso, o significado conecta a reencarnação à espiritualidade. Reencarnar não é apenas evoluir, mas também cumprir um propósito maior, participar de uma obra coletiva de regeneração do mundo, contribuir para a harmonia do universo. A vida ganha sentido quando compreendida como serviço, como comunhão, como expressão do amor divino em ação. Nesse nível, reencarnar é colaborar com Deus na edificação do bem.</text:p>
      <text:h text:style-name="P5" text:outline-level="3"><text:bookmark-start text:name="uma-visão-integrada-reencarnação-como-fenômeno-sistêmico-espiritual"/>Uma visão integrada: reencarnação como fenômeno sistêmico-espiritual<text:bookmark-end text:name="uma-visão-integrada-reencarnação-como-fenômeno-sistêmico-espiritual"/></text:h>
      <text:p text:style-name="P2">Ao articular as quatro dimensões da vida – processo, forma, matéria e significado – à experiência da reencarnação, somos capazes de compreender esse fenômeno como um evento sistêmico, não-linear, relacional e simbólico. Não há contradição entre essa abordagem e os fundamentos da Doutrina Espírita; ao contrário, há um enriquecimento mútuo. O pensamento sistêmico amplia os horizontes conceituais do Espiritismo, oferecendo-lhe ferramentas analíticas e epistemológicas contemporâneas. Por sua vez, o Espiritismo confere ao pensamento sistêmico uma ontologia espiritual, uma ética do amor e uma cosmologia de sentido que a ciência isolada não pode oferecer.</text:p>
      <text:p text:style-name="P3">Reencarnar, então, é mais do que um retorno à carne: é atualizar um padrão espiritual num novo ciclo de experiências, reorganizar formas e vínculos, assumir os limites e possibilidades da <text:soft-page-break/>matéria, e dar sentido à existência. É aprender a viver de modo mais consciente, mais integrado, mais responsável. É construir a paz por dentro e por fora, em comunhão com as leis do universo.</text:p>
      <text:h text:style-name="P1" text:outline-level="2"><text:bookmark-start text:name="capítulo-4-vida-espiritual-como-rede"/>Capítulo 4 – Vida espiritual como rede<text:bookmark-end text:name="capítulo-4-vida-espiritual-como-rede"/></text:h>
      <text:p text:style-name="P2">No paradigma tradicional das religiões dogmáticas, o mundo espiritual é frequentemente representado como um plano hierarquizado, estático e separado da vida humana. No entanto, a Doutrina Espírita, ao investigar a realidade do espírito através da observação metódica das comunicações mediúnicas, oferece uma perspectiva notavelmente dinâmica, relacional e progressiva da existência espiritual. Longe de ser um espaço fixo de recompensa ou punição, o mundo espiritual é apresentado por Kardec como um campo contínuo de ação, aprendizado, transformação e convivência. Os Espíritos comunicantes descrevem esse plano como uma extensão da vida, atravessada por vínculos afetivos, afinidades morais, redes de solidariedade e campos de influência.</text:p>
      <text:p text:style-name="P3">A partir desse ponto de vista, torna-se pertinente associar a vida espiritual à noção de <text:span text:style-name="T1">rede</text:span>, conceito central no pensamento sistêmico contemporâneo. Nas ciências da complexidade, redes são estruturas compostas por nós interconectados por relações que podem ser simétricas ou assimétricas, transitivas ou recursivas, colaborativas ou conflituosas. Redes não são apenas formas geométricas ou arquiteturas informacionais; elas expressam a maneira como a vida se organiza, se adapta e evolui nos sistemas vivos, desde as teias alimentares até as redes neuronais, passando pelos ecossistemas, pelas organizações humanas e pelos sistemas de linguagem. A vida, nesse contexto, é essencialmente tecida – e compreender sua natureza implica estudar os padrões de interdependência que sustentam sua continuidade.</text:p>
      <text:p text:style-name="P3">Aplicar essa concepção ao plano espiritual significa reinterpretar o mundo dos Espíritos como um campo relacional de múltiplos níveis, onde a individualidade não é negada, mas integrada em redes de pertencimento, ressonância e influência. Esse capítulo propõe essa transição conceitual: da visão do “além” como um espaço ou estágio fixo, para a ideia de que a vida espiritual é uma malha viva de relações, cuja qualidade é determinada pelos estados morais e mentais dos Espíritos e suas interações recíprocas.</text:p>
      <text:h text:style-name="P5" text:outline-level="3"><text:bookmark-start text:name="redes-e-campos-estrutura-da-vida-além-da-matéria"/>Redes e campos: estrutura da vida além da matéria<text:bookmark-end text:name="redes-e-campos-estrutura-da-vida-além-da-matéria"/></text:h>
      <text:p text:style-name="P2">A estrutura relacional da vida espiritual é amplamente documentada na literatura mediúnica, tanto nas obras da codificação quanto nas obras subsidiárias de autores respeitados. Os Espíritos descrevem comunidades organizadas, colônias de trabalho, escolas, postos de socorro, agrupamentos por afinidade, mentorias coletivas, laços interexistenciais e vínculos espirituais que atravessam diversas encarnações. Esses relatos, longe de sugerirem isolamento ou uniformidade, revelam um plano interconectado, múltiplo e interdependente.</text:p>
      <text:p text:style-name="P3">A obra “O Céu e o Inferno” já apresenta exemplos claros dessa diversidade relacional entre os Espíritos: desde os felizes até os endurecidos, passando pelos medianos, sofredores e suicidas, todos estão situados em zonas vibratórias que não são locais geográficos, mas campos de frequência espiritual. Esses campos são moldados pelas qualidades morais e pelas conexões <text:soft-page-break/>mentais dos Espíritos, gerando agrupamentos que se autorreforçam: Espíritos afins se atraem, enquanto os de vibração incompatível se repelem.</text:p>
      <text:p text:style-name="P3">No vocabulário do pensamento sistêmico, podemos compreender esses agrupamentos como clusters relacionais, ou seja, agrupamentos locais dentro de redes mais amplas, nos quais predominam laços de semelhança e comunicação. Esses clusters formam comunidades espirituais interativas, cuja coesão não depende de regras externas, mas de um princípio de sintonia moral e mental. Assim, a organização da vida espiritual não se dá por mandamento vertical, mas por auto-organização relacional, em consonância com o princípio de afinidade vibratória.</text:p>
      <text:h text:style-name="P5" text:outline-level="3"><text:bookmark-start text:name="a-interdependência-espiritual-vínculos-influências-e-campos-morais"/>A interdependência espiritual: vínculos, influências e campos morais<text:bookmark-end text:name="a-interdependência-espiritual-vínculos-influências-e-campos-morais"/></text:h>
      <text:p text:style-name="P2">Um dos desdobramentos mais significativos dessa concepção em rede da vida espiritual é o reconhecimento de que não existe evolução isolada. Cada espírito está inserido em campos de influência – tanto ativa quanto passiva – e participa de redes afetivas, morais e cognitivas que ultrapassam os limites de uma única vida ou grupo. A noção de <text:span text:style-name="T1">interdependência</text:span> é, nesse contexto, essencial: todo progresso individual afeta a rede; todo desequilíbrio reverbera para além do indivíduo.</text:p>
      <text:p text:style-name="P3">Essa interdependência manifesta-se, por exemplo, nos fenômenos de obsessão, obsessores e resgates coletivos, que demonstram como Espíritos podem criar laços de aprisionamento ou libertação com outros Espíritos. A obsessão não é apenas uma interferência individual, mas a expressão de um desequilíbrio de rede, um nó disfuncional que perpetua padrões de dor, culpa ou vingança. Da mesma forma, a ação de um mentor espiritual, auxiliando um grupo inteiro de encarnados, pode ser compreendida como um reforço positivo a uma malha relacional em busca de reequilíbrio.</text:p>
      <text:p text:style-name="P3">Tais dinâmicas podem ser explicadas em termos de sistemas complexos adaptativos: a cada nova escolha, interação ou transformação, o campo relacional do Espírito se reorganiza. A caridade, o perdão, a escuta, a oração e a reforma íntima, por exemplo, não atuam apenas sobre o indivíduo, mas reconfiguram os vínculos sutis que ele mantém com outros seres, liberando energias retidas, desfazendo nós emocionais, criando novas possibilidades de convivência e evolução conjunta.</text:p>
      <text:h text:style-name="P5" text:outline-level="3"><text:bookmark-start text:name="coevolução-espiritual-crescimento-mútuo-e-convergência-moral"/>Coevolução espiritual: crescimento mútuo e convergência moral<text:bookmark-end text:name="coevolução-espiritual-crescimento-mútuo-e-convergência-moral"/></text:h>
      <text:p text:style-name="P2">O conceito de <text:span text:style-name="T1">coevolução</text:span> é outro recurso fundamental do pensamento sistêmico. Ele expressa a ideia de que os sistemas vivos não evoluem isoladamente, mas em interação com os demais sistemas e com o meio. Organismos, populações e ecossistemas crescem, adaptam-se e se transformam em resposta mútua, num processo contínuo de ajuste e inovação.</text:p>
      <text:p text:style-name="P3">No plano espiritual, a coevolução se expressa nas relações de interdependência ativa entre Espíritos encarnados e desencarnados, e entre os próprios Espíritos em diferentes estágios. Mentores e aprendizes, irmãos de jornada, famílias espirituais, grupos missionários, duplas de resgate: todos são exemplos de parcerias espirituais evolutivas, nas quais o progresso de um estimula, acompanha ou provoca o progresso do outro.</text:p>
      <text:p text:style-name="P3"><text:soft-page-break/>Esse modelo também ilumina a compreensão dos laços familiares sob a ótica espírita. O conceito de família espiritual ultrapassa os limites do sangue ou da afinidade social: ele é tecido por vínculos de afeto, compromisso e evolução conjunta, que se prolongam por diversas encarnações. Filhos que se tornam pais de antigos pais, adversários que renascem como irmãos, protetores que reencarnam para resgatar os que um dia prejudicaram – tudo isso evidencia um entrelaçamento espiritual de longa duração, em que os indivíduos se ajudam, se testam, se curam e se constroem mutuamente.</text:p>
      <text:p text:style-name="P3">A coevolução espiritual, portanto, é mais do que convivência: é transformação mútua mediada pela convivência. Os Espíritos que compreendem essa dinâmica tornam-se mais humildes, mais pacientes e mais compassivos. Reconhecem que não estão em “missão solitária”, mas inseridos numa trama de interações em que seu crescimento só é verdadeiro quando contribui também para o crescimento do outro.</text:p>
      <text:h text:style-name="P5" text:outline-level="3"><text:bookmark-start text:name="redes-de-afinidade-e-agrupamentos-espirituais-uma-topologia-da-consciência"/>Redes de afinidade e agrupamentos espirituais: uma topologia da consciência<text:bookmark-end text:name="redes-de-afinidade-e-agrupamentos-espirituais-uma-topologia-da-consciência"/></text:h>
      <text:p text:style-name="P2">A compreensão da vida espiritual como rede também exige uma reflexão sobre a topologia da consciência. Os Espíritos não estão “em lugares” no sentido físico; eles ocupam posições vibratórias, determinadas por sua frequência mental, suas escolhas morais e seus padrões emocionais. Essas posições geram conexões: Espíritos que pensam, sentem e desejam de maneira semelhante tendem a se agrupar; os que estão em frequências dissonantes se afastam.</text:p>
      <text:p text:style-name="P3">Isso nos permite pensar o mundo espiritual como um campo de redes multidimensionais, em que cada Espírito é um nó cujas conexões dependem de sua frequência vibratória. As comunicações mediúnicas, por exemplo, ocorrem quando há ressonância entre o campo mental do médium e o campo do Espírito comunicante – o que pode se dar por afinidade elevada ou por sintonia inferior. Da mesma forma, as sintonias mentais entre encarnados e desencarnados geram vínculos que perduram além da morte.</text:p>
      <text:p text:style-name="P3">Essa abordagem também clarifica por que Espíritos moralmente inferiores permanecem presos a certos lugares ou obsessões: sua frequência vibratória os mantém conectados a agrupamentos densos, que reforçam sua visão limitada e sua dor não elaborada. A libertação espiritual, então, depende de mudanças internas que alterem sua posição na rede, permitindo conexões com campos mais harmônicos e evoluídos.</text:p>
      <text:h text:style-name="P5" text:outline-level="3"><text:bookmark-start text:name="ética-sistêmica-responsabilidade-nas-redes-espirituais"/>Ética sistêmica: responsabilidade nas redes espirituais<text:bookmark-end text:name="ética-sistêmica-responsabilidade-nas-redes-espirituais"/></text:h>
      <text:p text:style-name="P2">Compreender a vida espiritual como rede e a evolução como coevolução leva a um novo tipo de ética: uma <text:span text:style-name="T1">ética sistêmica</text:span>, centrada na consciência de que toda ação individual repercute na rede. Meus pensamentos afetam meus vínculos; minhas palavras estruturam campos; minhas escolhas influenciam os caminhos de outros seres. O bem que pratico ressoa; o mal que perpetro se irradia. Não há neutralidade no campo espiritual: todo ser é um centro de emissão e recepção de energia, de informação e de sentido.</text:p>
      <text:p text:style-name="P3">Essa ética nos convida à vigilância interior e à responsabilidade relacional. Amar ao próximo não <text:soft-page-break/>é apenas um mandamento moral, mas uma exigência estrutural de equilíbrio na rede da vida. Perdoar não é esquecer o mal, mas interromper o ciclo de retroalimentação negativa que perpetua a dor. Cultivar o bem é organizar o campo; orar é reorientar frequências; estudar é iluminar conexões.</text:p>
      <text:p text:style-name="P3">No contexto dessa rede viva, Jesus aparece não como um juiz externo, mas como o maior organizador de campos de amor e lucidez da história espiritual da Terra. Seu evangelho é um modelo de reorganização da malha moral da humanidade. O Espiritismo, por sua vez, oferece as ferramentas para que cada um compreenda seu lugar na rede e atue como um agente consciente de transformação espiritual.</text:p>
      <text:h text:style-name="P5" text:outline-level="3"><text:bookmark-start text:name="conclusão-entrelaçados-para-evoluir"/>Conclusão: entrelaçados para evoluir<text:bookmark-end text:name="conclusão-entrelaçados-para-evoluir"/></text:h>
      <text:p text:style-name="P2">A vida espiritual, à luz do pensamento sistêmico e da Doutrina Espírita, não é um destino fixo nem um tribunal final. É uma rede viva, em permanente movimento, na qual cada espírito tece, desfaz e reconstrói vínculos que o aproximam ou o afastam da harmonia universal. Cada ato é uma vibração que entra na rede; cada pensamento é um traço no campo; cada encarnação é uma nova oportunidade de refinar os fios que nos ligam a Deus e aos nossos semelhantes.</text:p>
      <text:p text:style-name="P3">Assumir essa visão implica uma mudança de paradigma na própria prática espírita. Estudar mediunidade, obsessão, reencarnação ou evolução não é apenas compreender mecanismos, mas aprender a <text:span text:style-name="T1">reconhecer e agir na rede com responsabilidade</text:span>. Somos nós que, em cada instante, construímos o campo de que fazemos parte. Ao cultivarmos bons sentimentos, pensamentos elevados e ações coerentes com a lei do amor, fortalecemos a rede da luz. E é nessa rede que o espírito encontra sua verdadeira morada.</text:p>
      <text:h text:style-name="P1" text:outline-level="2"><text:bookmark-start text:name="ética-e-espiritualidade"/>Ética e espiritualidade<text:bookmark-end text:name="ética-e-espiritualidade"/></text:h>
      <text:p text:style-name="P2">A noção de “bem” ocupa um lugar central na Doutrina Espírita. Mais do que uma definição moral ou religiosa convencional, o bem, na codificação kardecista, é entendido como tudo aquilo que está em conformidade com a lei de Deus, promovendo a harmonia, o progresso e o aperfeiçoamento dos seres. No item 648 de <text:span text:style-name="T1">O Livro dos Espíritos</text:span>, por exemplo, os Espíritos superiores definem o bem como “tudo o que é conforme à lei de Deus” e o mal como “tudo o que dela se afasta”. Mas essa definição ganha densidade prática ao longo da obra, ao apresentar o bem como uma construção relacional e dinâmica, que se realiza por meio do amor ao próximo, da solidariedade, da justiça e da humildade.</text:p>
      <text:p text:style-name="P3">Entretanto, essa concepção, embora profundamente espiritual, pode ser enriquecida quando articulada às contribuições do pensamento sistêmico. Nas ciências da complexidade, o bem não aparece como uma categoria moral tradicional, mas pode ser compreendido como uma força de integração, coerência e equilíbrio dentro de redes vivas, sejam elas biológicas, sociais ou espirituais. Um sistema saudável é aquele em que as partes se relacionam de modo cooperativo, adaptativo e harmonioso, respeitando os limites e potencialidades de cada elemento e promovendo o bem-estar do conjunto. Ao pensarmos o bem sob essa ótica, ele deixa de ser apenas um mandamento e passa a ser uma condição de viabilidade e evolução dos sistemas <text:soft-page-break/>vivos, incluindo os sistemas espirituais.</text:p>
      <text:p text:style-name="P3">Neste capítulo, propomos uma leitura sistêmica da ética espírita, na qual o bem é interpretado como uma força integradora que reordena relações, sustenta vínculos e favorece a coevolução dos seres conscientes. Essa abordagem não substitui o conteúdo doutrinário original, mas amplia sua inteligibilidade e ressignifica seu alcance prático.</text:p>
      <text:h text:style-name="P5" text:outline-level="3"><text:bookmark-start text:name="o-bem-como-coesão-dos-sistemas-vivos"/>O bem como coesão dos sistemas vivos<text:bookmark-end text:name="o-bem-como-coesão-dos-sistemas-vivos"/></text:h>
      <text:p text:style-name="P2">Em sua estrutura mais fundamental, o universo se apresenta como uma vasta rede de sistemas interdependentes: átomos que formam moléculas, moléculas que estruturam células, células que organizam organismos, organismos que formam ecossistemas, e assim por diante. Cada nível dessa hierarquia apresenta propriedades emergentes, que dependem da coesão e da cooperação entre as partes.</text:p>
      <text:p text:style-name="P3">Na biologia, o que permite a vida é justamente a organização relacional dos componentes: a célula viva não é apenas um conjunto de moléculas, mas uma rede metabolicamente ativa, que se autorregula, responde ao meio e mantém sua identidade. Essa capacidade de autopoiese – isto é, de auto-produção organizada – é sustentada por fluxos de informação, energia e matéria que circulam por relações não-lineares e muitas vezes retroalimentadas.</text:p>
      <text:p text:style-name="P3">Analogamente, nos sistemas espirituais, o bem pode ser pensado como o princípio organizador que sustenta a vida consciente, permitindo que os Espíritos – em suas múltiplas formas e estágios – interajam de maneira construtiva, respeitosa e transformadora. O bem é o que garante a integridade do campo espiritual, permitindo que os vínculos não se degenerem em obsessão, domínio, ruptura ou isolamento.</text:p>
      <text:p text:style-name="P3">Dessa forma, o bem é mais do que “fazer o correto”: ele é a <text:span text:style-name="T1">condição sistêmica da harmonia</text:span>. Ele atua, portanto, como uma força de coesão, equilíbrio e abertura ao outro. Onde há bem, há reciprocidade, há respeito aos limites, há colaboração. Onde há bem, o campo é mais estável, as redes são mais resilientes e a consciência coletiva pode emergir com maior clareza.</text:p>
      <text:h text:style-name="P5" text:outline-level="3"><text:bookmark-start text:name="o-mal-como-desintegração-relacional"/>O mal como desintegração relacional<text:bookmark-end text:name="o-mal-como-desintegração-relacional"/></text:h>
      <text:p text:style-name="P2">Se o bem é integração, o mal pode ser compreendido, por contraste, como ruptura, desordem e fragmentação sistêmica. Na Doutrina Espírita, o mal não é uma entidade ou força autônoma, mas o resultado da ignorância, do egoísmo e da violação das leis naturais da convivência e do progresso. Ele se manifesta quando o ser, por orgulho ou ilusão, rompe com a rede à qual pertence e passa a agir como um centro isolado, buscando satisfazer apenas seus desejos imediatos, sem considerar os efeitos de seus atos no conjunto.</text:p>
      <text:p text:style-name="P3">Do ponto de vista sistêmico, o mal é a quebra da interdependência funcional dos sistemas. É quando um nó da rede começa a retroalimentar apenas a si mesmo, em circuito fechado, comprometendo os fluxos de comunicação, energia e afeto com os demais nós. Isso se expressa espiritualmente na vaidade, no fechamento à empatia, na dominação do outro e na recusa do perdão.</text:p>
      <text:p text:style-name="P3"><text:soft-page-break/>Essas atitudes, mesmo quando aparentemente “vencedoras”, geram desequilíbrios que reverberam no perispírito, nos vínculos interexistenciais e no próprio campo moral do espírito. Por isso, como ensinam os Espíritos superiores, todo mal gera sofrimento – não como castigo, mas como feedback corretivo do sistema espiritual. A dor, nesse contexto, é uma mensagem: algo na rede foi rompido; algo precisa ser reparado.</text:p>
      <text:h text:style-name="P5" text:outline-level="3"><text:bookmark-start text:name="a-ética-do-cuidado-uma-leitura-sistêmica-do-amor"/>A ética do cuidado: uma leitura sistêmica do amor<text:bookmark-end text:name="a-ética-do-cuidado-uma-leitura-sistêmica-do-amor"/></text:h>
      <text:p text:style-name="P2">Se o bem é integração, ele se realiza por meio de práticas específicas. Dentre elas, destaca-se a do cuidado. No pensamento espírita, o amor é a força suprema que organiza o universo moral. Deus é descrito como a inteligência suprema e também como o amor absoluto. A moral do Cristo é, essencialmente, a moral do amor: amar a Deus sobre todas as coisas e ao próximo como a si mesmo.</text:p>
      <text:p text:style-name="P3">No pensamento sistêmico, o cuidado aparece como uma forma de manter e regenerar as conexões dentro de um sistema. Cuidar é reconhecer a vulnerabilidade do outro, agir com atenção ao contexto, restaurar vínculos, proteger fragilidades, equilibrar fluxos. O cuidado é, portanto, a prática concreta do amor – e sua ausência indica uma falha nas redes morais e espirituais.</text:p>
      <text:p text:style-name="P3">Nessa perspectiva, o amor não é apenas um sentimento subjetivo, mas uma tecnologia relacional, um modo de sustentar a vida na interdependência. O Espírito que ama cuida das palavras que diz, dos pensamentos que emite, das intenções que alimenta. Ele compreende que todo o seu campo de atuação espiritual é uma extensão da rede a que pertence – e que, ao agir, ele modifica essa rede para o bem ou para o mal.</text:p>
      <text:p text:style-name="P3">Assim, a caridade – entendida como amor em ação – ganha sentido ampliado: ela é o instrumento consciente de reparo, manutenção e ampliação dos vínculos espirituais. A caridade não é apenas dar: é integrar, é transformar os campos. É “benevolência para com todos, indulgência para com as imperfeições alheias, perdão das ofensas”, como define Kardec, mas também é reorganização sutil dos vínculos com o outro, com a vida e com Deus.</text:p>
      <text:h text:style-name="P5" text:outline-level="3"><text:bookmark-start text:name="a-espiritualidade-como-prática-ecológica-do-bem"/>A espiritualidade como prática ecológica do bem<text:bookmark-end text:name="a-espiritualidade-como-prática-ecológica-do-bem"/></text:h>
      <text:p text:style-name="P2">Um dos ganhos centrais dessa leitura sistêmica do bem é a possibilidade de pensar a espiritualidade como uma prática ecológica – ou seja, como uma forma de se relacionar com o todo de maneira consciente, respeitosa e coevolutiva. Na ecologia, um sistema só é sustentável quando respeita os ciclos da natureza, os limites dos recursos e as necessidades de todos os seus componentes. No campo espiritual, vale o mesmo princípio.</text:p>
      <text:p text:style-name="P3">A espiritualidade autêntica não é fuga do mundo, nem negação do corpo, nem individualismo moralizado. Ela é reintegração com o fluxo do universo, é consciência da interconexão entre todos os seres. O Espírito evoluído é aquele que compreende que não há bem-estar isolado, que ninguém se salva sozinho, e que toda felicidade real é compartilhada.</text:p>
      <text:p text:style-name="P3">Nesse sentido, a prática do bem é ecológica: ela cuida da terra e dos vínculos, dos corpos e das <text:soft-page-break/>consciências, dos recursos materiais e das relações sutis. A espiritualidade sistêmica reconhece que o “reino de Deus” não está fora, nem depois da morte, mas é um estado vibratório construído nos pequenos gestos, nos pensamentos elevados e nas ações responsáveis. É uma ética do agora, do aqui, do entre.</text:p>
      <text:h text:style-name="P5" text:outline-level="3"><text:bookmark-start text:name="o-bem-como-coerência-vibratória-ética-e-frequência"/>O bem como coerência vibratória: ética e frequência<text:bookmark-end text:name="o-bem-como-coerência-vibratória-ética-e-frequência"/></text:h>
      <text:p text:style-name="P2">Na Doutrina Espírita, a evolução moral do Espírito está intrinsecamente associada à sua elevação vibratória. Os Espíritos superiores não apenas sabem mais: eles vibram em padrões mais sutis, mais amplos, mais compassivos. Isso significa que o bem, além de ser uma prática relacional, é também uma frequência de organização da consciência.</text:p>
      <text:p text:style-name="P3">Cada escolha moral afeta o campo perispiritual do ser, reorganizando sua estrutura vibratória. Quando escolhemos perdoar, generosamente, reconfiguramos os campos de dor. Quando oramos com sinceridade, criamos pontes luminosas de sintonia. Quando praticamos a justiça com humildade, refinamos nossos laços espirituais. O bem, nesse nível, é uma afinação progressiva com a Lei Divina.</text:p>
      <text:p text:style-name="P3">Essa coerência vibratória não é automática, mas é cultivada na prática cotidiana da vida encarnada, com seus desafios, suas contradições e suas quedas. Evoluir espiritualmente é aprender a escolher, a discernir e a harmonizar o campo interno, mesmo diante do caos externo. A ética, portanto, não é um código de regras, mas um modo de manter-se centrado, lúcido e conectado com os valores mais altos da consciência universal.</text:p>
      <text:h text:style-name="P5" text:outline-level="3"><text:bookmark-start text:name="conclusão-o-bem-como-força-de-rede-e-caminho-de-luz"/>Conclusão: o bem como força de rede e caminho de luz<text:bookmark-end text:name="conclusão-o-bem-como-força-de-rede-e-caminho-de-luz"/></text:h>
      <text:p text:style-name="P2">A articulação entre ética espírita e pensamento sistêmico permite uma nova compreensão do bem: não como ideal abstrato, mas como força concreta de organização da vida espiritual. O bem une, sustenta, eleva. Ele é o que liga os Espíritos entre si, é o que forma os campos de luz, é o que orienta a evolução consciente em direção à plenitude.</text:p>
      <text:p text:style-name="P3">Ser bom não é apenas não fazer o mal: é aprender a tecer vínculos justos, harmoniosos e criativos com tudo o que vive. É atuar como um nó luminoso na rede da vida, vibrando em sintonia com o amor divino que sustenta o universo. É saber que, a cada gesto, se constrói ou se corrói a paz. E é escolher, com liberdade e responsabilidade, o caminho da integração.</text:p>
      <text:p text:style-name="P3">O bem, portanto, é sistêmico e espiritual. É o fundamento da saúde dos ecossistemas, dos laços humanos e da vida transcendente. Cultivar o bem é não apenas “ser moralmente correto”, mas participar conscientemente da grande obra da criação, ampliando a rede da luz, da sabedoria e da compaixão.</text:p>
      <text:h text:style-name="P1" text:outline-level="2"><text:bookmark-start text:name="causalidade-complexa"/>Causalidade complexa<text:bookmark-end text:name="causalidade-complexa"/></text:h>
      <text:p text:style-name="P2">A Lei de Causa e Efeito, tal como formulada na Doutrina Espírita, constitui uma das colunas morais do Espiritismo. Inspirada em princípios de justiça divina e liberdade espiritual, essa lei ensina que todas as ações humanas – físicas, mentais e morais – geram consequências que <text:soft-page-break/>retornam ao próprio ser como instrumento de aprendizado, reparação e progresso. Não se trata de um castigo imposto por uma entidade exterior, mas do desdobramento natural das escolhas feitas pelo espírito ao longo de suas múltiplas existências. A cada ação corresponde uma reação espiritual, ajustada segundo a necessidade evolutiva de cada indivíduo.</text:p>
      <text:p text:style-name="P3">No entanto, à medida que buscamos compreender essa lei em profundidade, percebemos que a noção de “causa e efeito” não pode ser interpretada de modo simplista ou linear. As vidas sucessivas, os contextos coletivos, as múltiplas influências recíprocas entre os Espíritos, o esquecimento do passado e as intenções ocultas tornam o panorama moral altamente complexo, não-determinístico e interdependente. O espírito é coautor de sua história, mas não a escreve sozinho: ele está sempre imerso em redes de relação, em campos de influência que modulam suas escolhas e ampliam suas responsabilidades.</text:p>
      <text:p text:style-name="P3">É nesse ponto que o pensamento sistêmico e as ciências da complexidade oferecem recursos conceituais preciosos para enriquecer nossa compreensão da Lei de Causa e Efeito. Em vez de pensá-la como um esquema linear de ação-reação, podemos vê-la como uma dinâmica moral não-linear, retroalimentada, processual e contextualizada, que atua em redes espirituais de coevolução e aprendizado coletivo. Este capítulo propõe essa leitura ampliada, sem abrir mão do fundamento moral da responsabilidade individual, mas situando-o num contexto mais abrangente, dinâmico e relacional.</text:p>
      <text:h text:style-name="P5" text:outline-level="3"><text:bookmark-start text:name="causalidade-linear-e-a-limitação-do-modelo-mecanicista"/>Causalidade linear e a limitação do modelo mecanicista<text:bookmark-end text:name="causalidade-linear-e-a-limitação-do-modelo-mecanicista"/></text:h>
      <text:p text:style-name="P2">Na tradição científica clássica, especialmente a partir de Newton e Descartes, a causalidade foi entendida como um processo linear, no qual uma causa antecede logicamente um efeito, e este pode ser previsto e controlado. Esse modelo – altamente eficaz em sistemas físicos simples – influenciou profundamente a cultura ocidental, incluindo muitas concepções morais baseadas em retribuição ou punição.</text:p>
      <text:p text:style-name="P3">A Doutrina Espírita, embora rompa com o moralismo dogmático e o determinismo fatalista, manteve o termo “lei de causa e efeito” para nomear a dinâmica espiritual de responsabilidade e reparação. Porém, os próprios Espíritos codificadores deixam claro que os efeitos espirituais não se produzem de forma mecânica ou imediata, mas respeitam a liberdade, a intenção, o arrependimento e as condições reencarnatórias de cada ser.</text:p>
      <text:p text:style-name="P3">Essa compreensão nos obriga a abandonar a ideia de que o bem sempre gera recompensas rápidas, ou que o mal é punido instantaneamente. Muitas vezes, os efeitos de nossas ações se manifestam em encarnações futuras, por meio de experiências que, à primeira vista, não parecem ligadas ao passado. É nesse ponto que o modelo da causalidade linear se revela insuficiente. A vida espiritual exige um modelo de causalidade mais complexo, sistêmico e adaptativo.</text:p>
      <text:h text:style-name="P5" text:outline-level="3"><text:bookmark-start text:name="causalidade-complexa-múltiplos-fatores-redes-e-temporalidades"/>Causalidade complexa: múltiplos fatores, redes e temporalidades<text:bookmark-end text:name="causalidade-complexa-múltiplos-fatores-redes-e-temporalidades"/></text:h>
      <text:p text:style-name="P2">Na teoria dos sistemas complexos, a causalidade não é entendida como uma relação simples entre dois eventos isolados. Em vez disso, fala-se em causalidade múltipla, recursiva e distribuída. Isso significa que os efeitos podem ter várias causas, e as causas podem gerar <text:soft-page-break/>múltiplos efeitos; que os sistemas podem influenciar a si mesmos (retroalimentação); e que os contextos e as interações desempenham papel crucial na produção dos resultados.</text:p>
      <text:p text:style-name="P3">Esse modelo é especialmente útil para pensarmos os efeitos morais das ações humanas. Uma mesma atitude, como uma mentira ou um gesto de caridade, pode ter consequências distintas dependendo do contexto, das intenções envolvidas, da maturidade espiritual do agente e dos vínculos espirituais que permeiam a ação. Além disso, os efeitos dessas ações não são necessariamente lineares: podem se amplificar, se propagar ou até se inverter com o tempo, dependendo das redes em que se inserem.</text:p>
      <text:p text:style-name="P3">Por exemplo, um ato de intolerância cometido em uma vida pode gerar um ciclo de exclusão que se perpetua por várias gerações, afetando não apenas o agente, mas aqueles ao seu redor. Do mesmo modo, um gesto de reconciliação pode quebrar um padrão cármico de séculos, reorganizando todo um campo espiritual. Esses exemplos mostram que os efeitos espirituais não seguem trajetórias simples ou previsíveis, mas dependem de complexas redes de interação entre escolhas, vínculos e campos vibratórios.</text:p>
      <text:h text:style-name="P5" text:outline-level="3"><text:bookmark-start text:name="a-retroalimentação-moral-loops-de-reforço-e-aprendizado"/>A retroalimentação moral: loops de reforço e aprendizado<text:bookmark-end text:name="a-retroalimentação-moral-loops-de-reforço-e-aprendizado"/></text:h>
      <text:p text:style-name="P2">Um dos conceitos mais poderosos da teoria dos sistemas é o de <text:span text:style-name="T1">feedback</text:span> – ou retroalimentação. Trata-se de um processo pelo qual os efeitos de uma ação retornam ao sistema, influenciando suas ações futuras. Existem dois tipos principais: o feedback positivo, que reforça uma tendência, e o feedback negativo, que a corrige ou estabiliza.</text:p>
      <text:p text:style-name="P3">No campo espiritual, o feedback moral pode ser entendido como a forma pela qual o espírito toma consciência de si por meio das consequências de seus atos. Um gesto de orgulho que leva ao isolamento; uma escolha egoísta que causa sofrimento a outro e retorna como experiência semelhante; uma atitude de bondade que é reconhecida e fortalece o altruísmo – todos são exemplos de loops de feedback que orientam o espírito em sua trajetória.</text:p>
      <text:p text:style-name="P3">O sofrimento, quando bem compreendido, atua como feedback negativo corretivo: ele sinaliza desequilíbrio, desvio, ruptura de vínculo, e convida à transformação. Já o prazer espiritual, a paz de consciência e a alegria no bem são feedbacks positivos, que reforçam padrões de harmonia e conexão. Ao longo das vidas sucessivas, o espírito vai integrando esses sinais, refinando suas escolhas, elevando sua frequência moral.</text:p>
      <text:p text:style-name="P3">Essa visão rompe com a ideia de punição externa e instaura uma lógica de aprendizado autorregulado. O espírito não sofre para “pagar”, mas para perceber, refletir e reorganizar. A Lei de Causa e Efeito, sob esse prisma, é um sistema de aprendizagem espiritual contínua, baseado em ciclos de ação, consequência e consciência.</text:p>
      <text:h text:style-name="P5" text:outline-level="3"><text:bookmark-start text:name="campo-moral-e-interdependência-dos-efeitos"/><text:soft-page-break/>Campo moral e interdependência dos efeitos<text:bookmark-end text:name="campo-moral-e-interdependência-dos-efeitos"/></text:h>
      <text:p text:style-name="P2">Outro aspecto essencial da causalidade complexa é a noção de campo. Nenhuma ação acontece isoladamente: todo ato gera modificações no campo em que ocorre – seja ele familiar, social ou espiritual. A Doutrina Espírita reconhece isso ao tratar dos compromissos coletivos, das expiações grupais, dos laços de afeto e desafeto que se estendem por várias vidas.</text:p>
      <text:p text:style-name="P3">Cada espírito atua como um centro emissor e receptor de vibrações, pensamentos e intenções. Suas ações afetam diretamente o campo espiritual ao seu redor. Quando alguém opta por perdoar, por exemplo, reorganiza uma trama de vínculos, liberando energias estagnadas, desfazendo laços obsessivos, criando possibilidades de reconciliação. Por outro lado, uma atitude de vingança pode enredar múltiplas consciências numa rede de sofrimento, alimentando ciclos longos de desarmonia.</text:p>
      <text:p text:style-name="P3">A causalidade, portanto, não é apenas individual: é distribuída em redes espirituais interligadas. Um gesto pode ter efeitos imprevistos, e o retorno moral pode ocorrer por vias indiretas, como doenças, obstáculos, encontros kármicos ou situações pedagógicas sutis. Isso não significa que “tudo é cármico” ou que não há livre-arbítrio: significa apenas que os efeitos espirituais são mediados por campos complexos de ressonância e sintonia.</text:p>
      <text:h text:style-name="P5" text:outline-level="3"><text:bookmark-start text:name="tempo-intencionalidade-e-plasticidade-dos-efeitos"/>Tempo, intencionalidade e plasticidade dos efeitos<text:bookmark-end text:name="tempo-intencionalidade-e-plasticidade-dos-efeitos"/></text:h>
      <text:p text:style-name="P2">Um desafio comum na compreensão da Lei de Causa e Efeito é o tempo. Muitas vezes, os efeitos das ações não são perceptíveis de imediato – ou sequer ocorrem na mesma vida. Isso se deve à elasticidade moral do tempo espiritual, regulada por fatores como o arrependimento sincero, a reparação ativa, a mudança de conduta e as escolhas reencarnatórias.</text:p>
      <text:p text:style-name="P3">A intenção do agente tem papel fundamental na qualidade e intensidade dos efeitos morais. Como ensinam os Espíritos em <text:span text:style-name="T1">O Livro dos Médiuns</text:span>, a justiça divina considera não apenas o ato, mas o pensamento, a motivação, o grau de consciência e a possibilidade de escolha real. Por isso, dois atos semelhantes podem ter efeitos muito diferentes dependendo da intenção que os move.</text:p>
      <text:p text:style-name="P3">Essa plasticidade moral é um indicativo da grandeza e da sutileza da justiça divina: não se trata de uma contabilidade moral, mas de um sistema ético-vibratório que busca sempre a regeneração do espírito. O erro, quando reconhecido e transformado, pode ser suavizado ou transmutado em aprendizado valioso. O bem praticado em silêncio pode ecoar por gerações. O sistema espiritual é dinâmico, adaptável, pedagógico.</text:p>
      <text:h text:style-name="P5" text:outline-level="3"><text:bookmark-start text:name="a-lei-como-matriz-de-justiça-e-amor"/>A lei como matriz de justiça e amor<text:bookmark-end text:name="a-lei-como-matriz-de-justiça-e-amor"/></text:h>
      <text:p text:style-name="P2">Sob a ótica sistêmica, a Lei de Causa e Efeito revela-se como uma matriz organizadora da evolução espiritual, que garante coerência, continuidade e possibilidade de transformação. Não há injustiça, porque cada espírito colhe o que planta – mas há sempre espaço para o arrependimento, para a reparação e para a regeneração.</text:p>
      <text:p text:style-name="P3">Essa concepção evita tanto o fatalismo cármico quanto o moralismo punitivo. O espírito não está <text:soft-page-break/>condenado aos seus erros, mas convidado a superá-los. E o bem que ele pratica, por menor que pareça, entra no campo espiritual como uma semente de luz que um dia florescerá.</text:p>
      <text:p text:style-name="P3">A Lei é justa porque é adaptada ao nível de consciência do agente; é amorosa porque nunca exclui a possibilidade de recomeçar; é complexa porque opera em múltiplos planos, tempos e redes. Ela não é um código fixo, mas um sistema inteligente de reequilíbrio e evolução.</text:p>
      <text:h text:style-name="P5" text:outline-level="3"><text:bookmark-start text:name="conclusão-responsabilidade-lúcida-e-confiança-na-lei"/>Conclusão: responsabilidade lúcida e confiança na Lei<text:bookmark-end text:name="conclusão-responsabilidade-lúcida-e-confiança-na-lei"/></text:h>
      <text:p text:style-name="P2">Compreender a Lei de Causa e Efeito como causalidade complexa é um convite à maturidade espiritual. Significa abandonar visões simplistas de merecimento ou castigo, e adotar uma postura de responsabilidade lúcida: tudo o que pensamos, sentimos e fazemos molda o nosso campo e afeta os outros.</text:p>
      <text:p text:style-name="P3">O Espiritismo nos ensina que somos livres para escolher, mas não para evitar as consequências. No entanto, essas consequências não nos esmagam – elas nos ensinam. Cada dor é uma mensagem, cada obstáculo é um convite, cada reencontro é uma chance de reconstrução.</text:p>
      <text:p text:style-name="P3">A complexidade da Lei não a torna injusta – torna-a justa no grau máximo, porque ajustada à singularidade de cada espírito, às redes em que se insere, e aos campos que precisa reequilibrar. O bem é sempre possível, e o arrependimento sincero é sempre acolhido.</text:p>
      <text:p text:style-name="P3">Crer nessa Lei é crer num universo moralmente ordenado, mas compassivo. É viver com responsabilidade, mas também com confiança. É saber que nada está perdido – e que toda transformação interior reverbera como luz no grande sistema da vida.</text:p>
      <text:h text:style-name="P1" text:outline-level="2"><text:bookmark-start text:name="ciência-espiritualidade-e-complexidade"/>Ciência, espiritualidade e complexidade<text:bookmark-end text:name="ciência-espiritualidade-e-complexidade"/></text:h>
      <text:p text:style-name="P2">A cisão entre ciência e espiritualidade marca a história do pensamento ocidental desde o século XVII. Enquanto a ciência moderna se estruturava com base na observação empírica, na experimentação e na objetividade, a espiritualidade era relegada ao campo da fé, da subjetividade ou da experiência mística. Essa separação permitiu avanços técnicos e metodológicos notáveis, mas também gerou uma fragmentação do saber, do ser e do sentido da existência. Com o tempo, a ciência passou a ser identificada com o que é verificável e controlável, e a espiritualidade, com o que é intangível, pessoal ou irracional.</text:p>
      <text:p text:style-name="P3">A Doutrina Espírita surge, no século XIX, como uma tentativa audaciosa de superar esse dualismo. Allan Kardec propõe um modelo de espiritualidade racional, experimental e aberta ao diálogo com os dados da ciência. O Espiritismo não nega o método científico, mas o amplia: admite a investigação dos fenômenos espirituais, propõe hipóteses sobre a alma, a reencarnação, a mediunidade e a evolução, e submete essas ideias à prova da razão e da experiência. Com isso, inaugura um paradigma híbrido: uma ciência espiritual que se pretende ao mesmo tempo empírica e ética, racional e transformadora.</text:p>
      <text:p text:style-name="P3">Contudo, os limites epistemológicos da ciência positivista da época impediram que essa proposta fosse amplamente acolhida. A academia permaneceu presa a um modelo reducionista e <text:soft-page-break/>mecanicista, centrado na matéria, na causalidade linear e na lógica do controle. Somente nas últimas décadas, com o avanço das ciências da complexidade, da biologia sistêmica, da ecologia profunda e das neurociências integrativas, surgiu um novo paradigma capaz de reaproximar ciência e espiritualidade – não como campos rivais, mas como dimensões complementares da compreensão do real.</text:p>
      <text:p text:style-name="P3">Este capítulo propõe refletir sobre essa convergência emergente, articulando os aportes do pensamento sistêmico com os princípios da Doutrina Espírita. Nosso objetivo é demonstrar que ciência e espiritualidade, longe de se excluírem, podem – e devem – colaborar para uma nova visão do ser humano, mais integrada, mais ética e mais coerente com a complexidade da vida.</text:p>
      <text:h text:style-name="P5" text:outline-level="3"><text:bookmark-start text:name="o-paradigma-da-complexidade-além-da-fragmentação"/>O paradigma da complexidade: além da fragmentação<text:bookmark-end text:name="o-paradigma-da-complexidade-além-da-fragmentação"/></text:h>
      <text:p text:style-name="P2">A ciência da complexidade representa uma ruptura epistemológica com o paradigma mecanicista da modernidade. Em vez de decompor os fenômenos em partes isoladas, ela busca compreender os sistemas em sua totalidade, reconhecendo a interdependência entre estrutura, processo, contexto e significado. Os sistemas vivos – sejam eles organismos, ecossistemas, redes neurais ou coletividades humanas – são vistos como unidades dinâmicas, adaptativas e auto-organizadas, que evoluem em relação contínua com o ambiente.</text:p>
      <text:p text:style-name="P3">Essa abordagem recusa a linearidade causal, o determinismo estrito e o reducionismo materialista. Em seu lugar, adota noções como emergência, retroalimentação, auto-organização, coevolução e resiliência. O conhecimento, nessa perspectiva, não é um espelho passivo da realidade, mas um processo ativo de construção, situado e condicionado por valores, linguagens e práticas. O sujeito e o objeto não são mais separados por um abismo ontológico: estão em relação recursiva.</text:p>
      <text:p text:style-name="P3">Do ponto de vista da espiritualidade, esse novo paradigma cria uma abertura inédita. Ao reconhecer que a vida não pode ser explicada apenas por átomos e fórmulas, a ciência da complexidade permite o retorno das questões do sentido, da ética, da subjetividade e da consciência como dimensões legítimas da investigação científica. Em outras palavras, ela reencanta o mundo – não pela negação da razão, mas por sua ampliação.</text:p>
      <text:h text:style-name="P5" text:outline-level="3"><text:bookmark-start text:name="a-espiritualidade-como-dimensão-sistêmica-do-ser"/>A espiritualidade como dimensão sistêmica do ser<text:bookmark-end text:name="a-espiritualidade-como-dimensão-sistêmica-do-ser"/></text:h>
      <text:p text:style-name="P2">A Doutrina Espírita, ao conceber o ser humano como um espírito encarnado, insere desde o início a espiritualidade como componente essencial da vida. O espírito é, para Kardec, o princípio inteligente do universo; é imortal, perfectível e responsável por suas escolhas. A matéria, o corpo e as condições sociais são meios de expressão, aprendizagem e transformação. A consciência, portanto, não é um subproduto do cérebro, mas uma expressão do espírito em evolução.</text:p>
      <text:p text:style-name="P3">Essa concepção espiritualista é hoje compatível com várias abordagens da ciência da mente e da vida. Modelos como o de Maturana e Varela (autopoiese e cognição incorporada), a neurofenomenologia de Francisco Varela, as epistemologias do cuidado, a teoria dos campos morfogenéticos de Sheldrake e os estudos sobre consciência não-local convergem para uma <text:soft-page-break/>visão não reducionista da consciência, muitas vezes intuída por tradições espirituais milenares.</text:p>
      <text:p text:style-name="P3">Dentro desse panorama, o Espiritismo pode ser visto como um sistema integrativo que conecta ontologia, epistemologia e ética. Ele não apenas afirma a existência do espírito, mas propõe um método de investigação (a observação mediúnica), uma filosofia de evolução (a reencarnação) e uma ética do cuidado e da reparação (a Lei de Causa e Efeito). Ao mesmo tempo, resgata o valor do sentimento, da moral e da transformação interior como dimensões do saber. Essa estrutura espelha, em muitos aspectos, o que hoje se entende por ciência transdisciplinar, conforme propõem autores como Edgar Morin.</text:p>
      <text:h text:style-name="P5" text:outline-level="3"><text:bookmark-start text:name="ciência-e-espiritualidade-como-sistemas-de-sentido"/>Ciência e espiritualidade como sistemas de sentido<text:bookmark-end text:name="ciência-e-espiritualidade-como-sistemas-de-sentido"/></text:h>
      <text:p text:style-name="P2">Uma das propostas centrais do pensamento sistêmico é reconhecer que todo sistema de conhecimento – seja ele científico ou espiritual – é também um sistema de sentido. Nenhuma ciência é neutra: ela se baseia em pressupostos, valores, escolhas metodológicas e formas culturais de interpretar o mundo. O mesmo vale para a espiritualidade: ela é uma resposta à pergunta pelo sentido da vida, da dor, do destino, da morte e da plenitude.</text:p>
      <text:p text:style-name="P3">A convergência entre ciência e espiritualidade, portanto, não exige que um campo submeta-se ao outro, mas que ambos reconheçam sua parcialidade e complementaridade. A ciência nos ensina a observar, descrever, modelar, prever; a espiritualidade nos ensina a sentir, significar, orientar e transformar. A primeira oferece clareza; a segunda, profundidade. A primeira ilumina os mecanismos da vida; a segunda, seus propósitos.</text:p>
      <text:p text:style-name="P3">No Espiritismo, essa complementaridade está presente desde a codificação. Kardec jamais separou ciência, filosofia e moral: ele compreendeu que o conhecimento da alma exige tanto a observação quanto a reflexão e o compromisso ético. Hoje, essa tríade pode ser interpretada como uma antecipação da ideia de <text:span text:style-name="T1">sistemas de saber integrados</text:span>, nos quais a realidade é abordada em múltiplos níveis – físico, biológico, psíquico, social, simbólico e espiritual.</text:p>
      <text:h text:style-name="P5" text:outline-level="3"><text:bookmark-start text:name="a-nova-visão-do-ser-humano-interdependente-evolutivo-e-responsável"/>A nova visão do ser humano: interdependente, evolutivo e responsável<text:bookmark-end text:name="a-nova-visão-do-ser-humano-interdependente-evolutivo-e-responsável"/></text:h>
      <text:p text:style-name="P2">A síntese entre ciência da complexidade e Doutrina Espírita aponta para uma nova imagem do ser humano. Não mais o indivíduo isolado, racionalista e autocentrado da modernidade; tampouco o pecador impotente das religiões dogmáticas. Mas sim um ser interdependente, processual, consciente e em constante evolução moral e espiritual.</text:p>
      <text:p text:style-name="P3">Essa nova visão reconhece que o ser humano:</text:p>
      <text:list text:style-name="L11">
        <text:list-item>
          <text:p text:style-name="P17">Vive em redes de interações: biológicas, sociais, espirituais;</text:p>
        </text:list-item>
        <text:list-item>
          <text:p text:style-name="P17">É resultado de histórias coletivas e escolhas pessoais;</text:p>
        </text:list-item>
        <text:list-item>
          <text:p text:style-name="P17">Carrega em si potencialidades adormecidas e padrões herdados;</text:p>
        </text:list-item>
        <text:list-item>
          <text:p text:style-name="P17">Aprende por meio da experiência encarnatória e do vínculo com o outro;</text:p>
        </text:list-item>
        <text:list-item>
          <text:p text:style-name="P17">É autor e coautor de sua trajetória, mas nunca sozinho;</text:p>
        </text:list-item>
        <text:list-item>
          <text:p text:style-name="P17"><text:soft-page-break/>Constrói o mundo interno e externo por seus pensamentos, sentimentos e ações.</text:p>
        </text:list-item>
      </text:list>
      <text:p text:style-name="P2">A ética, nesse contexto, deixa de ser um código de obrigações e passa a ser uma ecologia da responsabilidade. Cada escolha modifica o campo espiritual, cada pensamento influencia a rede moral, cada gesto cria ou desfaz conexões. A caridade é reorganização de campo; o perdão é limpeza vibratória; o estudo é expansão da consciência. Tudo é sistêmico. Tudo é espiritual.</text:p>
      <text:h text:style-name="P5" text:outline-level="3"><text:bookmark-start text:name="espiritismo-sistêmico-uma-proposta-de-síntese-transdisciplinar"/>Espiritismo sistêmico: uma proposta de síntese transdisciplinar<text:bookmark-end text:name="espiritismo-sistêmico-uma-proposta-de-síntese-transdisciplinar"/></text:h>
      <text:p text:style-name="P2">A proposta de um Espiritismo Sistêmico – como esta monografia sugere – não é alterar a base doutrinária da codificação, mas compreendê-la à luz dos paradigmas contemporâneos, especialmente aqueles que permitem o diálogo entre ciência e espiritualidade. Ao fazer isso, resgatamos a ousadia original de Kardec, que não visava fundar um dogma, mas inaugurar uma nova ciência da alma, aberta, racional e progressiva.</text:p>
      <text:p text:style-name="P3">O Espiritismo Sistêmico reconhece:</text:p>
      <text:list text:style-name="L12">
        <text:list-item>
          <text:p text:style-name="P18">Que o espírito é um sistema vivo, autônomo, adaptativo e em rede;</text:p>
        </text:list-item>
        <text:list-item>
          <text:p text:style-name="P18">Que a reencarnação é um processo de atualização morfoespiritual;</text:p>
        </text:list-item>
        <text:list-item>
          <text:p text:style-name="P18">Que o perispírito é um campo de organização simbólica e vibratória;</text:p>
        </text:list-item>
        <text:list-item>
          <text:p text:style-name="P18">Que o bem é uma força de integração e coerência entre os sistemas;</text:p>
        </text:list-item>
        <text:list-item>
          <text:p text:style-name="P18">Que a Lei de Causa e Efeito é uma dinâmica de autorregulação moral em múltiplos planos;</text:p>
        </text:list-item>
        <text:list-item>
          <text:p text:style-name="P18">Que a vida espiritual se organiza em campos e redes de coevolução.</text:p>
        </text:list-item>
      </text:list>
      <text:p text:style-name="P2">Essa visão não contradiz os princípios kardecistas – ao contrário, os aprofunda, os contextualiza e os renova, tornando-os compatíveis com as linguagens do nosso tempo.</text:p>
      <text:h text:style-name="P5" text:outline-level="3"><text:bookmark-start text:name="conclusão-para-além-da-separação"/>Conclusão: para além da separação<text:bookmark-end text:name="conclusão-para-além-da-separação"/></text:h>
      <text:p text:style-name="P2">Chegamos, assim, ao final desta Parte III com a convicção de que a integração entre ciência, espiritualidade e complexidade é não apenas possível, mas necessária. Em tempos de crise civilizatória, colapso ecológico, confusão ética e fragmentação do saber, é urgente reencontrar uma visão unificadora do ser humano e do cosmos. Não uma fusão simplista, mas uma articulação lúcida, plural e generosa entre os modos de conhecer, sentir e agir.</text:p>
      <text:p text:style-name="P3">O Espiritismo oferece uma ponte: sua base racional, seu método de observação, sua ética universalista, sua abertura à transformação. O pensamento sistêmico oferece outra: seu foco nas relações, na totalidade, na adaptação, na complexidade viva. Juntos, apontam para uma espiritualidade consciente, livre, ética e profundamente conectada à vida em todos os seus níveis.</text:p>
      <text:p text:style-name="P3">Que essa convergência nos inspire a sermos não apenas estudiosos ou crentes, mas nós vivos na grande rede da consciência universal, agindo com amor, discernimento e responsabilidade. Que a <text:soft-page-break/>ciência nos dê clareza, que a espiritualidade nos dê sentido – e que a complexidade nos ensine a humildade diante da vastidão do real.</text:p>
      <text:h text:style-name="P1" text:outline-level="2"><text:bookmark-start text:name="o-modelo-biopsicossocioespiritual"/>O modelo biopsicossocioespiritual<text:bookmark-end text:name="o-modelo-biopsicossocioespiritual"/></text:h>
      <text:p text:style-name="P2">A Doutrina Espírita nos ensina que o espírito é o princípio inteligente da criação, dotado de individualidade, imortalidade e liberdade moral. Quando encarnado, esse espírito se une a um corpo físico, com o objetivo de progredir intelectualmente e moralmente. Essa união, porém, não é uma justaposição de substâncias heterogêneas, como sugerem concepções dualistas simplificadas. O espírito encarnado não é apenas alma em um corpo, mas um ser concreto, envolvido em múltiplas redes de relação e de influência, que moldam sua experiência existencial, emocional e espiritual. A vida corpórea, nesse sentido, não é apenas um palco de provas, mas um campo de interação profunda entre o biológico, o psicológico, o social e o espiritual.</text:p>
      <text:p text:style-name="P3">Este capítulo propõe uma compreensão ampliada do ser encarnado a partir do modelo biopsicossocioespiritual, cuja formulação original foca nos transtornos mentais, mas cujos princípios se aplicam de forma mais abrangente a qualquer experiência encarnatória. Nosso objetivo é demonstrar que o ser humano, tal como concebido pela Doutrina Espírita, não pode ser compreendido de forma fragmentada, como se houvesse uma oposição entre “espírito puro” e “matéria impura”. Ao contrário, a encarnação gera uma nova realidade ontológica, na qual espírito, corpo, psiquismo e contexto se entrelaçam de maneira complexa e indissociável.</text:p>
      <text:h text:style-name="P5" text:outline-level="3"><text:bookmark-start text:name="superando-o-dualismo-nem-só-espírito-nem-só-corpo"/>Superando o dualismo: nem só espírito, nem só corpo<text:bookmark-end text:name="superando-o-dualismo-nem-só-espírito-nem-só-corpo"/></text:h>
      <text:p text:style-name="P2">Durante séculos, o pensamento filosófico ocidental foi dominado pelo dualismo cartesiano, que separava a mente (ou alma) da matéria como substâncias distintas. Essa separação ecoou nas teologias religiosas e nas concepções médico-biológicas, muitas vezes criando uma oposição artificial entre “problemas do corpo” e “problemas da alma”. Mesmo no Espiritismo, essa cisão pode ser involuntariamente reproduzida, sobretudo quando se tenta reduzir todos os fenômenos à responsabilidade exclusiva do espírito ou, inversamente, a uma disfunção orgânica.</text:p>
      <text:p text:style-name="P3">O modelo biopsicossocioespiritual surge como uma alternativa a essa fragmentação. Ele reconhece que o espírito é a fonte da individualidade, mas que essa individualidade só se expressa, durante a vida encarnada, por meio da interação dinâmica com o corpo, com os contextos sociais e culturais, com a história psicológica da pessoa e com os vínculos espirituais visíveis e invisíveis. A personalidade, nesse modelo, é vista como uma síntese instável e transitória dessas múltiplas dimensões. O que se manifesta como comportamento, emoção ou enfermidade é resultado dessa rede viva e ativa.</text:p>
      <text:p text:style-name="P3">A analogia com um concerto musical pode ser esclarecedora: para que a música exista, é necessário o músico (espírito), o instrumento (corpo) e o ambiente (contexto). Isoladamente, nenhum desses elementos produz música. Somente sua interação, em sintonia, permite a expressão plena da obra. O mesmo se dá com a vida humana: o espírito encarnado é inseparável de seu corpo e de suas relações.</text:p>
      <text:h text:style-name="P5" text:outline-level="3"><text:bookmark-start text:name="o-espírito-como-núcleo-não-como-exclusividade"/><text:soft-page-break/>O espírito como núcleo, não como exclusividade<text:bookmark-end text:name="o-espírito-como-núcleo-não-como-exclusividade"/></text:h>
      <text:p text:style-name="P2">Kardec já apontava essa direção ao afirmar que o “Espírito é tudo”, mas que o corpo é o instrumento através do qual ele se manifesta. Porém, observações empíricas conduzidas por ele e por outros estudiosos revelaram que o espírito, mesmo lúcido, pode encontrar-se impedido de se expressar por disfunções orgânicas ou psíquicas, como no caso das deficiências intelectuais, das demências e de certos transtornos mentais.</text:p>
      <text:p text:style-name="P3">Essas constatações afastam qualquer visão que localize a “culpa” das doenças exclusivamente no espírito. Elas reforçam que o espírito reencarnado atua em conjunto com uma estrutura física e em meio a influências ambientais que também contribuem para o adoecimento ou para a saúde. Desconsiderar qualquer um desses fatores significa falsear a realidade do ser encarnado.</text:p>
      <text:p text:style-name="P3">Além disso, o modelo biopsicossocioespiritual admite que as experiências vividas pelo espírito durante a encarnação deixam marcas no corpo. O desenvolvimento cerebral, por exemplo, não é apenas causa de habilidades cognitivas, mas também efeito do esforço espiritual, das vivências emocionais e das condições ambientais, como o carinho, a segurança, o estímulo intelectual e a convivência social.</text:p>
      <text:h text:style-name="P5" text:outline-level="3"><text:bookmark-start text:name="a-personalidade-como-rede-de-relações"/>A personalidade como rede de relações<text:bookmark-end text:name="a-personalidade-como-rede-de-relações"/></text:h>
      <text:p text:style-name="P2">O modelo que propomos tem como foco central a personalidade – entendida como o conjunto de traços, tendências, disposições e atitudes que o espírito manifesta durante uma existência. Essa personalidade não é idêntica ao espírito (que é permanente), mas tampouco é mero produto do corpo. Trata-se de uma formação complexa, construída a partir da interação entre os conteúdos espirituais latentes e o contexto físico, psíquico e social da vida encarnada.</text:p>
      <text:p text:style-name="P3">Bezerra de Menezes e Gustave Geley já apontavam para essa distinção entre <text:span text:style-name="T1">individualidade</text:span> (o espírito imortal) e <text:span text:style-name="T1">personalidade</text:span> (a configuração transitória durante uma existência). A personalidade é moldada pelas circunstâncias, mas também influencia as circunstâncias. Ela está em constante mutação, e é nela que ocorrem os processos de adoecimento e de cura.</text:p>
      <text:p text:style-name="P3">Sob essa ótica, podemos afirmar que o adoecimento psíquico, moral ou comportamental se dá na personalidade, e não no espírito em si mesmo. O espírito pode conservar faculdades íntegras, mesmo quando a personalidade está desorganizada. Mas também pode, por seus desequilíbrios ou escolhas passadas, contribuir para a formação de uma personalidade vulnerável, ansiosa, agressiva ou dissociativa.</text:p>
      <text:h text:style-name="P5" text:outline-level="3"><text:bookmark-start text:name="os-quatro-pilares-do-modelo-biopsicossocioespiritual"/>Os quatro pilares do modelo biopsicossocioespiritual<text:bookmark-end text:name="os-quatro-pilares-do-modelo-biopsicossocioespiritual"/></text:h>
      <text:p text:style-name="P2">Podemos resumir as dimensões do modelo em quatro elementos principais, que interagem o tempo todo e se influenciam mutuamente:</text:p>
      <text:list text:style-name="L13">
        <text:list-item>
          <text:p text:style-name="P19">Espírito – fonte da individualidade e do princípio inteligente; traz marcas psíquicas de vidas anteriores, tendências, vocações e desafios morais.</text:p>
        </text:list-item>
        <text:list-item>
          <text:p text:style-name="P19">Corpo (em especial o cérebro) – instrumento de expressão e campo de atuação do <text:soft-page-break/>espírito; modulado por heranças genéticas, nutrição, traumas e doenças; também afetado pelas emoções e atitudes.</text:p>
        </text:list-item>
        <text:list-item>
          <text:p text:style-name="P19">Contexto social e cultural – inclui as relações familiares, as influências educacionais, os grupos sociais, as vivências afetivas e os valores culturais; oferece suporte ou provoca desestruturação.</text:p>
        </text:list-item>
        <text:list-item>
          <text:p text:style-name="P19">Relações espirituais (obsessivas ou protetoras) – influencia invisível, mas ativa; pode ser de natureza benéfica ou perturbadora; sempre mediada pela sintonia mental e moral do próprio espírito encarnado.</text:p>
        </text:list-item>
      </text:list>
      <text:p text:style-name="P2">Essas quatro dimensões não operam isoladamente, mas como uma rede de influências recíprocas. O adoecimento ocorre quando essa rede se desequilibra, seja por disfunções no corpo, conflitos na alma, violências ambientais ou conexões espirituais disfuncionais. A cura, por sua vez, exige a recomposição da rede, com ajustes em todos os níveis possíveis.</text:p>
      <text:h text:style-name="P5" text:outline-level="3"><text:bookmark-start text:name="consequências-para-o-pensamento-sistêmico-e-espírita"/>Consequências para o pensamento sistêmico e espírita<text:bookmark-end text:name="consequências-para-o-pensamento-sistêmico-e-espírita"/></text:h>
      <text:p text:style-name="P2">O modelo biopsicossocioespiritual não apenas supera o dualismo espírito-matéria, mas oferece uma base sólida para a visão sistêmica do ser humano reencarnado. A personalidade encarnada não é um núcleo isolado, mas um nó em uma vasta rede de relações, cujos fios atravessam o corpo, a cultura, o espírito e a espiritualidade.</text:p>
      <text:p text:style-name="P3">Essa visão ressoa com o pensamento sistêmico, que reconhece que sistemas vivos – como o ser humano – são moldados por múltiplos níveis de organização e interdependência. Assim como um organismo não é compreendido por suas células isoladas, o espírito encarnado só pode ser entendido em sua totalidade relacional, como ser em interação.</text:p>
      <text:p text:style-name="P3">Para o Espiritismo, isso significa ampliar a responsabilidade moral para além do indivíduo isolado. O espírito é livre, mas também é condicionado. Suas escolhas influenciam e são influenciadas. Por isso, a reforma íntima não se dá no vácuo, mas na relação com o corpo, com os outros e com o plano espiritual. A caridade, o autocuidado, a higiene mental, a cultura, a espiritualização do lar e a sintonia com Espíritos elevados são fatores que participam igualmente da saúde integral.</text:p>
      <text:h text:style-name="P5" text:outline-level="3"><text:bookmark-start text:name="conclusão-uma-ecologia-do-espírito-encarnado"/>Conclusão: uma ecologia do espírito encarnado<text:bookmark-end text:name="conclusão-uma-ecologia-do-espírito-encarnado"/></text:h>
      <text:p text:style-name="P2">Compreender o ser humano como um ser biopsicossocioespiritual é reconhecer que a encarnação é um mergulho em múltiplos sistemas simultâneos. O espírito não apenas “usa” o corpo: ele vive através dele, com ele e por meio dele. O espírito não apenas sofre a cultura: ele a assimila, a transforma, a perpetua. O espírito não apenas sente a obsessão: ele se liga, por afinidade ou desafio, aos seus companheiros do plano invisível. E é nessa rede de experiências que ele constrói – ou retarda – sua evolução.</text:p>
      <text:p text:style-name="P3">Ao nos vermos como sistemas integrados, deixamos de buscar culpados e passamos a buscar conexões saudáveis. Sabemos que curar não é apenas tomar um remédio ou fazer uma prece, mas <text:soft-page-break/>recompor os fios que nos ligam à vida, ao corpo, à verdade e ao amor.</text:p>
      <text:p text:style-name="P3">O modelo biopsicossocioespiritual, assim compreendido, convida-nos a uma espiritualidade lúcida, encarnada, compassiva e responsável – uma espiritualidade que reconhece que a saúde da alma começa na harmonia das relações, no equilíbrio dos vínculos e na integração entre os planos da existência.</text:p>
      <text:h text:style-name="P1" text:outline-level="2"><text:bookmark-start text:name="sociedade-e-espírito"/>Sociedade e Espírito<text:bookmark-end text:name="sociedade-e-espírito"/></text:h>
      <text:p text:style-name="P2">A concepção tradicional do ser humano como uma individualidade isolada, dotada de razão e vontade próprias, tem sido desafiada pelas descobertas das ciências sociais, pela filosofia da linguagem e, mais recentemente, pela visão sistêmica da vida. Do ponto de vista espírita, essa concepção também se mostra limitada: o espírito encarnado, embora dotado de livre-arbítrio e consciência moral, vive e se expressa através de uma rede de relações que o conformam e o desafiam, tanto em nível social quanto espiritual.</text:p>
      <text:p text:style-name="P3">Este capítulo busca articular duas propostas convergentes: por um lado, a visão sistêmica da sociedade como uma rede viva de interdependências, culturas, estruturas e significados; por outro, a proposta espírita de transformação da humanidade por meio do esclarecimento espiritual e da reforma das instituições sociais. Ambas as perspectivas, ao se complementarem, fornecem uma base sólida para pensarmos a vida coletiva como um campo de coevolução entre consciências individuais e estruturas sociais.</text:p>
      <text:h text:style-name="P5" text:outline-level="3"><text:bookmark-start text:name="a-sociedade-como-rede-de-relações-do-indivíduo-ao-sistema"/>A sociedade como rede de relações: do indivíduo ao sistema<text:bookmark-end text:name="a-sociedade-como-rede-de-relações-do-indivíduo-ao-sistema"/></text:h>
      <text:p text:style-name="P2">As ciências sociais, desde seus fundadores – Durkheim, Weber, Elias – até os teóricos contemporâneos como Giddens e Habermas, têm apontado a complexa relação entre ação individual e estrutura social. Nenhum indivíduo é absolutamente autônomo, e nenhuma sociedade é uma entidade exterior que existe por si só. O sujeito é moldado por regras, instituições e valores; mas, ao mesmo tempo, participa ativamente da manutenção e transformação dessas estruturas. Essa dinâmica é sintetizada por Giddens na noção de <text:span text:style-name="T1">dupla hermenêutica</text:span> e <text:span text:style-name="T1">dupla estruturação</text:span>: as estruturas sociais existem porque os indivíduos as reproduzem, e os indivíduos agem dentro de estruturas que os condicionam.</text:p>
      <text:p text:style-name="P3">A visão sistêmica da vida contribui decisivamente para esse entendimento. Capra e Luisi propõem que a vida social não pode ser compreendida apenas em termos de estrutura ou matéria (por exemplo, instituições ou leis), mas deve incluir também as dimensões de forma (as relações), processo (as interações) e significado (os valores e propósitos que orientam a ação). Assim como um organismo vivo não é apenas um corpo físico, mas um sistema organizado de relações e significados, uma sociedade não é um amontoado de indivíduos, mas uma rede viva, autopoiética, simbólica e dinâmica.</text:p>
      <text:p text:style-name="P3">As redes sociais são, nesse sentido, sistemas vivos de comunicação e sentido. Cada indivíduo participa dessas redes não como um nó isolado, mas como uma consciência em fluxo, que aprende, reage, influencia e é influenciado. Os significados, as crenças e os valores compartilhados sustentam a cultura, e esta, por sua vez, orienta as regras de conduta e os modos <text:soft-page-break/>de organização social. A cultura, portanto, não é um adorno, mas a espinha dorsal simbólica de uma sociedade viva.</text:p>
      <text:h text:style-name="P5" text:outline-level="3"><text:bookmark-start text:name="o-espírito-encarnado-como-consciência-em-rede"/>O espírito encarnado como consciência em rede<text:bookmark-end text:name="o-espírito-encarnado-como-consciência-em-rede"/></text:h>
      <text:p text:style-name="P2">Do ponto de vista espírita, o espírito encarnado é o princípio inteligente em processo de aperfeiçoamento. Ao reencarnar, ele não ingressa em um mundo neutro, mas em uma trama de influências biológicas, psíquicas, sociais e espirituais. Essa condição foi reconhecida por Allan Kardec, que via o progresso como resultado de uma dupla ação: a transformação íntima do indivíduo e a transformação das instituições sociais que perpetuam o egoísmo e a desigualdade.</text:p>
      <text:p text:style-name="P3">A ideia de que o espírito evolui isoladamente, por mera vontade ou mérito próprio, desconsidera o papel do meio, da cultura e das estruturas sociais no desenvolvimento da consciência. Por isso, Kardec insistia: a extinção do egoísmo exige não apenas esclarecimento espiritual, mas também reforma institucional. Ele via o progresso moral como inseparável do progresso social, educacional e político.</text:p>
      <text:p text:style-name="P3">Assim como no modelo biopsicossocioespiritual vimos que a personalidade encarnada é uma síntese complexa de múltiplos fatores, neste capítulo reconhecemos que a sociedade é, ela mesma, o produto vivo da interação entre milhões de consciências, cada qual contribuindo, reforçando ou desafiando as estruturas coletivas.</text:p>
      <text:h text:style-name="P5" text:outline-level="3"><text:bookmark-start text:name="quatro-dimensões-da-vida-social-forma-matéria-processo-e-significado"/>Quatro dimensões da vida social: forma, matéria, processo e significado<text:bookmark-end text:name="quatro-dimensões-da-vida-social-forma-matéria-processo-e-significado"/></text:h>
      <text:p text:style-name="P2">Para compreender plenamente a sociedade como um sistema vivo, precisamos adotar as quatro perspectivas propostas pelo pensamento sistêmico:</text:p>
      <text:list text:style-name="L14">
        <text:list-item>
          <text:p text:style-name="P20">Forma – A rede de relações sociais que constitui a base das interações: famílias, comunidades, instituições, alianças políticas, redes informais.</text:p>
        </text:list-item>
        <text:list-item>
          <text:p text:style-name="P20">Matéria – As estruturas materiais que dão suporte à vida social: edifícios, estradas, tecnologias, infraestrutura econômica e urbana.</text:p>
        </text:list-item>
        <text:list-item>
          <text:p text:style-name="P20">Processo – Os fluxos sociais: comunicação, produção, mobilidade, decisões políticas, práticas culturais.</text:p>
        </text:list-item>
        <text:list-item>
          <text:p text:style-name="P20">Significado – Os valores, crenças, normas e símbolos que organizam e orientam a sociedade: religiões, ideologias, identidades culturais e espirituais.</text:p>
        </text:list-item>
      </text:list>
      <text:p text:style-name="P2">Essas dimensões não são separadas, mas interdependentes e coemergentes. Uma política pública não é apenas uma norma legal (matéria), mas um processo de construção social (processo), apoiado em determinados valores (significado) e que modifica redes de relações (forma).</text:p>
      <text:p text:style-name="P3">No campo espiritual, o significado assume papel ainda mais decisivo. Como propõe Capra, a ação humana é orientada por imagens mentais, propósitos e interpretações do mundo, e é nesse campo que se constrói a liberdade e se trava a batalha ética. A sociedade, portanto, não muda apenas por imposição externa, mas quando os indivíduos reinterpretam a realidade e escolhem <text:soft-page-break/>agir de forma diferente.</text:p>
      <text:h text:style-name="P5" text:outline-level="3"><text:bookmark-start text:name="a-proposta-espírita-esclarecimento-e-reforma-das-instituições"/>A proposta espírita: esclarecimento e reforma das instituições<text:bookmark-end text:name="a-proposta-espírita-esclarecimento-e-reforma-das-instituições"/></text:h>
      <text:p text:style-name="P2">A Doutrina Espírita propõe duas frentes simultâneas para a transformação social:</text:p>
      <text:list text:style-name="L15">
        <text:list-item>
          <text:p text:style-name="P21">Esclarecimento espiritual dos indivíduos – O espírito deve tomar consciência de sua natureza imortal, da Lei de Causa e Efeito, da solidariedade universal e da responsabilidade por seus atos. Isso amplia o horizonte ético e enfraquece o egoísmo, que é, segundo Kardec, a raiz de todos os males sociais.</text:p>
        </text:list-item>
        <text:list-item>
          <text:p text:style-name="P21">Reforma das instituições sociais – As estruturas políticas, econômicas, jurídicas, educacionais e culturais devem ser revistas à luz de valores como justiça, fraternidade, liberdade e dignidade humana. Isso implica reconhecer que certos sistemas sociais alimentam o egoísmo, a violência e a desigualdade, sendo incompatíveis com uma ética espiritual.</text:p>
        </text:list-item>
      </text:list>
      <text:p text:style-name="P2">Léon Denis, Deolindo Amorim e Emmanuel insistem nesse ponto: a regeneração do mundo exige a renovação das estruturas e a elevação das consciências. Não basta ao espírita ser bom em sua intimidade; é preciso também atuar no mundo, ajudar a reconfigurar os vínculos sociais, educar, participar, propor. Como toda rede viva, a sociedade muda por impulsos significativos, e o espírita consciente é um desses impulsos.</text:p>
      <text:h text:style-name="P5" text:outline-level="3"><text:bookmark-start text:name="conclusão-espiritualidade-em-rede-reforma-em-ação"/>Conclusão: espiritualidade em rede, reforma em ação<text:bookmark-end text:name="conclusão-espiritualidade-em-rede-reforma-em-ação"/></text:h>
      <text:p text:style-name="P2">Indivíduo e sociedade não são polos opostos, mas dimensões de um mesmo processo espiritual em rede. O espírito não se desenvolve fora do mundo, mas no mundo; não cresce sozinho, mas em relação; não se liberta contra a sociedade, mas transformando a sociedade em direção à solidariedade, à justiça e à verdade.</text:p>
      <text:p text:style-name="P3">A visão sistêmica e a Doutrina Espírita, ao convergirem, nos oferecem um novo modelo de espiritualidade ativa: uma espiritualidade que compreende o mundo como rede viva, interdependente e carregada de significado; que reconhece as estruturas sociais como campos de ação moral; e que convida à reforma não só íntima, mas também institucional, cultural e coletiva.</text:p>
      <text:p text:style-name="P3">Nesse novo paradigma, espiritualidade não é fuga, mas presença lúcida; religião não é rito, mas compromisso com a regeneração do mundo; e evolução não é mérito isolado, mas reconexão com a teia do bem que nos une a todos.</text:p>
      <text:h text:style-name="P1" text:outline-level="2"><text:bookmark-start text:name="epílogo"/><text:soft-page-break/>Epílogo<text:bookmark-end text:name="epílogo"/></text:h>
      <text:p text:style-name="P2">Ao longo desta monografia, buscamos investigar a possibilidade e a fecundidade de um alinhamento conceitual e metodológico entre a Doutrina Espírita, conforme codificada por Allan Kardec, e os princípios fundamentais do pensamento sistêmico contemporâneo. Essa aproximação, ainda em estágio embrionário, não pretende fundar uma nova doutrina nem oferecer uma síntese definitiva, mas sim abrir um campo de diálogo, de investigação e de construção filosófica e espiritual ampliada.</text:p>
      <text:p text:style-name="P3">A motivação central desta proposta parte do reconhecimento de que vivemos um momento de crise epistêmica e civilizatória: fragmentação do saber, exaustão das visões mecanicistas do ser humano, colapso ambiental, desintegração dos vínculos sociais e crise de sentido existencial. Diante desses desafios, emerge com cada vez mais clareza a necessidade de superar o paradigma reducionista e individualista da modernidade, substituindo-o por modelos que valorizem a interdependência, a complexidade, a reciprocidade e a integração entre os planos da existência.</text:p>
      <text:p text:style-name="P3">O pensamento sistêmico tem contribuído decisivamente para essa mudança de paradigma. Ele nos ensina que a vida não é feita de entidades isoladas, mas de relações; que os sistemas vivos – dos organismos às sociedades – não evoluem por controle externo, mas por processos auto-organizados de adaptação, cooperação e emergência; que o conhecimento não é espelho, mas co-criação; que a ética não é norma imposta, mas ecologia das relações. Esses princípios ressoam, em muitos aspectos, com o núcleo ético-filosófico da Doutrina Espírita.</text:p>
      <text:p text:style-name="P3">O Espiritismo, por sua vez, sempre se apresentou como uma doutrina de conciliação entre ciência, filosofia e espiritualidade. Kardec não se limitou a crer, mas investigou; não se satisfez com explicações tradicionais, mas buscou os fundamentos racionais da alma, da vida pós-morte e das leis morais. Sua proposta era, desde o início, sistemática, racional, experiencial e ética. Nesse sentido, podemos dizer que o Espiritismo tem em seu DNA a vocação para o pensamento complexo.</text:p>
      <text:p text:style-name="P3">A aproximação entre Espiritismo e pensamento sistêmico, portanto, não é uma superposição forçada, mas uma convergência potencial que merece ser explorada com profundidade, rigor e abertura. Esta monografia tem um caráter exploratório e propositivo, oferecendo um conjunto de hipóteses iniciais, argumentos conceituais e paralelos interpretativos que convidam à continuidade da pesquisa, ao debate interdisciplinar e à prática espiritual consciente.</text:p>
      <text:p text:style-name="P3">Como contribuição inicial para essa construção, a Parte III da monografia apresentou um conjunto de capítulos voltados a interpretar os fundamentos do Espiritismo sob a ótica da complexidade e da interdependência:</text:p>
      <text:list text:style-name="L16">
        <text:list-item>
          <text:p text:style-name="P22">Reformulamos a noção de espírito, mente e consciência como funções emergentes e integradas, superando o dualismo mente-corpo e propondo uma abordagem relacional da experiência espiritual encarnada.</text:p>
        </text:list-item>
        <text:list-item>
          <text:p text:style-name="P22">Releitura do perispírito como um campo fluídico adaptativo, simbólico e dinâmico, moldado pelas experiências do espírito em constante reorganização.</text:p>
        </text:list-item>
        <text:list-item>
          <text:p text:style-name="P22"><text:soft-page-break/>A reencarnação foi compreendida como processo sistêmico, envolvendo dimensões materiais, formais, temporais e de significado, numa pedagogia evolutiva em rede.</text:p>
        </text:list-item>
        <text:list-item>
          <text:p text:style-name="P22">A vida espiritual foi descrita como uma rede de interações, onde vínculos afetivos, morais e vibratórios estruturam campos de evolução coletiva.</text:p>
        </text:list-item>
        <text:list-item>
          <text:p text:style-name="P22">A ética espírita foi reinterpretada como uma força de integração sistêmica, na qual o bem é entendido como a promoção da harmonia, da coesão e da reciprocidade entre os seres.</text:p>
        </text:list-item>
        <text:list-item>
          <text:p text:style-name="P22">A Lei de Causa e Efeito foi abordada como causalidade complexa, mediada por múltiplos fatores, contextos e temporalidades, rompendo com a visão punitiva e reforçando o princípio de aprendizado moral contínuo.</text:p>
        </text:list-item>
        <text:list-item>
          <text:p text:style-name="P22">A convergência entre ciência, espiritualidade e complexidade foi apresentada como uma via promissora para a reconstrução do sentido e da responsabilidade na contemporaneidade.</text:p>
        </text:list-item>
        <text:list-item>
          <text:p text:style-name="P22">a experiência do espírito encarnado foi compreendida a partir do modelo biopsicossocioespiritual, em que a personalidade resulta de uma rede de interações entre corpo, espírito, ambiente, vínculos e história, deslocando o foco da causalidade para a ecologia da experiência.</text:p>
        </text:list-item>
        <text:list-item>
          <text:p text:style-name="P22">E finalmente, integrou essas ideias à dimensão coletiva, propondo que a sociedade humana também é um sistema vivo e espiritual, onde o progresso do espírito se realiza em rede. Aliamos o pensamento sistêmico às propostas espíritas de esclarecimento e reforma das instituições, mostrando que a regeneração moral exige também a transformação cultural, simbólica e estrutural da convivência humana.</text:p>
        </text:list-item>
      </text:list>
      <text:p text:style-name="P2">Essas proposições, embora introdutórias, apontam para um modelo de espiritualidade ampliada: encarnada, relacional e coevolutiva. Uma espiritualidade que reconhece o espírito como centro de liberdade, mas também como nó em uma rede de vínculos; que entende a reencarnação como pedagogia do encontro; e que vê a reforma íntima e a reforma social como dimensões indissociáveis da evolução.</text:p>
      <text:p text:style-name="P3">O Espiritismo Sistêmico não pretende substituir o legado kardecista, mas reinterpretá-lo à luz de um novo paradigma, sem perder sua base racional, moral e experimental. Convida-nos a pensar a espiritualidade como uma ecologia da consciência e a encarnação como oportunidade de ação lúcida em todos os níveis da existência: pessoal, social e cósmico.</text:p>
      <text:p text:style-name="P3">Diante da complexidade do mundo contemporâneo, essa proposta se oferece como um caminho de reconexão: com o outro, com o planeta, com as leis divinas e com o sentido profundo da vida. Que novas reflexões e práticas possam nascer a partir desse diálogo inicial – e que cada espírito, como elo dessa vasta rede, contribua ativamente para a regeneração de si e do mu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dc:title/>
    <dc:description/>
    <dc:subject/>
    <meta:keyword/>
    <meta:initial-creator/>
    <meta:creation-date>2025-05-07T14:06:07Z</meta:creation-date>
    <dc:date>2025-05-07T11:09:44.837410711</dc:date>
    <meta:editing-duration>PT3M22S</meta:editing-duration>
    <meta:editing-cycles>6</meta:editing-cycles>
    <meta:document-statistic meta:table-count="0" meta:image-count="0" meta:object-count="0" meta:page-count="77" meta:paragraph-count="701" meta:word-count="34421" meta:character-count="228328" meta:non-whitespace-character-count="194472"/>
  </office:meta>
</office:document-meta>
</file>