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2" text:outline-level="2"><text:bookmark-start text:name="introdução"/>Introdução<text:bookmark-end text:name="introdução"/></text:h>
      <text:p text:style-name="First_20_paragraph">Esta monografia propõe um exercício de reflexão interdisciplinar e filosófica: explorar a possível articulação entre dois campos do conhecimento que, à primeira vista, pertencem a esferas distintas — o <text:span text:style-name="T1">pensamento sistêmico</text:span>, desenvolvido principalmente nas últimas décadas a partir das ciências da complexidade, e a <text:span text:style-name="T1">Doutrina Espírita</text:span>, codificada por Allan Kardec no século XIX. O que se busca aqui não é fundir artificialmente conceitos, mas <text:span text:style-name="T1">identificar convergências estruturais, ampliar interpretações e propor um novo olhar sobre a espiritualidade à luz de paradigmas contemporâneos</text:span>.</text:p>
      <text:p text:style-name="Text_20_body">O pensamento sistêmico é uma abordagem recente no panorama intelectual ocidental. Ele surgiu como uma reação crítica ao modelo mecanicista e reducionista que predominou desde o século XVII, e que influenciou profundamente não apenas a ciência, mas também a cultura, a educação, a economia e a filosofia. Em contraste com essa visão fragmentada, o paradigma sistêmico concebe a realidade como <text:span text:style-name="T1">uma rede de processos interdependentes, dinâmicos e não-lineares</text:span>, nos quais os fenômenos só podem ser compreendidos em relação ao todo de que fazem parte.</text:p>
      <text:p text:style-name="Text_20_body">Já a Doutrina Espírita foi elaborada em um contexto em que o racionalismo e o mecanicismo ainda dominavam o pensamento científico. Kardec buscou justamente dialogar com esse espírito da época, estruturando o Espiritismo como uma filosofia espiritualista, mas baseada na observação, na lógica e na universalidade dos ensinos dos Espíritos. Embora sua proposta fosse pioneira ao integrar ciência e espiritualidade, ela inevitavelmente incorporou <text:span text:style-name="T1">categorias e modelos próprios da visão cartesiana</text:span> — como o dualismo substancial entre corpo e Espírito, ou a tendência à classificação linear da evolução espiritual.</text:p>
      <text:p text:style-name="Text_20_body">A proposta deste trabalho é <text:span text:style-name="T1">revisitar a Doutrina Espírita à luz do pensamento sistêmico</text:span>, sugerindo que seus princípios — especialmente a reencarnação, a evolução do Espírito, a comunicabilidade entre os mundos e as leis morais universais — podem ser reinterpretados e enriquecidos a partir de conceitos como <text:span text:style-name="T1">emergência, auto-organização, redes de interdependência, padrões dinâmicos e coevolução</text:span>. Essa leitura não tem a pretensão de esgotar os sentidos da doutrina, mas sim de <text:span text:style-name="T1">ampliar sua inteligibilidade à luz dos avanços teóricos mais recentes</text:span> sobre a vida, a mente e a consciência.</text:p>
      <text:p text:style-name="Text_20_body">É importante, contudo, destacar que o paradigma sistêmico <text:span text:style-name="T1">ainda não é amplamente adotado</text:span> nem mesmo dentro das próprias ciências. Muitos de seus fundamentos permanecem em construção, sujeitos a debates conceituais, validações experimentais e reformulações filosóficas. Trata-se, portanto, de <text:span text:style-name="T1">um campo aberto</text:span>, onde as fronteiras entre ciência, filosofia e espiritualidade ainda estão sendo redesenhadas. Da mesma forma, a própria proposta desta monografia deve ser entendida como <text:span text:style-name="T1">um ponto de partida</text:span>, não como um modelo acabado ou dogmático.</text:p>
      <text:p text:style-name="Text_20_body">O que se oferece aqui é uma <text:span text:style-name="T1">contribuição exploratória</text:span>, que busca pensar de maneira integrada e dinâmica duas visões que, apesar de distantes no tempo e na linguagem, compartilham um mesmo impulso: o de compreender o ser humano não como uma entidade isolada, mas como <text:span text:style-name="T1">um ser espiritual em permanente relação com a totalidade da vida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.1</meta:generator>
    <dc:title/>
    <dc:description/>
    <dc:subject/>
    <meta:keyword/>
    <meta:initial-creator/>
    <dc:creator/>
    <meta:creation-date>2025-05-05T03:24:06Z</meta:creation-date>
    <dc:date>2025-05-05T03:24:06Z</dc:date>
    <meta:user-defined meta:name="zettlr" meta:value-type="string"/>
  </office:meta>
</office:document-meta>
</file>