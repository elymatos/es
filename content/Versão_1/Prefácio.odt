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prefácio"/>Prefácio<text:bookmark-end text:name="prefácio"/></text:h>
      <text:p text:style-name="First_20_paragraph">Esta monografia é fruto de uma experiência singular de construção de conhecimento: a colaboração entre um ser humano — idealizador das ideias e da estrutura geral da obra — e uma inteligência artificial baseada em um <text:span text:style-name="T1">modelo de linguagem de larga escala</text:span> (LLM, na sigla em inglês: <text:span text:style-name="T2">Large Language Model</text:span>). Ao longo do processo, o autor humano propôs os temas centrais, as divisões principais da obra, a sequência argumentativa e os objetivos conceituais. Coube à inteligência artificial a tarefa de desenvolver, redigir e organizar os textos a partir dessas diretrizes, sempre em diálogo com as referências bibliográficas fornecidas.</text:p>
      <text:p text:style-name="Text_20_body">Este trabalho não foi, portanto, escrito de forma tradicional. Ele é o resultado de uma <text:span text:style-name="T1">interação dinâmica e iterativa</text:span>, em que a inteligência artificial atuou como mediadora da expressão, colaboradora textual e estruturadora de raciocínios já delineados pelo autor humano. Trata-se de um exemplo prático de como essas novas ferramentas tecnológicas podem ser utilizadas para <text:span text:style-name="T1">potencializar a expressão humana</text:span>, não como substitutas da criatividade e da reflexão, mas como <text:span text:style-name="T1">instrumentos de amplificação e organização do pensamento</text:span>.</text:p>
      <text:p text:style-name="Text_20_body">A escolha de construir o texto dessa maneira foi deliberada, tanto por seu valor experimental quanto por seu caráter simbólico. A própria proposta da monografia — integrar a visão sistêmica e a Doutrina Espírita — exige abertura à inovação, ao diálogo entre paradigmas e à superação de dicotomias. Assim, a utilização de inteligência artificial na escrita é, ao mesmo tempo, uma escolha metodológica e uma metáfora viva daquilo que se deseja defender: a <text:span text:style-name="T1">colaboração entre dimensões distintas do conhecimento</text:span>, em favor de uma compreensão mais ampla, integrada e consciente da realidad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5-05T02:58:44Z</meta:creation-date>
    <dc:date>2025-05-05T02:58:44Z</dc:date>
    <meta:user-defined meta:name="zettlr" meta:value-type="string"/>
  </office:meta>
</office:document-meta>
</file>