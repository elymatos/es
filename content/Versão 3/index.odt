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(<text:span text:style-name="T1">include?</text:span>) 01-apresentação.md (<text:span text:style-name="T1">include?</text:span>) 02-introdução.md (<text:span text:style-name="T1">include?</text:span>) 03-parteI.01.md (<text:span text:style-name="T1">include?</text:span>) 04-parteI.02.md (<text:span text:style-name="T1">include?</text:span>) 05-parteI.03.md (<text:span text:style-name="T1">include?</text:span>) 06-parteI.04.md (<text:span text:style-name="T1">include?</text:span>) 07-partei.05.md (<text:span text:style-name="T1">include?</text:span>) 08-partei.06.md (<text:span text:style-name="T1">include?</text:span>) 09-partei.07.md (<text:span text:style-name="T1">include?</text:span>) 10-partei.08.md (<text:span text:style-name="T1">include?</text:span>) 11-parteI.09.md (<text:span text:style-name="T1">include?</text:span>) 12-parteI.10.md (<text:span text:style-name="T1">include?</text:span>) 13-parteI.11.md (<text:span text:style-name="T1">include?</text:span>) 14-parteI.12.md (<text:span text:style-name="T1">include?</text:span>) 15-parteII.apresentação.md (<text:span text:style-name="T1">include?</text:span>) 16-parteII.01.md (<text:span text:style-name="T1">include?</text:span>) 17-parteII.02.md (<text:span text:style-name="T1">include?</text:span>) 18-parteII.03.md (<text:span text:style-name="T1">include?</text:span>) 19-parteII.04.md (<text:span text:style-name="T1">include?</text:span>) 20-parteII.05.md (<text:span text:style-name="T1">include?</text:span>) 21-parteII-06.md (<text:span text:style-name="T1">include?</text:span>) 22-parteII.07.md (<text:span text:style-name="T1">include?</text:span>) 23-parteII.08.md (<text:span text:style-name="T1">include?</text:span>) 24-parteIII.apresentação.md (<text:span text:style-name="T1">include?</text:span>) 25-parteIII.01.md (<text:span text:style-name="T1">include?</text:span>) 26-parteIII.02.md (<text:span text:style-name="T1">include?</text:span>) 27-parteIII.03.md (<text:span text:style-name="T1">include?</text:span>) 28-parteIII.04.md (<text:span text:style-name="T1">include?</text:span>) 29-parteII.05.md (<text:span text:style-name="T1">include?</text:span>) 30-parteIII.06.md (<text:span text:style-name="T1">include?</text:span>) 31-parteIII.07.md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5-05T23:58:32Z</meta:creation-date>
    <dc:date>2025-05-05T23:58:32Z</dc:date>
    <meta:user-defined meta:name="zettlr" meta:value-type="string"/>
  </office:meta>
</office:document-meta>
</file>